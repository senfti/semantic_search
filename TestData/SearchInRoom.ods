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.B4]-[.C4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.F4]-[.G4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.K4]-[.L4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.O4]-[.P4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.T4]-[.U4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.X4]-[.Y4]" office:value-type="float" office:value="386.9775207047" calcext:value-type="float">
            <text:p>386.98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.B5]-[.C5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.F5]-[.G5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.K5]-[.L5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.O5]-[.P5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.T5]-[.U5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.X5]-[.Y5]" office:value-type="float" office:value="777.9848461153" calcext:value-type="float">
            <text:p>777.98</text:p>
          </table:table-cell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.B6]-[.C6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.F6]-[.G6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.K6]-[.L6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.O6]-[.P6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.T6]-[.U6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.X6]-[.Y6]" office:value-type="float" office:value="431.0477626321" calcext:value-type="float">
            <text:p>431.05</text:p>
          </table:table-cell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.B7]-[.C7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.F7]-[.G7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.K7]-[.L7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.O7]-[.P7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.T7]-[.U7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.X7]-[.Y7]" office:value-type="float" office:value="265.1346528531" calcext:value-type="float">
            <text:p>265.13</text:p>
          </table:table-cell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.B8]-[.C8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.F8]-[.G8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47.06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.K8]-[.L8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.O8]-[.P8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.T8]-[.U8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.X8]-[.Y8]" office:value-type="float" office:value="714.61782074" calcext:value-type="float">
            <text:p>714.62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4:.B8])" office:value-type="float" office:value="266.1628932" calcext:value-type="float">
            <text:p>266.16</text:p>
          </table:table-cell>
          <table:table-cell table:style-name="ce3" table:formula="of:=AVERAGE([.C4:.C8])" office:value-type="float" office:value="92.48210701946" calcext:value-type="float">
            <text:p>92.48</text:p>
          </table:table-cell>
          <table:table-cell table:style-name="ce3" table:formula="of:=AVERAGE([.D4:.D8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.F4:.F8])" office:value-type="float" office:value="531.0130234718" calcext:value-type="float">
            <text:p>531.01</text:p>
          </table:table-cell>
          <table:table-cell table:style-name="ce3" table:formula="of:=AVERAGE([.G4:.G8])" office:value-type="float" office:value="77.51694526672" calcext:value-type="float">
            <text:p>77.52</text:p>
          </table:table-cell>
          <table:table-cell table:style-name="ce3" table:formula="of:=AVERAGE([.H4:.H8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.K4:.K8])" office:value-type="float" office:value="162.7547261716" calcext:value-type="float">
            <text:p>162.75</text:p>
          </table:table-cell>
          <table:table-cell table:style-name="ce3" table:formula="of:=AVERAGE([.L4:.L8])" office:value-type="float" office:value="70.26406755448" calcext:value-type="float">
            <text:p>70.26</text:p>
          </table:table-cell>
          <table:table-cell table:style-name="ce3" table:formula="of:=AVERAGE([.M4:.M8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.O4:.O8])" office:value-type="float" office:value="355.7123970986" calcext:value-type="float">
            <text:p>355.71</text:p>
          </table:table-cell>
          <table:table-cell table:style-name="ce3" table:formula="of:=AVERAGE([.P4:.P8])" office:value-type="float" office:value="92.7626702309" calcext:value-type="float">
            <text:p>92.76</text:p>
          </table:table-cell>
          <table:table-cell table:style-name="ce3" table:formula="of:=AVERAGE([.Q4:.Q8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.T4:.T8])" office:value-type="float" office:value="462.870468521" calcext:value-type="float">
            <text:p>462.87</text:p>
          </table:table-cell>
          <table:table-cell table:style-name="ce3" table:formula="of:=AVERAGE([.U4:.U8])" office:value-type="float" office:value="111.87942962642" calcext:value-type="float">
            <text:p>111.88</text:p>
          </table:table-cell>
          <table:table-cell table:style-name="ce3" table:formula="of:=AVERAGE([.V4:.V8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.X4:.X8])" office:value-type="float" office:value="625.440422249" calcext:value-type="float">
            <text:p>625.44</text:p>
          </table:table-cell>
          <table:table-cell table:style-name="ce3" table:formula="of:=AVERAGE([.Y4:.Y8])" office:value-type="float" office:value="110.28790163996" calcext:value-type="float">
            <text:p>110.29</text:p>
          </table:table-cell>
          <table:table-cell table:style-name="ce3" table:formula="of:=AVERAGE([.Z4:.Z8])" office:value-type="float" office:value="515.15252060904" calcext:value-type="float">
            <text:p>515.15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.B17]-[.C17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.F17]-[.G17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.B18]-[.C18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.F18]-[.G18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.K18]-[.L18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.O18]-[.P18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.T18]-[.U18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.X18]-[.Y18]" office:value-type="float" office:value="17.70475456906" calcext:value-type="float">
            <text:p>17.70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.B19]-[.C19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.F19]-[.G19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.K19]-[.L19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.O19]-[.P19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.T19]-[.U19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.X19]-[.Y19]" office:value-type="float" office:value="32.78935188559" calcext:value-type="float">
            <text:p>32.79</text:p>
          </table:table-cell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.B20]-[.C20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.F20]-[.G20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.K20]-[.L20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.O20]-[.P20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.T20]-[.U20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.X20]-[.Y20]" office:value-type="float" office:value="20.66444638677" calcext:value-type="float">
            <text:p>20.66</text:p>
          </table:table-cell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.B21]-[.C21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.F21]-[.G21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.K21]-[.L21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.O21]-[.P21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.T21]-[.U21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.X21]-[.Y21]" office:value-type="float" office:value="12.16365933514" calcext:value-type="float">
            <text:p>12.16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7:.B21])" office:value-type="float" office:value="12.631193204152" calcext:value-type="float">
            <text:p>12.63</text:p>
          </table:table-cell>
          <table:table-cell table:style-name="ce3" table:formula="of:=AVERAGE([.C17:.C21])" office:value-type="float" office:value="6.688329878136" calcext:value-type="float">
            <text:p>6.69</text:p>
          </table:table-cell>
          <table:table-cell table:style-name="ce3" table:formula="of:=AVERAGE([.D17:.D21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.F17:.F21])" office:value-type="float" office:value="30.06314736566" calcext:value-type="float">
            <text:p>30.06</text:p>
          </table:table-cell>
          <table:table-cell table:style-name="ce3" table:formula="of:=AVERAGE([.G17:.G21])" office:value-type="float" office:value="6.443737162808" calcext:value-type="float">
            <text:p>6.44</text:p>
          </table:table-cell>
          <table:table-cell table:style-name="ce3" table:formula="of:=AVERAGE([.H17:.H21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.K22]-[.L22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.O22]-[.P22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.T22]-[.U22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.X22]-[.Y22]" office:value-type="float" office:value="39.49595378717" calcext:value-type="float">
            <text:p>39.50</text:p>
          </table:table-cell>
        </table:table-row>
        <table:table-row table:style-name="ro1">
          <table:table-cell table:number-columns-repeated="10"/>
          <table:table-cell table:style-name="ce3" table:formula="of:=AVERAGE([.K18:.K22])" office:value-type="float" office:value="9.842314383104" calcext:value-type="float">
            <text:p>9.84</text:p>
          </table:table-cell>
          <table:table-cell table:style-name="ce3" table:formula="of:=AVERAGE([.L18:.L22])" office:value-type="float" office:value="5.607873944398" calcext:value-type="float">
            <text:p>5.61</text:p>
          </table:table-cell>
          <table:table-cell table:style-name="ce3" table:formula="of:=AVERAGE([.M18:.M22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.O18:.O22])" office:value-type="float" office:value="17.70493316406" calcext:value-type="float">
            <text:p>17.70</text:p>
          </table:table-cell>
          <table:table-cell table:style-name="ce3" table:formula="of:=AVERAGE([.P18:.P22])" office:value-type="float" office:value="7.105698399186" calcext:value-type="float">
            <text:p>7.11</text:p>
          </table:table-cell>
          <table:table-cell table:style-name="ce3" table:formula="of:=AVERAGE([.Q18:.Q22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.T18:.T22])" office:value-type="float" office:value="21.30219896922" calcext:value-type="float">
            <text:p>21.30</text:p>
          </table:table-cell>
          <table:table-cell table:style-name="ce3" table:formula="of:=AVERAGE([.U18:.U22])" office:value-type="float" office:value="5.96523769251" calcext:value-type="float">
            <text:p>5.97</text:p>
          </table:table-cell>
          <table:table-cell table:style-name="ce3" table:formula="of:=AVERAGE([.V18:.V22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.X18:.X22])" office:value-type="float" office:value="31.66064155238" calcext:value-type="float">
            <text:p>31.66</text:p>
          </table:table-cell>
          <table:table-cell table:style-name="ce3" table:formula="of:=AVERAGE([.Y18:.Y22])" office:value-type="float" office:value="7.097008359634" calcext:value-type="float">
            <text:p>7.10</text:p>
          </table:table-cell>
          <table:table-cell table:style-name="ce3" table:formula="of:=AVERAGE([.Z18:.Z22])" office:value-type="float" office:value="24.563633192746" calcext:value-type="float">
            <text:p>24.5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.B31]-[.C31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.F31]-[.G31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.B32]-[.C32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.F32]-[.G32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.K32]-[.L32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.O32]-[.P32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.T32]-[.U32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.X32]-[.Y32]" office:value-type="float" office:value="1079.731609335" calcext:value-type="float">
            <text:p>1079.73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.B33]-[.C33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.F33]-[.G33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.K33]-[.L33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.O33]-[.P33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.T33]-[.U33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.X33]-[.Y33]" office:value-type="float" office:value="2542.972255697" calcext:value-type="float">
            <text:p>2542.97</text:p>
          </table:table-cell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.B34]-[.C34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.F34]-[.G34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.K34]-[.L34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.O34]-[.P34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.T34]-[.U34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.X34]-[.Y34]" office:value-type="float" office:value="1270.159429345" calcext:value-type="float">
            <text:p>1270.16</text:p>
          </table:table-cell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.B35]-[.C35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.F35]-[.G35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.K35]-[.L35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.O35]-[.P35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.T35]-[.U35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.X35]-[.Y35]" office:value-type="float" office:value="1338.508480207" calcext:value-type="float">
            <text:p>1338.51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1:.B35])" office:value-type="float" office:value="804.819669646" calcext:value-type="float">
            <text:p>804.82</text:p>
          </table:table-cell>
          <table:table-cell table:style-name="ce3" table:formula="of:=AVERAGE([.C31:.C35])" office:value-type="float" office:value="216.8935924764" calcext:value-type="float">
            <text:p>216.89</text:p>
          </table:table-cell>
          <table:table-cell table:style-name="ce3" table:formula="of:=AVERAGE([.D31:.D35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.F31:.F35])" office:value-type="float" office:value="1683.2901992464" calcext:value-type="float">
            <text:p>1683.29</text:p>
          </table:table-cell>
          <table:table-cell table:style-name="ce3" table:formula="of:=AVERAGE([.G31:.G35])" office:value-type="float" office:value="213.13011296" calcext:value-type="float">
            <text:p>213.13</text:p>
          </table:table-cell>
          <table:table-cell table:style-name="ce3" table:formula="of:=AVERAGE([.H31:.H35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.K36]-[.L36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.O36]-[.P36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.T36]-[.U36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.X36]-[.Y36]" office:value-type="float" office:value="2216.221524713" calcext:value-type="float">
            <text:p>2216.22</text:p>
          </table:table-cell>
        </table:table-row>
        <table:table-row table:style-name="ro1">
          <table:table-cell table:number-columns-repeated="10"/>
          <table:table-cell table:style-name="ce3" table:formula="of:=AVERAGE([.K32:.K36])" office:value-type="float" office:value="523.4375653602" calcext:value-type="float">
            <text:p>523.44</text:p>
          </table:table-cell>
          <table:table-cell table:style-name="ce3" table:formula="of:=AVERAGE([.L32:.L36])" office:value-type="float" office:value="198.2779334126" calcext:value-type="float">
            <text:p>198.28</text:p>
          </table:table-cell>
          <table:table-cell table:style-name="ce3" table:formula="of:=AVERAGE([.M32:.M36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.O32:.O36])" office:value-type="float" office:value="1162.2458922056" calcext:value-type="float">
            <text:p>1162.25</text:p>
          </table:table-cell>
          <table:table-cell table:style-name="ce3" table:formula="of:=AVERAGE([.P32:.P36])" office:value-type="float" office:value="253.6992279616" calcext:value-type="float">
            <text:p>253.70</text:p>
          </table:table-cell>
          <table:table-cell table:style-name="ce3" table:formula="of:=AVERAGE([.Q32:.Q36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.T32:.T36])" office:value-type="float" office:value="1433.72661952" calcext:value-type="float">
            <text:p>1433.73</text:p>
          </table:table-cell>
          <table:table-cell table:style-name="ce3" table:formula="of:=AVERAGE([.U32:.U36])" office:value-type="float" office:value="309.7210470026" calcext:value-type="float">
            <text:p>309.72</text:p>
          </table:table-cell>
          <table:table-cell table:style-name="ce3" table:formula="of:=AVERAGE([.V32:.V36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.X32:.X36])" office:value-type="float" office:value="2007.57658462" calcext:value-type="float">
            <text:p>2007.58</text:p>
          </table:table-cell>
          <table:table-cell table:style-name="ce3" table:formula="of:=AVERAGE([.Y32:.Y36])" office:value-type="float" office:value="318.0579247606" calcext:value-type="float">
            <text:p>318.06</text:p>
          </table:table-cell>
          <table:table-cell table:style-name="ce3" table:formula="of:=AVERAGE([.Z32:.Z36])" office:value-type="float" office:value="1689.5186598594" calcext:value-type="float">
            <text:p>1689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2:12:20.647085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1T12:17:12.386095952</dc:date>
    <meta:editing-duration>PT1H5M35S</meta:editing-duration>
    <meta:editing-cycles>6</meta:editing-cycles>
    <meta:generator>LibreOffice/5.1.6.2$Linux_X86_64 LibreOffice_project/10m0$Build-2</meta:generator>
    <meta:document-statistic meta:table-count="1" meta:cell-count="402" meta:object-count="0"/>
  </office:meta>
</office:document-meta>
</file>
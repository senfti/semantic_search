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ne_room_sear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Spoon on Table, Time</text:p>
          </table:table-cell>
          <table:table-cell table:number-columns-repeated="8"/>
          <table:table-cell office:value-type="string" calcext:value-type="string">
            <text:p>Remote on CouchTable</text:p>
          </table:table-cell>
          <table:table-cell table:number-columns-repeated="8"/>
          <table:table-cell office:value-type="string" calcext:value-type="string">
            <text:p>Remote on KitchenT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175.072071791" calcext:value-type="float">
            <text:p>175.07</text:p>
          </table:table-cell>
          <table:table-cell table:style-name="ce2" office:value-type="float" office:value="134.629767418" calcext:value-type="float">
            <text:p>134.63</text:p>
          </table:table-cell>
          <table:table-cell table:style-name="ce2" table:formula="of:=[.B6]-[.C6]" office:value-type="float" office:value="40.442304373" calcext:value-type="float">
            <text:p>40.44</text:p>
          </table:table-cell>
          <table:table-cell table:style-name="ce2"/>
          <table:table-cell table:style-name="ce2" office:value-type="float" office:value="171.899055481" calcext:value-type="float">
            <text:p>171.90</text:p>
          </table:table-cell>
          <table:table-cell table:style-name="ce2" office:value-type="float" office:value="74.3296275139" calcext:value-type="float">
            <text:p>74.33</text:p>
          </table:table-cell>
          <table:table-cell table:style-name="ce2" table:formula="of:=[.F6]-[.G6]" office:value-type="float" office:value="97.5694279671" calcext:value-type="float">
            <text:p>97.57</text:p>
          </table:table-cell>
          <table:table-cell table:number-columns-repeated="2"/>
          <table:table-cell table:style-name="ce2" office:value-type="float" office:value="101.200848341" calcext:value-type="float">
            <text:p>101.20</text:p>
          </table:table-cell>
          <table:table-cell table:style-name="ce2" office:value-type="float" office:value="71.0400195122" calcext:value-type="float">
            <text:p>71.04</text:p>
          </table:table-cell>
          <table:table-cell table:style-name="ce2" table:formula="of:=[.K6]-[.L6]" office:value-type="float" office:value="30.1608288288" calcext:value-type="float">
            <text:p>30.16</text:p>
          </table:table-cell>
          <table:table-cell table:style-name="ce2"/>
          <table:table-cell table:style-name="ce2" office:value-type="float" office:value="195.089064598" calcext:value-type="float">
            <text:p>195.09</text:p>
          </table:table-cell>
          <table:table-cell table:style-name="ce2" office:value-type="float" office:value="84.5747725964" calcext:value-type="float">
            <text:p>84.57</text:p>
          </table:table-cell>
          <table:table-cell table:style-name="ce2" table:formula="of:=[.O6]-[.P6]" office:value-type="float" office:value="110.5142920016" calcext:value-type="float">
            <text:p>110.51</text:p>
          </table:table-cell>
          <table:table-cell table:number-columns-repeated="2"/>
          <table:table-cell table:style-name="ce2" office:value-type="float" office:value="516.031609058" calcext:value-type="float">
            <text:p>516.03</text:p>
          </table:table-cell>
          <table:table-cell table:style-name="ce2" office:value-type="float" office:value="152.69244504" calcext:value-type="float">
            <text:p>152.69</text:p>
          </table:table-cell>
          <table:table-cell table:style-name="ce2" table:formula="of:=[.T6]-[.U6]" office:value-type="float" office:value="363.339164018" calcext:value-type="float">
            <text:p>363.34</text:p>
          </table:table-cell>
          <table:table-cell table:style-name="ce2"/>
          <table:table-cell table:style-name="ce2" office:value-type="float" office:value="472.290265799" calcext:value-type="float">
            <text:p>472.29</text:p>
          </table:table-cell>
          <table:table-cell table:style-name="ce2" office:value-type="float" office:value="85.3127450943" calcext:value-type="float">
            <text:p>85.31</text:p>
          </table:table-cell>
          <table:table-cell table:style-name="ce2" table:formula="of:=[.X6]-[.Y6]" office:value-type="float" office:value="386.9775207047" calcext:value-type="float">
            <text:p>386.98</text:p>
          </table:table-cell>
        </table:table-row>
        <table:table-row table:style-name="ro1">
          <table:table-cell/>
          <table:table-cell table:style-name="ce2" office:value-type="float" office:value="358.441792965" calcext:value-type="float">
            <text:p>358.44</text:p>
          </table:table-cell>
          <table:table-cell table:style-name="ce2" office:value-type="float" office:value="95.9376180172" calcext:value-type="float">
            <text:p>95.94</text:p>
          </table:table-cell>
          <table:table-cell table:style-name="ce2" table:formula="of:=[.B7]-[.C7]" office:value-type="float" office:value="262.5041749478" calcext:value-type="float">
            <text:p>262.50</text:p>
          </table:table-cell>
          <table:table-cell table:style-name="ce2"/>
          <table:table-cell table:style-name="ce2" office:value-type="float" office:value="628.016088009" calcext:value-type="float">
            <text:p>628.02</text:p>
          </table:table-cell>
          <table:table-cell table:style-name="ce2" office:value-type="float" office:value="86.3883881569" calcext:value-type="float">
            <text:p>86.39</text:p>
          </table:table-cell>
          <table:table-cell table:style-name="ce2" table:formula="of:=[.F7]-[.G7]" office:value-type="float" office:value="541.6276998521" calcext:value-type="float">
            <text:p>541.63</text:p>
          </table:table-cell>
          <table:table-cell table:number-columns-repeated="2"/>
          <table:table-cell table:style-name="ce2" office:value-type="float" office:value="148.562063932" calcext:value-type="float">
            <text:p>148.56</text:p>
          </table:table-cell>
          <table:table-cell table:style-name="ce2" office:value-type="float" office:value="74.0481243134" calcext:value-type="float">
            <text:p>74.05</text:p>
          </table:table-cell>
          <table:table-cell table:style-name="ce2" table:formula="of:=[.K7]-[.L7]" office:value-type="float" office:value="74.5139396186" calcext:value-type="float">
            <text:p>74.51</text:p>
          </table:table-cell>
          <table:table-cell table:style-name="ce2"/>
          <table:table-cell table:style-name="ce2" office:value-type="float" office:value="449.116690636" calcext:value-type="float">
            <text:p>449.12</text:p>
          </table:table-cell>
          <table:table-cell table:style-name="ce2" office:value-type="float" office:value="95.5737941265" calcext:value-type="float">
            <text:p>95.57</text:p>
          </table:table-cell>
          <table:table-cell table:style-name="ce2" table:formula="of:=[.O7]-[.P7]" office:value-type="float" office:value="353.5428965095" calcext:value-type="float">
            <text:p>353.54</text:p>
          </table:table-cell>
          <table:table-cell table:number-columns-repeated="2"/>
          <table:table-cell table:style-name="ce2" office:value-type="float" office:value="419.570059538" calcext:value-type="float">
            <text:p>419.57</text:p>
          </table:table-cell>
          <table:table-cell table:style-name="ce2" office:value-type="float" office:value="77.9245374203" calcext:value-type="float">
            <text:p>77.92</text:p>
          </table:table-cell>
          <table:table-cell table:style-name="ce2" table:formula="of:=[.T7]-[.U7]" office:value-type="float" office:value="341.6455221177" calcext:value-type="float">
            <text:p>341.65</text:p>
          </table:table-cell>
          <table:table-cell table:style-name="ce2"/>
          <table:table-cell table:style-name="ce2" office:value-type="float" office:value="858.611993313" calcext:value-type="float">
            <text:p>858.61</text:p>
          </table:table-cell>
          <table:table-cell table:style-name="ce2" office:value-type="float" office:value="80.6271471977" calcext:value-type="float">
            <text:p>80.63</text:p>
          </table:table-cell>
          <table:table-cell table:style-name="ce2" table:formula="of:=[.X7]-[.Y7]" office:value-type="float" office:value="777.9848461153" calcext:value-type="float">
            <text:p>777.98</text:p>
          </table:table-cell>
        </table:table-row>
        <table:table-row table:style-name="ro1">
          <table:table-cell/>
          <table:table-cell table:style-name="ce2" office:value-type="float" office:value="287.835073709" calcext:value-type="float">
            <text:p>287.84</text:p>
          </table:table-cell>
          <table:table-cell table:style-name="ce2" office:value-type="float" office:value="77.3778150082" calcext:value-type="float">
            <text:p>77.38</text:p>
          </table:table-cell>
          <table:table-cell table:style-name="ce2" table:formula="of:=[.B8]-[.C8]" office:value-type="float" office:value="210.4572587008" calcext:value-type="float">
            <text:p>210.46</text:p>
          </table:table-cell>
          <table:table-cell table:style-name="ce2"/>
          <table:table-cell table:style-name="ce2" office:value-type="float" office:value="113.377553701" calcext:value-type="float">
            <text:p>113.38</text:p>
          </table:table-cell>
          <table:table-cell table:style-name="ce2" office:value-type="float" office:value="74.1069102287" calcext:value-type="float">
            <text:p>74.11</text:p>
          </table:table-cell>
          <table:table-cell table:style-name="ce2" table:formula="of:=[.F8]-[.G8]" office:value-type="float" office:value="39.2706434723" calcext:value-type="float">
            <text:p>39.27</text:p>
          </table:table-cell>
          <table:table-cell table:number-columns-repeated="2"/>
          <table:table-cell table:style-name="ce2" office:value-type="float" office:value="103.94940424" calcext:value-type="float">
            <text:p>103.95</text:p>
          </table:table-cell>
          <table:table-cell table:style-name="ce2" office:value-type="float" office:value="77.9526352882" calcext:value-type="float">
            <text:p>77.95</text:p>
          </table:table-cell>
          <table:table-cell table:style-name="ce2" table:formula="of:=[.K8]-[.L8]" office:value-type="float" office:value="25.9967689518" calcext:value-type="float">
            <text:p>26.00</text:p>
          </table:table-cell>
          <table:table-cell table:style-name="ce2"/>
          <table:table-cell table:style-name="ce2" office:value-type="float" office:value="617.857666016" calcext:value-type="float">
            <text:p>617.86</text:p>
          </table:table-cell>
          <table:table-cell table:style-name="ce2" office:value-type="float" office:value="120.832186699" calcext:value-type="float">
            <text:p>120.83</text:p>
          </table:table-cell>
          <table:table-cell table:style-name="ce2" table:formula="of:=[.O8]-[.P8]" office:value-type="float" office:value="497.025479317" calcext:value-type="float">
            <text:p>497.03</text:p>
          </table:table-cell>
          <table:table-cell table:number-columns-repeated="2"/>
          <table:table-cell table:style-name="ce2" office:value-type="float" office:value="539.522620201" calcext:value-type="float">
            <text:p>539.52</text:p>
          </table:table-cell>
          <table:table-cell table:style-name="ce2" office:value-type="float" office:value="120.296654701" calcext:value-type="float">
            <text:p>120.30</text:p>
          </table:table-cell>
          <table:table-cell table:style-name="ce2" table:formula="of:=[.T8]-[.U8]" office:value-type="float" office:value="419.2259655" calcext:value-type="float">
            <text:p>419.23</text:p>
          </table:table-cell>
          <table:table-cell table:style-name="ce2"/>
          <table:table-cell table:style-name="ce2" office:value-type="float" office:value="502.869000673" calcext:value-type="float">
            <text:p>502.87</text:p>
          </table:table-cell>
          <table:table-cell table:style-name="ce2" office:value-type="float" office:value="71.8212380409" calcext:value-type="float">
            <text:p>71.82</text:p>
          </table:table-cell>
          <table:table-cell table:style-name="ce2" table:formula="of:=[.X8]-[.Y8]" office:value-type="float" office:value="431.0477626321" calcext:value-type="float">
            <text:p>431.05</text:p>
          </table:table-cell>
        </table:table-row>
        <table:table-row table:style-name="ro1">
          <table:table-cell/>
          <table:table-cell table:style-name="ce2" office:value-type="float" office:value="134.523976088" calcext:value-type="float">
            <text:p>134.52</text:p>
          </table:table-cell>
          <table:table-cell table:style-name="ce2" office:value-type="float" office:value="68.5082485676" calcext:value-type="float">
            <text:p>68.51</text:p>
          </table:table-cell>
          <table:table-cell table:style-name="ce2" table:formula="of:=[.B9]-[.C9]" office:value-type="float" office:value="66.0157275204" calcext:value-type="float">
            <text:p>66.02</text:p>
          </table:table-cell>
          <table:table-cell table:style-name="ce2"/>
          <table:table-cell table:style-name="ce2" office:value-type="float" office:value="775.503843546" calcext:value-type="float">
            <text:p>775.50</text:p>
          </table:table-cell>
          <table:table-cell table:style-name="ce2" office:value-type="float" office:value="69.7423915863" calcext:value-type="float">
            <text:p>69.74</text:p>
          </table:table-cell>
          <table:table-cell table:style-name="ce2" table:formula="of:=[.F9]-[.G9]" office:value-type="float" office:value="705.7614519597" calcext:value-type="float">
            <text:p>705.76</text:p>
          </table:table-cell>
          <table:table-cell table:number-columns-repeated="2"/>
          <table:table-cell table:style-name="ce2" office:value-type="float" office:value="182.668864489" calcext:value-type="float">
            <text:p>182.67</text:p>
          </table:table-cell>
          <table:table-cell table:style-name="ce2" office:value-type="float" office:value="69.9216268063" calcext:value-type="float">
            <text:p>69.92</text:p>
          </table:table-cell>
          <table:table-cell table:style-name="ce2" table:formula="of:=[.K9]-[.L9]" office:value-type="float" office:value="112.7472376827" calcext:value-type="float">
            <text:p>112.75</text:p>
          </table:table-cell>
          <table:table-cell table:style-name="ce2"/>
          <table:table-cell table:style-name="ce2" office:value-type="float" office:value="343.665700197" calcext:value-type="float">
            <text:p>343.67</text:p>
          </table:table-cell>
          <table:table-cell table:style-name="ce2" office:value-type="float" office:value="82.7563233376" calcext:value-type="float">
            <text:p>82.76</text:p>
          </table:table-cell>
          <table:table-cell table:style-name="ce2" table:formula="of:=[.O9]-[.P9]" office:value-type="float" office:value="260.9093768594" calcext:value-type="float">
            <text:p>260.91</text:p>
          </table:table-cell>
          <table:table-cell table:number-columns-repeated="2"/>
          <table:table-cell table:style-name="ce2" office:value-type="float" office:value="476.477777958" calcext:value-type="float">
            <text:p>476.48</text:p>
          </table:table-cell>
          <table:table-cell table:style-name="ce2" office:value-type="float" office:value="111.048654556" calcext:value-type="float">
            <text:p>111.05</text:p>
          </table:table-cell>
          <table:table-cell table:style-name="ce2" table:formula="of:=[.T9]-[.U9]" office:value-type="float" office:value="365.429123402" calcext:value-type="float">
            <text:p>365.43</text:p>
          </table:table-cell>
          <table:table-cell table:style-name="ce2"/>
          <table:table-cell table:style-name="ce2" office:value-type="float" office:value="353.760957718" calcext:value-type="float">
            <text:p>353.76</text:p>
          </table:table-cell>
          <table:table-cell table:style-name="ce2" office:value-type="float" office:value="88.6263048649" calcext:value-type="float">
            <text:p>88.63</text:p>
          </table:table-cell>
          <table:table-cell table:style-name="ce2" table:formula="of:=[.X9]-[.Y9]" office:value-type="float" office:value="265.1346528531" calcext:value-type="float">
            <text:p>265.13</text:p>
          </table:table-cell>
        </table:table-row>
        <table:table-row table:style-name="ro1">
          <table:table-cell/>
          <table:table-cell table:style-name="ce2" office:value-type="float" office:value="374.941551447" calcext:value-type="float">
            <text:p>374.94</text:p>
          </table:table-cell>
          <table:table-cell table:style-name="ce2" office:value-type="float" office:value="85.9570860863" calcext:value-type="float">
            <text:p>85.96</text:p>
          </table:table-cell>
          <table:table-cell table:style-name="ce2" table:formula="of:=[.B10]-[.C10]" office:value-type="float" office:value="288.9844653607" calcext:value-type="float">
            <text:p>288.98</text:p>
          </table:table-cell>
          <table:table-cell table:style-name="ce2"/>
          <table:table-cell table:style-name="ce2" office:value-type="float" office:value="966.268576622" calcext:value-type="float">
            <text:p>966.27</text:p>
          </table:table-cell>
          <table:table-cell table:style-name="ce2" office:value-type="float" office:value="83.0174088478" calcext:value-type="float">
            <text:p>83.02</text:p>
          </table:table-cell>
          <table:table-cell table:style-name="ce2" table:formula="of:=[.F10]-[.G10]" office:value-type="float" office:value="883.2511677742" calcext:value-type="float">
            <text:p>883.25</text:p>
          </table:table-cell>
          <table:table-cell table:number-columns-repeated="2"/>
          <table:table-cell table:style-name="ce2" office:value-type="float" office:value="277.392449856" calcext:value-type="float">
            <office:annotation draw:style-name="gr1" draw:text-style-name="P2" svg:width="82.18pt" svg:height="50.49pt" svg:x="936pt" svg:y="72.68pt" draw:caption-point-x="-17.29pt" draw:caption-point-y="42.8pt">
              <dc:date>2018-04-09T00:00:00</dc:date>
              <text:p text:style-name="P1"><text:span text:style-name="T1">Was turning half of the time (costmap clearance)</text:span></text:p>
            </office:annotation>
            <text:p>277.39</text:p>
          </table:table-cell>
          <table:table-cell table:style-name="ce2" office:value-type="float" office:value="58.3579318523" calcext:value-type="float">
            <text:p>58.36</text:p>
          </table:table-cell>
          <table:table-cell table:style-name="ce2" table:formula="of:=[.K10]-[.L10]" office:value-type="float" office:value="219.0345180037" calcext:value-type="float">
            <text:p>219.03</text:p>
          </table:table-cell>
          <table:table-cell table:style-name="ce2"/>
          <table:table-cell table:style-name="ce2" office:value-type="float" office:value="172.832864046" calcext:value-type="float">
            <text:p>172.83</text:p>
          </table:table-cell>
          <table:table-cell table:style-name="ce2" office:value-type="float" office:value="80.076274395" calcext:value-type="float">
            <text:p>80.08</text:p>
          </table:table-cell>
          <table:table-cell table:style-name="ce2" table:formula="of:=[.O10]-[.P10]" office:value-type="float" office:value="92.756589651" calcext:value-type="float">
            <text:p>92.76</text:p>
          </table:table-cell>
          <table:table-cell table:number-columns-repeated="2"/>
          <table:table-cell table:style-name="ce2" office:value-type="float" office:value="362.75027585" calcext:value-type="float">
            <text:p>362.75</text:p>
          </table:table-cell>
          <table:table-cell table:style-name="ce2" office:value-type="float" office:value="97.4348564148" calcext:value-type="float">
            <text:p>97.43</text:p>
          </table:table-cell>
          <table:table-cell table:style-name="ce2" table:formula="of:=[.T10]-[.U10]" office:value-type="float" office:value="265.3154194352" calcext:value-type="float">
            <text:p>265.32</text:p>
          </table:table-cell>
          <table:table-cell table:style-name="ce2"/>
          <table:table-cell table:style-name="ce2" office:value-type="float" office:value="939.669893742" calcext:value-type="float">
            <text:p>939.67</text:p>
          </table:table-cell>
          <table:table-cell table:style-name="ce2" office:value-type="float" office:value="225.052073002" calcext:value-type="float">
            <text:p>225.05</text:p>
          </table:table-cell>
          <table:table-cell table:style-name="ce2" table:formula="of:=[.X10]-[.Y10]" office:value-type="float" office:value="714.61782074" calcext:value-type="float">
            <text:p>714.62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6:.B10])" office:value-type="float" office:value="266.1628932" calcext:value-type="float">
            <text:p>266.16</text:p>
          </table:table-cell>
          <table:table-cell table:style-name="ce3" table:formula="of:=AVERAGE([.C6:.C10])" office:value-type="float" office:value="92.48210701946" calcext:value-type="float">
            <text:p>92.48</text:p>
          </table:table-cell>
          <table:table-cell table:style-name="ce3" table:formula="of:=AVERAGE([.D6:.D10])" office:value-type="float" office:value="173.68078618054" calcext:value-type="float">
            <text:p>173.68</text:p>
          </table:table-cell>
          <table:table-cell table:style-name="ce3"/>
          <table:table-cell table:style-name="ce3" table:formula="of:=AVERAGE([.F6:.F10])" office:value-type="float" office:value="531.0130234718" calcext:value-type="float">
            <text:p>531.01</text:p>
          </table:table-cell>
          <table:table-cell table:style-name="ce3" table:formula="of:=AVERAGE([.G6:.G10])" office:value-type="float" office:value="77.51694526672" calcext:value-type="float">
            <text:p>77.52</text:p>
          </table:table-cell>
          <table:table-cell table:style-name="ce3" table:formula="of:=AVERAGE([.H6:.H10])" office:value-type="float" office:value="453.49607820508" calcext:value-type="float">
            <text:p>453.50</text:p>
          </table:table-cell>
          <table:table-cell table:number-columns-repeated="2"/>
          <table:table-cell table:style-name="ce3" table:formula="of:=AVERAGE([.K6:.K10])" office:value-type="float" office:value="162.7547261716" calcext:value-type="float">
            <text:p>162.75</text:p>
          </table:table-cell>
          <table:table-cell table:style-name="ce3" table:formula="of:=AVERAGE([.L6:.L10])" office:value-type="float" office:value="70.26406755448" calcext:value-type="float">
            <text:p>70.26</text:p>
          </table:table-cell>
          <table:table-cell table:style-name="ce3" table:formula="of:=AVERAGE([.M6:.M10])" office:value-type="float" office:value="92.49065861712" calcext:value-type="float">
            <text:p>92.49</text:p>
          </table:table-cell>
          <table:table-cell table:style-name="ce3"/>
          <table:table-cell table:style-name="ce3" table:formula="of:=AVERAGE([.O6:.O10])" office:value-type="float" office:value="355.7123970986" calcext:value-type="float">
            <text:p>355.71</text:p>
          </table:table-cell>
          <table:table-cell table:style-name="ce3" table:formula="of:=AVERAGE([.P6:.P10])" office:value-type="float" office:value="92.7626702309" calcext:value-type="float">
            <text:p>92.76</text:p>
          </table:table-cell>
          <table:table-cell table:style-name="ce3" table:formula="of:=AVERAGE([.Q6:.Q10])" office:value-type="float" office:value="262.9497268677" calcext:value-type="float">
            <text:p>262.95</text:p>
          </table:table-cell>
          <table:table-cell table:number-columns-repeated="2"/>
          <table:table-cell table:style-name="ce3" table:formula="of:=AVERAGE([.T6:.T10])" office:value-type="float" office:value="462.870468521" calcext:value-type="float">
            <text:p>462.87</text:p>
          </table:table-cell>
          <table:table-cell table:style-name="ce3" table:formula="of:=AVERAGE([.U6:.U10])" office:value-type="float" office:value="111.87942962642" calcext:value-type="float">
            <text:p>111.88</text:p>
          </table:table-cell>
          <table:table-cell table:style-name="ce3" table:formula="of:=AVERAGE([.V6:.V10])" office:value-type="float" office:value="350.99103889458" calcext:value-type="float">
            <text:p>350.99</text:p>
          </table:table-cell>
          <table:table-cell table:style-name="ce3"/>
          <table:table-cell table:style-name="ce3" table:formula="of:=AVERAGE([.X6:.X10])" office:value-type="float" office:value="625.440422249" calcext:value-type="float">
            <text:p>625.44</text:p>
          </table:table-cell>
          <table:table-cell table:style-name="ce3" table:formula="of:=AVERAGE([.Y6:.Y10])" office:value-type="float" office:value="110.28790163996" calcext:value-type="float">
            <text:p>110.29</text:p>
          </table:table-cell>
          <table:table-cell table:style-name="ce3" table:formula="of:=AVERAGE([.Z6:.Z10])" office:value-type="float" office:value="515.15252060904" calcext:value-type="float">
            <text:p>515.15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Path</text:p>
          </table:table-cell>
          <table:table-cell table:number-columns-repeated="8"/>
          <table:table-cell office:value-type="string" calcext:value-type="string">
            <text:p>Remote on KitchenTable,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9.17591400075" calcext:value-type="float">
            <text:p>9.18</text:p>
          </table:table-cell>
          <table:table-cell table:style-name="ce2" office:value-type="float" office:value="7.01476564022" calcext:value-type="float">
            <text:p>7.01</text:p>
          </table:table-cell>
          <table:table-cell table:style-name="ce2" table:formula="of:=[.B19]-[.C19]" office:value-type="float" office:value="2.16114836053" calcext:value-type="float">
            <text:p>2.16</text:p>
          </table:table-cell>
          <table:table-cell table:style-name="ce2"/>
          <table:table-cell table:style-name="ce2" office:value-type="float" office:value="8.44983318724" calcext:value-type="float">
            <text:p>8.45</text:p>
          </table:table-cell>
          <table:table-cell table:style-name="ce2" office:value-type="float" office:value="5.8648301269" calcext:value-type="float">
            <text:p>5.86</text:p>
          </table:table-cell>
          <table:table-cell table:style-name="ce2" table:formula="of:=[.F19]-[.G19]" office:value-type="float" office:value="2.58500306034" calcext:value-type="float">
            <text:p>2.59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5.1145863788" calcext:value-type="float">
            <text:p>15.11</text:p>
          </table:table-cell>
          <table:table-cell table:style-name="ce2" office:value-type="float" office:value="6.48887451129" calcext:value-type="float">
            <text:p>6.49</text:p>
          </table:table-cell>
          <table:table-cell table:style-name="ce2" table:formula="of:=[.B20]-[.C20]" office:value-type="float" office:value="8.62571186751" calcext:value-type="float">
            <text:p>8.63</text:p>
          </table:table-cell>
          <table:table-cell table:style-name="ce2"/>
          <table:table-cell table:style-name="ce2" office:value-type="float" office:value="32.9920591163" calcext:value-type="float">
            <text:p>32.99</text:p>
          </table:table-cell>
          <table:table-cell table:style-name="ce2" office:value-type="float" office:value="7.1790986332" calcext:value-type="float">
            <text:p>7.18</text:p>
          </table:table-cell>
          <table:table-cell table:style-name="ce2" table:formula="of:=[.F20]-[.G20]" office:value-type="float" office:value="25.8129604831" calcext:value-type="float">
            <text:p>25.81</text:p>
          </table:table-cell>
          <table:table-cell table:number-columns-repeated="2"/>
          <table:table-cell table:style-name="ce2" office:value-type="float" office:value="8.34350925411" calcext:value-type="float">
            <text:p>8.34</text:p>
          </table:table-cell>
          <table:table-cell table:style-name="ce2" office:value-type="float" office:value="5.74223779388" calcext:value-type="float">
            <text:p>5.74</text:p>
          </table:table-cell>
          <table:table-cell table:style-name="ce2" table:formula="of:=[.K20]-[.L20]" office:value-type="float" office:value="2.60127146023" calcext:value-type="float">
            <text:p>2.60</text:p>
          </table:table-cell>
          <table:table-cell table:style-name="ce2"/>
          <table:table-cell table:style-name="ce2" office:value-type="float" office:value="13.6534587347" calcext:value-type="float">
            <text:p>13.65</text:p>
          </table:table-cell>
          <table:table-cell table:style-name="ce2" office:value-type="float" office:value="7.1710440226" calcext:value-type="float">
            <text:p>7.17</text:p>
          </table:table-cell>
          <table:table-cell table:style-name="ce2" table:formula="of:=[.O20]-[.P20]" office:value-type="float" office:value="6.4824147121" calcext:value-type="float">
            <text:p>6.48</text:p>
          </table:table-cell>
          <table:table-cell table:number-columns-repeated="2"/>
          <table:table-cell table:style-name="ce2" office:value-type="float" office:value="24.8680307465" calcext:value-type="float">
            <text:p>24.87</text:p>
          </table:table-cell>
          <table:table-cell table:style-name="ce2" office:value-type="float" office:value="6.64855261193" calcext:value-type="float">
            <text:p>6.65</text:p>
          </table:table-cell>
          <table:table-cell table:style-name="ce2" table:formula="of:=[.T20]-[.U20]" office:value-type="float" office:value="18.21947813457" calcext:value-type="float">
            <text:p>18.22</text:p>
          </table:table-cell>
          <table:table-cell table:style-name="ce2"/>
          <table:table-cell table:style-name="ce2" office:value-type="float" office:value="25.6387306494" calcext:value-type="float">
            <text:p>25.64</text:p>
          </table:table-cell>
          <table:table-cell table:style-name="ce2" office:value-type="float" office:value="7.93397608034" calcext:value-type="float">
            <text:p>7.93</text:p>
          </table:table-cell>
          <table:table-cell table:style-name="ce2" table:formula="of:=[.X20]-[.Y20]" office:value-type="float" office:value="17.70475456906" calcext:value-type="float">
            <text:p>17.70</text:p>
          </table:table-cell>
        </table:table-row>
        <table:table-row table:style-name="ro1">
          <table:table-cell/>
          <table:table-cell table:style-name="ce2" office:value-type="float" office:value="14.3831111313" calcext:value-type="float">
            <text:p>14.38</text:p>
          </table:table-cell>
          <table:table-cell table:style-name="ce2" office:value-type="float" office:value="7.33319541068" calcext:value-type="float">
            <text:p>7.33</text:p>
          </table:table-cell>
          <table:table-cell table:style-name="ce2" table:formula="of:=[.B21]-[.C21]" office:value-type="float" office:value="7.04991572062" calcext:value-type="float">
            <text:p>7.05</text:p>
          </table:table-cell>
          <table:table-cell table:style-name="ce2"/>
          <table:table-cell table:style-name="ce2" office:value-type="float" office:value="8.66017412066" calcext:value-type="float">
            <text:p>8.66</text:p>
          </table:table-cell>
          <table:table-cell table:style-name="ce2" office:value-type="float" office:value="6.98917906963" calcext:value-type="float">
            <text:p>6.99</text:p>
          </table:table-cell>
          <table:table-cell table:style-name="ce2" table:formula="of:=[.F21]-[.G21]" office:value-type="float" office:value="1.67099505103" calcext:value-type="float">
            <text:p>1.67</text:p>
          </table:table-cell>
          <table:table-cell table:number-columns-repeated="2"/>
          <table:table-cell table:style-name="ce2" office:value-type="float" office:value="11.1093388011" calcext:value-type="float">
            <text:p>11.11</text:p>
          </table:table-cell>
          <table:table-cell table:style-name="ce2" office:value-type="float" office:value="6.82405936359" calcext:value-type="float">
            <text:p>6.82</text:p>
          </table:table-cell>
          <table:table-cell table:style-name="ce2" table:formula="of:=[.K21]-[.L21]" office:value-type="float" office:value="4.28527943751" calcext:value-type="float">
            <text:p>4.29</text:p>
          </table:table-cell>
          <table:table-cell table:style-name="ce2"/>
          <table:table-cell table:style-name="ce2" office:value-type="float" office:value="18.9286186193" calcext:value-type="float">
            <text:p>18.93</text:p>
          </table:table-cell>
          <table:table-cell table:style-name="ce2" office:value-type="float" office:value="6.91914019608" calcext:value-type="float">
            <text:p>6.92</text:p>
          </table:table-cell>
          <table:table-cell table:style-name="ce2" table:formula="of:=[.O21]-[.P21]" office:value-type="float" office:value="12.00947842322" calcext:value-type="float">
            <text:p>12.01</text:p>
          </table:table-cell>
          <table:table-cell table:number-columns-repeated="2"/>
          <table:table-cell table:style-name="ce2" office:value-type="float" office:value="19.5945768496" calcext:value-type="float">
            <text:p>19.59</text:p>
          </table:table-cell>
          <table:table-cell table:style-name="ce2" office:value-type="float" office:value="6.13151621893" calcext:value-type="float">
            <text:p>6.13</text:p>
          </table:table-cell>
          <table:table-cell table:style-name="ce2" table:formula="of:=[.T21]-[.U21]" office:value-type="float" office:value="13.46306063067" calcext:value-type="float">
            <text:p>13.46</text:p>
          </table:table-cell>
          <table:table-cell table:style-name="ce2"/>
          <table:table-cell table:style-name="ce2" office:value-type="float" office:value="38.5690868089" calcext:value-type="float">
            <text:p>38.57</text:p>
          </table:table-cell>
          <table:table-cell table:style-name="ce2" office:value-type="float" office:value="5.77973492331" calcext:value-type="float">
            <text:p>5.78</text:p>
          </table:table-cell>
          <table:table-cell table:style-name="ce2" table:formula="of:=[.X21]-[.Y21]" office:value-type="float" office:value="32.78935188559" calcext:value-type="float">
            <text:p>32.79</text:p>
          </table:table-cell>
        </table:table-row>
        <table:table-row table:style-name="ro1">
          <table:table-cell/>
          <table:table-cell table:style-name="ce2" office:value-type="float" office:value="5.47550647171" calcext:value-type="float">
            <text:p>5.48</text:p>
          </table:table-cell>
          <table:table-cell table:style-name="ce2" office:value-type="float" office:value="4.05412606815" calcext:value-type="float">
            <text:p>4.05</text:p>
          </table:table-cell>
          <table:table-cell table:style-name="ce2" table:formula="of:=[.B22]-[.C22]" office:value-type="float" office:value="1.42138040356" calcext:value-type="float">
            <text:p>1.42</text:p>
          </table:table-cell>
          <table:table-cell table:style-name="ce2"/>
          <table:table-cell table:style-name="ce2" office:value-type="float" office:value="46.952306282" calcext:value-type="float">
            <text:p>46.95</text:p>
          </table:table-cell>
          <table:table-cell table:style-name="ce2" office:value-type="float" office:value="6.36701513094" calcext:value-type="float">
            <text:p>6.37</text:p>
          </table:table-cell>
          <table:table-cell table:style-name="ce2" table:formula="of:=[.F22]-[.G22]" office:value-type="float" office:value="40.58529115106" calcext:value-type="float">
            <text:p>40.59</text:p>
          </table:table-cell>
          <table:table-cell table:number-columns-repeated="2"/>
          <table:table-cell table:style-name="ce2" office:value-type="float" office:value="8.36658855041" calcext:value-type="float">
            <text:p>8.37</text:p>
          </table:table-cell>
          <table:table-cell table:style-name="ce2" office:value-type="float" office:value="6.08700792374" calcext:value-type="float">
            <text:p>6.09</text:p>
          </table:table-cell>
          <table:table-cell table:style-name="ce2" table:formula="of:=[.K22]-[.L22]" office:value-type="float" office:value="2.27958062667" calcext:value-type="float">
            <text:p>2.28</text:p>
          </table:table-cell>
          <table:table-cell table:style-name="ce2"/>
          <table:table-cell table:style-name="ce2" office:value-type="float" office:value="29.6828061196" calcext:value-type="float">
            <text:p>29.68</text:p>
          </table:table-cell>
          <table:table-cell table:style-name="ce2" office:value-type="float" office:value="8.98152174672" calcext:value-type="float">
            <text:p>8.98</text:p>
          </table:table-cell>
          <table:table-cell table:style-name="ce2" table:formula="of:=[.O22]-[.P22]" office:value-type="float" office:value="20.70128437288" calcext:value-type="float">
            <text:p>20.70</text:p>
          </table:table-cell>
          <table:table-cell table:number-columns-repeated="2"/>
          <table:table-cell table:style-name="ce2" office:value-type="float" office:value="20.3705021836" calcext:value-type="float">
            <text:p>20.37</text:p>
          </table:table-cell>
          <table:table-cell table:style-name="ce2" office:value-type="float" office:value="3.76784267449" calcext:value-type="float">
            <text:p>3.77</text:p>
          </table:table-cell>
          <table:table-cell table:style-name="ce2" table:formula="of:=[.T22]-[.U22]" office:value-type="float" office:value="16.60265950911" calcext:value-type="float">
            <text:p>16.60</text:p>
          </table:table-cell>
          <table:table-cell table:style-name="ce2"/>
          <table:table-cell table:style-name="ce2" office:value-type="float" office:value="25.6548830724" calcext:value-type="float">
            <text:p>25.65</text:p>
          </table:table-cell>
          <table:table-cell table:style-name="ce2" office:value-type="float" office:value="4.99043668563" calcext:value-type="float">
            <text:p>4.99</text:p>
          </table:table-cell>
          <table:table-cell table:style-name="ce2" table:formula="of:=[.X22]-[.Y22]" office:value-type="float" office:value="20.66444638677" calcext:value-type="float">
            <text:p>20.66</text:p>
          </table:table-cell>
        </table:table-row>
        <table:table-row table:style-name="ro1">
          <table:table-cell/>
          <table:table-cell table:style-name="ce2" office:value-type="float" office:value="19.0068480382" calcext:value-type="float">
            <text:p>19.01</text:p>
          </table:table-cell>
          <table:table-cell table:style-name="ce2" office:value-type="float" office:value="8.55068776034" calcext:value-type="float">
            <text:p>8.55</text:p>
          </table:table-cell>
          <table:table-cell table:style-name="ce2" table:formula="of:=[.B23]-[.C23]" office:value-type="float" office:value="10.45616027786" calcext:value-type="float">
            <text:p>10.46</text:p>
          </table:table-cell>
          <table:table-cell table:style-name="ce2"/>
          <table:table-cell table:style-name="ce2" office:value-type="float" office:value="53.2613641221" calcext:value-type="float">
            <text:p>53.26</text:p>
          </table:table-cell>
          <table:table-cell table:style-name="ce2" office:value-type="float" office:value="5.81856285337" calcext:value-type="float">
            <text:p>5.82</text:p>
          </table:table-cell>
          <table:table-cell table:style-name="ce2" table:formula="of:=[.F23]-[.G23]" office:value-type="float" office:value="47.44280126873" calcext:value-type="float">
            <text:p>47.44</text:p>
          </table:table-cell>
          <table:table-cell table:number-columns-repeated="2"/>
          <table:table-cell table:style-name="ce2" office:value-type="float" office:value="11.7526418414" calcext:value-type="float">
            <text:p>11.75</text:p>
          </table:table-cell>
          <table:table-cell table:style-name="ce2" office:value-type="float" office:value="4.75004220388" calcext:value-type="float">
            <text:p>4.75</text:p>
          </table:table-cell>
          <table:table-cell table:style-name="ce2" table:formula="of:=[.K23]-[.L23]" office:value-type="float" office:value="7.00259963752" calcext:value-type="float">
            <text:p>7.00</text:p>
          </table:table-cell>
          <table:table-cell table:style-name="ce2"/>
          <table:table-cell table:style-name="ce2" office:value-type="float" office:value="14.55007018" calcext:value-type="float">
            <text:p>14.55</text:p>
          </table:table-cell>
          <table:table-cell table:style-name="ce2" office:value-type="float" office:value="4.98845842471" calcext:value-type="float">
            <text:p>4.99</text:p>
          </table:table-cell>
          <table:table-cell table:style-name="ce2" table:formula="of:=[.O23]-[.P23]" office:value-type="float" office:value="9.56161175529" calcext:value-type="float">
            <text:p>9.56</text:p>
          </table:table-cell>
          <table:table-cell table:number-columns-repeated="2"/>
          <table:table-cell table:style-name="ce2" office:value-type="float" office:value="26.7939738166" calcext:value-type="float">
            <text:p>26.79</text:p>
          </table:table-cell>
          <table:table-cell table:style-name="ce2" office:value-type="float" office:value="6.87104768793" calcext:value-type="float">
            <text:p>6.87</text:p>
          </table:table-cell>
          <table:table-cell table:style-name="ce2" table:formula="of:=[.T23]-[.U23]" office:value-type="float" office:value="19.92292612867" calcext:value-type="float">
            <text:p>19.92</text:p>
          </table:table-cell>
          <table:table-cell table:style-name="ce2"/>
          <table:table-cell table:style-name="ce2" office:value-type="float" office:value="20.8873423727" calcext:value-type="float">
            <text:p>20.89</text:p>
          </table:table-cell>
          <table:table-cell table:style-name="ce2" office:value-type="float" office:value="8.72368303756" calcext:value-type="float">
            <text:p>8.72</text:p>
          </table:table-cell>
          <table:table-cell table:style-name="ce2" table:formula="of:=[.X23]-[.Y23]" office:value-type="float" office:value="12.16365933514" calcext:value-type="float">
            <text:p>12.16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19:.B23])" office:value-type="float" office:value="12.631193204152" calcext:value-type="float">
            <text:p>12.63</text:p>
          </table:table-cell>
          <table:table-cell table:style-name="ce3" table:formula="of:=AVERAGE([.C19:.C23])" office:value-type="float" office:value="6.688329878136" calcext:value-type="float">
            <text:p>6.69</text:p>
          </table:table-cell>
          <table:table-cell table:style-name="ce3" table:formula="of:=AVERAGE([.D19:.D23])" office:value-type="float" office:value="5.942863326016" calcext:value-type="float">
            <text:p>5.94</text:p>
          </table:table-cell>
          <table:table-cell table:style-name="ce3"/>
          <table:table-cell table:style-name="ce3" table:formula="of:=AVERAGE([.F19:.F23])" office:value-type="float" office:value="30.06314736566" calcext:value-type="float">
            <text:p>30.06</text:p>
          </table:table-cell>
          <table:table-cell table:style-name="ce3" table:formula="of:=AVERAGE([.G19:.G23])" office:value-type="float" office:value="6.443737162808" calcext:value-type="float">
            <text:p>6.44</text:p>
          </table:table-cell>
          <table:table-cell table:style-name="ce3" table:formula="of:=AVERAGE([.H19:.H23])" office:value-type="float" office:value="23.619410202852" calcext:value-type="float">
            <text:p>23.62</text:p>
          </table:table-cell>
          <table:table-cell table:number-columns-repeated="2"/>
          <table:table-cell table:style-name="ce2" office:value-type="float" office:value="9.6394934685" calcext:value-type="float">
            <text:p>9.64</text:p>
          </table:table-cell>
          <table:table-cell table:style-name="ce2" office:value-type="float" office:value="4.6360224369" calcext:value-type="float">
            <text:p>4.64</text:p>
          </table:table-cell>
          <table:table-cell table:style-name="ce2" table:formula="of:=[.K24]-[.L24]" office:value-type="float" office:value="5.0034710316" calcext:value-type="float">
            <text:p>5.00</text:p>
          </table:table-cell>
          <table:table-cell table:style-name="ce2"/>
          <table:table-cell table:style-name="ce2" office:value-type="float" office:value="11.7097121667" calcext:value-type="float">
            <text:p>11.71</text:p>
          </table:table-cell>
          <table:table-cell table:style-name="ce2" office:value-type="float" office:value="7.46832760582" calcext:value-type="float">
            <text:p>7.47</text:p>
          </table:table-cell>
          <table:table-cell table:style-name="ce2" table:formula="of:=[.O24]-[.P24]" office:value-type="float" office:value="4.24138456088" calcext:value-type="float">
            <text:p>4.24</text:p>
          </table:table-cell>
          <table:table-cell table:number-columns-repeated="2"/>
          <table:table-cell table:style-name="ce2" office:value-type="float" office:value="14.8839112498" calcext:value-type="float">
            <text:p>14.88</text:p>
          </table:table-cell>
          <table:table-cell table:style-name="ce2" office:value-type="float" office:value="6.40722926927" calcext:value-type="float">
            <text:p>6.41</text:p>
          </table:table-cell>
          <table:table-cell table:style-name="ce2" table:formula="of:=[.T24]-[.U24]" office:value-type="float" office:value="8.47668198053" calcext:value-type="float">
            <text:p>8.48</text:p>
          </table:table-cell>
          <table:table-cell table:style-name="ce2"/>
          <table:table-cell table:style-name="ce2" office:value-type="float" office:value="47.5531648585" calcext:value-type="float">
            <text:p>47.55</text:p>
          </table:table-cell>
          <table:table-cell table:style-name="ce2" office:value-type="float" office:value="8.05721107133" calcext:value-type="float">
            <text:p>8.06</text:p>
          </table:table-cell>
          <table:table-cell table:style-name="ce2" table:formula="of:=[.X24]-[.Y24]" office:value-type="float" office:value="39.49595378717" calcext:value-type="float">
            <text:p>39.50</text:p>
          </table:table-cell>
        </table:table-row>
        <table:table-row table:style-name="ro1">
          <table:table-cell table:number-columns-repeated="10"/>
          <table:table-cell table:style-name="ce3" table:formula="of:=AVERAGE([.K20:.K24])" office:value-type="float" office:value="9.842314383104" calcext:value-type="float">
            <text:p>9.84</text:p>
          </table:table-cell>
          <table:table-cell table:style-name="ce3" table:formula="of:=AVERAGE([.L20:.L24])" office:value-type="float" office:value="5.607873944398" calcext:value-type="float">
            <text:p>5.61</text:p>
          </table:table-cell>
          <table:table-cell table:style-name="ce3" table:formula="of:=AVERAGE([.M20:.M24])" office:value-type="float" office:value="4.234440438706" calcext:value-type="float">
            <text:p>4.23</text:p>
          </table:table-cell>
          <table:table-cell table:style-name="ce3"/>
          <table:table-cell table:style-name="ce3" table:formula="of:=AVERAGE([.O20:.O24])" office:value-type="float" office:value="17.70493316406" calcext:value-type="float">
            <text:p>17.70</text:p>
          </table:table-cell>
          <table:table-cell table:style-name="ce3" table:formula="of:=AVERAGE([.P20:.P24])" office:value-type="float" office:value="7.105698399186" calcext:value-type="float">
            <text:p>7.11</text:p>
          </table:table-cell>
          <table:table-cell table:style-name="ce3" table:formula="of:=AVERAGE([.Q20:.Q24])" office:value-type="float" office:value="10.599234764874" calcext:value-type="float">
            <text:p>10.60</text:p>
          </table:table-cell>
          <table:table-cell table:number-columns-repeated="2"/>
          <table:table-cell table:style-name="ce3" table:formula="of:=AVERAGE([.T20:.T24])" office:value-type="float" office:value="21.30219896922" calcext:value-type="float">
            <text:p>21.30</text:p>
          </table:table-cell>
          <table:table-cell table:style-name="ce3" table:formula="of:=AVERAGE([.U20:.U24])" office:value-type="float" office:value="5.96523769251" calcext:value-type="float">
            <text:p>5.97</text:p>
          </table:table-cell>
          <table:table-cell table:style-name="ce3" table:formula="of:=AVERAGE([.V20:.V24])" office:value-type="float" office:value="15.33696127671" calcext:value-type="float">
            <text:p>15.34</text:p>
          </table:table-cell>
          <table:table-cell table:style-name="ce3"/>
          <table:table-cell table:style-name="ce3" table:formula="of:=AVERAGE([.X20:.X24])" office:value-type="float" office:value="31.66064155238" calcext:value-type="float">
            <text:p>31.66</text:p>
          </table:table-cell>
          <table:table-cell table:style-name="ce3" table:formula="of:=AVERAGE([.Y20:.Y24])" office:value-type="float" office:value="7.097008359634" calcext:value-type="float">
            <text:p>7.10</text:p>
          </table:table-cell>
          <table:table-cell table:style-name="ce3" table:formula="of:=AVERAGE([.Z20:.Z24])" office:value-type="float" office:value="24.563633192746" calcext:value-type="float">
            <text:p>24.5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poon on Table, Angle Pat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3"/>
          <table:table-cell office:value-type="string" calcext:value-type="string">
            <text:p>Remote on CouchTable, Angle Path</text:p>
          </table:table-cell>
          <table:table-cell table:number-columns-repeated="8"/>
          <table:table-cell office:value-type="string" calcext:value-type="string">
            <text:p>Remote on KitchenTable, Angle 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4"/>
          <table:table-cell office:value-type="string" calcext:value-type="string">
            <text:p>informed</text:p>
          </table:table-cell>
          <table:table-cell table:number-columns-repeated="3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float" office:value="460.383424238" calcext:value-type="float">
            <text:p>460.38</text:p>
          </table:table-cell>
          <table:table-cell table:style-name="ce2" office:value-type="float" office:value="193.621728097" calcext:value-type="float">
            <text:p>193.62</text:p>
          </table:table-cell>
          <table:table-cell table:style-name="ce2" table:formula="of:=[.B33]-[.C33]" office:value-type="float" office:value="266.761696141" calcext:value-type="float">
            <text:p>266.76</text:p>
          </table:table-cell>
          <table:table-cell table:style-name="ce2"/>
          <table:table-cell table:style-name="ce2" office:value-type="float" office:value="634.731752027" calcext:value-type="float">
            <text:p>634.73</text:p>
          </table:table-cell>
          <table:table-cell table:style-name="ce2" office:value-type="float" office:value="205.507572715" calcext:value-type="float">
            <text:p>205.51</text:p>
          </table:table-cell>
          <table:table-cell table:style-name="ce2" table:formula="of:=[.F33]-[.G33]" office:value-type="float" office:value="429.224179312" calcext:value-type="float">
            <text:p>429.22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  <table:table-cell table:number-columns-repeated="2"/>
          <table:table-cell office:value-type="string" calcext:value-type="string">
            <text:p>with explore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without explore</text:p>
          </table:table-cell>
          <table:table-cell/>
          <table:table-cell office:value-type="string" calcext:value-type="string">
            <text:p>with explore</text:p>
          </table:table-cell>
          <table:table-cell/>
          <table:table-cell office:value-type="string" calcext:value-type="string">
            <text:p>without explore</text:p>
          </table:table-cell>
        </table:table-row>
        <table:table-row table:style-name="ro1">
          <table:table-cell/>
          <table:table-cell table:style-name="ce2" office:value-type="float" office:value="1225.14776544" calcext:value-type="float">
            <text:p>1225.15</text:p>
          </table:table-cell>
          <table:table-cell table:style-name="ce2" office:value-type="float" office:value="239.739869973" calcext:value-type="float">
            <text:p>239.74</text:p>
          </table:table-cell>
          <table:table-cell table:style-name="ce2" table:formula="of:=[.B34]-[.C34]" office:value-type="float" office:value="985.407895467" calcext:value-type="float">
            <text:p>985.41</text:p>
          </table:table-cell>
          <table:table-cell table:style-name="ce2"/>
          <table:table-cell table:style-name="ce2" office:value-type="float" office:value="2132.0158316" calcext:value-type="float">
            <text:p>2132.02</text:p>
          </table:table-cell>
          <table:table-cell table:style-name="ce2" office:value-type="float" office:value="227.343817104" calcext:value-type="float">
            <text:p>227.34</text:p>
          </table:table-cell>
          <table:table-cell table:style-name="ce2" table:formula="of:=[.F34]-[.G34]" office:value-type="float" office:value="1904.672014496" calcext:value-type="float">
            <text:p>1904.67</text:p>
          </table:table-cell>
          <table:table-cell table:number-columns-repeated="2"/>
          <table:table-cell table:style-name="ce2" office:value-type="float" office:value="256.723166708" calcext:value-type="float">
            <text:p>256.72</text:p>
          </table:table-cell>
          <table:table-cell table:style-name="ce2" office:value-type="float" office:value="218.320782764" calcext:value-type="float">
            <text:p>218.32</text:p>
          </table:table-cell>
          <table:table-cell table:style-name="ce2" table:formula="of:=[.K34]-[.L34]" office:value-type="float" office:value="38.402383944" calcext:value-type="float">
            <text:p>38.40</text:p>
          </table:table-cell>
          <table:table-cell table:style-name="ce2"/>
          <table:table-cell table:style-name="ce2" office:value-type="float" office:value="734.418690489" calcext:value-type="float">
            <text:p>734.42</text:p>
          </table:table-cell>
          <table:table-cell table:style-name="ce2" office:value-type="float" office:value="242.559389342" calcext:value-type="float">
            <text:p>242.56</text:p>
          </table:table-cell>
          <table:table-cell table:style-name="ce2" table:formula="of:=[.O34]-[.P34]" office:value-type="float" office:value="491.859301147" calcext:value-type="float">
            <text:p>491.86</text:p>
          </table:table-cell>
          <table:table-cell table:number-columns-repeated="2"/>
          <table:table-cell table:style-name="ce2" office:value-type="float" office:value="1552.81302562" calcext:value-type="float">
            <text:p>1552.81</text:p>
          </table:table-cell>
          <table:table-cell table:style-name="ce2" office:value-type="float" office:value="373.66760746" calcext:value-type="float">
            <text:p>373.67</text:p>
          </table:table-cell>
          <table:table-cell table:style-name="ce2" table:formula="of:=[.T34]-[.U34]" office:value-type="float" office:value="1179.14541816" calcext:value-type="float">
            <text:p>1179.15</text:p>
          </table:table-cell>
          <table:table-cell table:style-name="ce2"/>
          <table:table-cell table:style-name="ce2" office:value-type="float" office:value="1292.17295464" calcext:value-type="float">
            <text:p>1292.17</text:p>
          </table:table-cell>
          <table:table-cell table:style-name="ce2" office:value-type="float" office:value="212.441345305" calcext:value-type="float">
            <text:p>212.44</text:p>
          </table:table-cell>
          <table:table-cell table:style-name="ce2" table:formula="of:=[.X34]-[.Y34]" office:value-type="float" office:value="1079.731609335" calcext:value-type="float">
            <text:p>1079.73</text:p>
          </table:table-cell>
        </table:table-row>
        <table:table-row table:style-name="ro1">
          <table:table-cell/>
          <table:table-cell table:style-name="ce2" office:value-type="float" office:value="796.640380385" calcext:value-type="float">
            <text:p>796.64</text:p>
          </table:table-cell>
          <table:table-cell table:style-name="ce2" office:value-type="float" office:value="220.569022206" calcext:value-type="float">
            <text:p>220.57</text:p>
          </table:table-cell>
          <table:table-cell table:style-name="ce2" table:formula="of:=[.B35]-[.C35]" office:value-type="float" office:value="576.071358179" calcext:value-type="float">
            <text:p>576.07</text:p>
          </table:table-cell>
          <table:table-cell table:style-name="ce2"/>
          <table:table-cell table:style-name="ce2" office:value-type="float" office:value="466.864707755" calcext:value-type="float">
            <text:p>466.86</text:p>
          </table:table-cell>
          <table:table-cell table:style-name="ce2" office:value-type="float" office:value="227.585647347" calcext:value-type="float">
            <text:p>227.59</text:p>
          </table:table-cell>
          <table:table-cell table:style-name="ce2" table:formula="of:=[.F35]-[.G35]" office:value-type="float" office:value="239.279060408" calcext:value-type="float">
            <text:p>239.28</text:p>
          </table:table-cell>
          <table:table-cell table:number-columns-repeated="2"/>
          <table:table-cell table:style-name="ce2" office:value-type="float" office:value="579.813083417" calcext:value-type="float">
            <text:p>579.81</text:p>
          </table:table-cell>
          <table:table-cell table:style-name="ce2" office:value-type="float" office:value="226.040836862" calcext:value-type="float">
            <text:p>226.04</text:p>
          </table:table-cell>
          <table:table-cell table:style-name="ce2" table:formula="of:=[.K35]-[.L35]" office:value-type="float" office:value="353.772246555" calcext:value-type="float">
            <text:p>353.77</text:p>
          </table:table-cell>
          <table:table-cell table:style-name="ce2"/>
          <table:table-cell table:style-name="ce2" office:value-type="float" office:value="1627.91898137" calcext:value-type="float">
            <text:p>1627.92</text:p>
          </table:table-cell>
          <table:table-cell table:style-name="ce2" office:value-type="float" office:value="228.27430136" calcext:value-type="float">
            <text:p>228.27</text:p>
          </table:table-cell>
          <table:table-cell table:style-name="ce2" table:formula="of:=[.O35]-[.P35]" office:value-type="float" office:value="1399.64468001" calcext:value-type="float">
            <text:p>1399.64</text:p>
          </table:table-cell>
          <table:table-cell table:number-columns-repeated="2"/>
          <table:table-cell table:style-name="ce2" office:value-type="float" office:value="1328.46649989" calcext:value-type="float">
            <text:p>1328.47</text:p>
          </table:table-cell>
          <table:table-cell table:style-name="ce2" office:value-type="float" office:value="180.418455192" calcext:value-type="float">
            <text:p>180.42</text:p>
          </table:table-cell>
          <table:table-cell table:style-name="ce2" table:formula="of:=[.T35]-[.U35]" office:value-type="float" office:value="1148.048044698" calcext:value-type="float">
            <text:p>1148.05</text:p>
          </table:table-cell>
          <table:table-cell table:style-name="ce2"/>
          <table:table-cell table:style-name="ce2" office:value-type="float" office:value="2793.84008461" calcext:value-type="float">
            <text:p>2793.84</text:p>
          </table:table-cell>
          <table:table-cell table:style-name="ce2" office:value-type="float" office:value="250.867828913" calcext:value-type="float">
            <text:p>250.87</text:p>
          </table:table-cell>
          <table:table-cell table:style-name="ce2" table:formula="of:=[.X35]-[.Y35]" office:value-type="float" office:value="2542.972255697" calcext:value-type="float">
            <text:p>2542.97</text:p>
          </table:table-cell>
        </table:table-row>
        <table:table-row table:style-name="ro1">
          <table:table-cell/>
          <table:table-cell table:style-name="ce2" office:value-type="float" office:value="491.160143617" calcext:value-type="float">
            <text:p>491.16</text:p>
          </table:table-cell>
          <table:table-cell table:style-name="ce2" office:value-type="float" office:value="227.124703181" calcext:value-type="float">
            <text:p>227.12</text:p>
          </table:table-cell>
          <table:table-cell table:style-name="ce2" table:formula="of:=[.B36]-[.C36]" office:value-type="float" office:value="264.035440436" calcext:value-type="float">
            <text:p>264.04</text:p>
          </table:table-cell>
          <table:table-cell table:style-name="ce2"/>
          <table:table-cell table:style-name="ce2" office:value-type="float" office:value="2243.21878376" calcext:value-type="float">
            <text:p>2243.22</text:p>
          </table:table-cell>
          <table:table-cell table:style-name="ce2" office:value-type="float" office:value="145.950409903" calcext:value-type="float">
            <text:p>145.95</text:p>
          </table:table-cell>
          <table:table-cell table:style-name="ce2" table:formula="of:=[.F36]-[.G36]" office:value-type="float" office:value="2097.268373857" calcext:value-type="float">
            <text:p>2097.27</text:p>
          </table:table-cell>
          <table:table-cell table:number-columns-repeated="2"/>
          <table:table-cell table:style-name="ce2" office:value-type="float" office:value="334.341314015" calcext:value-type="float">
            <text:p>334.34</text:p>
          </table:table-cell>
          <table:table-cell table:style-name="ce2" office:value-type="float" office:value="224.103255215" calcext:value-type="float">
            <text:p>224.10</text:p>
          </table:table-cell>
          <table:table-cell table:style-name="ce2" table:formula="of:=[.K36]-[.L36]" office:value-type="float" office:value="110.2380588" calcext:value-type="float">
            <text:p>110.24</text:p>
          </table:table-cell>
          <table:table-cell table:style-name="ce2"/>
          <table:table-cell table:style-name="ce2" office:value-type="float" office:value="1803.67817296" calcext:value-type="float">
            <text:p>1803.68</text:p>
          </table:table-cell>
          <table:table-cell table:style-name="ce2" office:value-type="float" office:value="330.341614862" calcext:value-type="float">
            <text:p>330.34</text:p>
          </table:table-cell>
          <table:table-cell table:style-name="ce2" table:formula="of:=[.O36]-[.P36]" office:value-type="float" office:value="1473.336558098" calcext:value-type="float">
            <text:p>1473.34</text:p>
          </table:table-cell>
          <table:table-cell table:number-columns-repeated="2"/>
          <table:table-cell table:style-name="ce2" office:value-type="float" office:value="1325.33416722" calcext:value-type="float">
            <text:p>1325.33</text:p>
          </table:table-cell>
          <table:table-cell table:style-name="ce2" office:value-type="float" office:value="255.001191813" calcext:value-type="float">
            <text:p>255.00</text:p>
          </table:table-cell>
          <table:table-cell table:style-name="ce2" table:formula="of:=[.T36]-[.U36]" office:value-type="float" office:value="1070.332975407" calcext:value-type="float">
            <text:p>1070.33</text:p>
          </table:table-cell>
          <table:table-cell table:style-name="ce2"/>
          <table:table-cell table:style-name="ce2" office:value-type="float" office:value="1459.10504793" calcext:value-type="float">
            <text:p>1459.11</text:p>
          </table:table-cell>
          <table:table-cell table:style-name="ce2" office:value-type="float" office:value="188.945618585" calcext:value-type="float">
            <text:p>188.95</text:p>
          </table:table-cell>
          <table:table-cell table:style-name="ce2" table:formula="of:=[.X36]-[.Y36]" office:value-type="float" office:value="1270.159429345" calcext:value-type="float">
            <text:p>1270.16</text:p>
          </table:table-cell>
        </table:table-row>
        <table:table-row table:style-name="ro1">
          <table:table-cell/>
          <table:table-cell table:style-name="ce2" office:value-type="float" office:value="1050.76663455" calcext:value-type="float">
            <text:p>1050.77</text:p>
          </table:table-cell>
          <table:table-cell table:style-name="ce2" office:value-type="float" office:value="203.412638925" calcext:value-type="float">
            <text:p>203.41</text:p>
          </table:table-cell>
          <table:table-cell table:style-name="ce2" table:formula="of:=[.B37]-[.C37]" office:value-type="float" office:value="847.353995625" calcext:value-type="float">
            <text:p>847.35</text:p>
          </table:table-cell>
          <table:table-cell table:style-name="ce2"/>
          <table:table-cell table:style-name="ce2" office:value-type="float" office:value="2939.61992109" calcext:value-type="float">
            <text:p>2939.62</text:p>
          </table:table-cell>
          <table:table-cell table:style-name="ce2" office:value-type="float" office:value="259.263117731" calcext:value-type="float">
            <text:p>259.26</text:p>
          </table:table-cell>
          <table:table-cell table:style-name="ce2" table:formula="of:=[.F37]-[.G37]" office:value-type="float" office:value="2680.356803359" calcext:value-type="float">
            <text:p>2680.36</text:p>
          </table:table-cell>
          <table:table-cell table:number-columns-repeated="2"/>
          <table:table-cell table:style-name="ce2" office:value-type="float" office:value="623.29718963" calcext:value-type="float">
            <text:p>623.30</text:p>
          </table:table-cell>
          <table:table-cell table:style-name="ce2" office:value-type="float" office:value="188.529030203" calcext:value-type="float">
            <text:p>188.53</text:p>
          </table:table-cell>
          <table:table-cell table:style-name="ce2" table:formula="of:=[.K37]-[.L37]" office:value-type="float" office:value="434.768159427" calcext:value-type="float">
            <text:p>434.77</text:p>
          </table:table-cell>
          <table:table-cell table:style-name="ce2"/>
          <table:table-cell table:style-name="ce2" office:value-type="float" office:value="1099.20584463" calcext:value-type="float">
            <text:p>1099.21</text:p>
          </table:table-cell>
          <table:table-cell table:style-name="ce2" office:value-type="float" office:value="228.205918698" calcext:value-type="float">
            <text:p>228.21</text:p>
          </table:table-cell>
          <table:table-cell table:style-name="ce2" table:formula="of:=[.O37]-[.P37]" office:value-type="float" office:value="870.999925932" calcext:value-type="float">
            <text:p>871.00</text:p>
          </table:table-cell>
          <table:table-cell table:number-columns-repeated="2"/>
          <table:table-cell table:style-name="ce2" office:value-type="float" office:value="1617.31623447" calcext:value-type="float">
            <text:p>1617.32</text:p>
          </table:table-cell>
          <table:table-cell table:style-name="ce2" office:value-type="float" office:value="403.612606896" calcext:value-type="float">
            <text:p>403.61</text:p>
          </table:table-cell>
          <table:table-cell table:style-name="ce2" table:formula="of:=[.T37]-[.U37]" office:value-type="float" office:value="1213.703627574" calcext:value-type="float">
            <text:p>1213.70</text:p>
          </table:table-cell>
          <table:table-cell table:style-name="ce2"/>
          <table:table-cell table:style-name="ce2" office:value-type="float" office:value="1574.52187125" calcext:value-type="float">
            <text:p>1574.52</text:p>
          </table:table-cell>
          <table:table-cell table:style-name="ce2" office:value-type="float" office:value="236.013391043" calcext:value-type="float">
            <text:p>236.01</text:p>
          </table:table-cell>
          <table:table-cell table:style-name="ce2" table:formula="of:=[.X37]-[.Y37]" office:value-type="float" office:value="1338.508480207" calcext:value-type="float">
            <text:p>1338.51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33:.B37])" office:value-type="float" office:value="804.819669646" calcext:value-type="float">
            <text:p>804.82</text:p>
          </table:table-cell>
          <table:table-cell table:style-name="ce3" table:formula="of:=AVERAGE([.C33:.C37])" office:value-type="float" office:value="216.8935924764" calcext:value-type="float">
            <text:p>216.89</text:p>
          </table:table-cell>
          <table:table-cell table:style-name="ce3" table:formula="of:=AVERAGE([.D33:.D37])" office:value-type="float" office:value="587.9260771696" calcext:value-type="float">
            <text:p>587.93</text:p>
          </table:table-cell>
          <table:table-cell table:style-name="ce3"/>
          <table:table-cell table:style-name="ce3" table:formula="of:=AVERAGE([.F33:.F37])" office:value-type="float" office:value="1683.2901992464" calcext:value-type="float">
            <text:p>1683.29</text:p>
          </table:table-cell>
          <table:table-cell table:style-name="ce3" table:formula="of:=AVERAGE([.G33:.G37])" office:value-type="float" office:value="213.13011296" calcext:value-type="float">
            <text:p>213.13</text:p>
          </table:table-cell>
          <table:table-cell table:style-name="ce3" table:formula="of:=AVERAGE([.H33:.H37])" office:value-type="float" office:value="1470.1600862864" calcext:value-type="float">
            <text:p>1470.16</text:p>
          </table:table-cell>
          <table:table-cell table:number-columns-repeated="2"/>
          <table:table-cell table:style-name="ce2" office:value-type="float" office:value="823.013073031" calcext:value-type="float">
            <text:p>823.01</text:p>
          </table:table-cell>
          <table:table-cell table:style-name="ce2" office:value-type="float" office:value="134.395762019" calcext:value-type="float">
            <text:p>134.40</text:p>
          </table:table-cell>
          <table:table-cell table:style-name="ce2" table:formula="of:=[.K38]-[.L38]" office:value-type="float" office:value="688.617311012" calcext:value-type="float">
            <text:p>688.62</text:p>
          </table:table-cell>
          <table:table-cell table:style-name="ce2"/>
          <table:table-cell table:style-name="ce2" office:value-type="float" office:value="546.007771579" calcext:value-type="float">
            <text:p>546.01</text:p>
          </table:table-cell>
          <table:table-cell table:style-name="ce2" office:value-type="float" office:value="239.114915546" calcext:value-type="float">
            <text:p>239.11</text:p>
          </table:table-cell>
          <table:table-cell table:style-name="ce2" table:formula="of:=[.O38]-[.P38]" office:value-type="float" office:value="306.892856033" calcext:value-type="float">
            <text:p>306.89</text:p>
          </table:table-cell>
          <table:table-cell table:number-columns-repeated="2"/>
          <table:table-cell table:style-name="ce2" office:value-type="float" office:value="1344.7031704" calcext:value-type="float">
            <text:p>1344.70</text:p>
          </table:table-cell>
          <table:table-cell table:style-name="ce2" office:value-type="float" office:value="335.905373652" calcext:value-type="float">
            <text:p>335.91</text:p>
          </table:table-cell>
          <table:table-cell table:style-name="ce2" table:formula="of:=[.T38]-[.U38]" office:value-type="float" office:value="1008.797796748" calcext:value-type="float">
            <text:p>1008.80</text:p>
          </table:table-cell>
          <table:table-cell table:style-name="ce2"/>
          <table:table-cell table:style-name="ce2" office:value-type="float" office:value="2918.24296467" calcext:value-type="float">
            <text:p>2918.24</text:p>
          </table:table-cell>
          <table:table-cell table:style-name="ce2" office:value-type="float" office:value="702.021439957" calcext:value-type="float">
            <text:p>702.02</text:p>
          </table:table-cell>
          <table:table-cell table:style-name="ce2" table:formula="of:=[.X38]-[.Y38]" office:value-type="float" office:value="2216.221524713" calcext:value-type="float">
            <text:p>2216.22</text:p>
          </table:table-cell>
        </table:table-row>
        <table:table-row table:style-name="ro1">
          <table:table-cell table:number-columns-repeated="10"/>
          <table:table-cell table:style-name="ce3" table:formula="of:=AVERAGE([.K34:.K38])" office:value-type="float" office:value="523.4375653602" calcext:value-type="float">
            <text:p>523.44</text:p>
          </table:table-cell>
          <table:table-cell table:style-name="ce3" table:formula="of:=AVERAGE([.L34:.L38])" office:value-type="float" office:value="198.2779334126" calcext:value-type="float">
            <text:p>198.28</text:p>
          </table:table-cell>
          <table:table-cell table:style-name="ce3" table:formula="of:=AVERAGE([.M34:.M38])" office:value-type="float" office:value="325.1596319476" calcext:value-type="float">
            <text:p>325.16</text:p>
          </table:table-cell>
          <table:table-cell table:style-name="ce3"/>
          <table:table-cell table:style-name="ce3" table:formula="of:=AVERAGE([.O34:.O38])" office:value-type="float" office:value="1162.2458922056" calcext:value-type="float">
            <text:p>1162.25</text:p>
          </table:table-cell>
          <table:table-cell table:style-name="ce3" table:formula="of:=AVERAGE([.P34:.P38])" office:value-type="float" office:value="253.6992279616" calcext:value-type="float">
            <text:p>253.70</text:p>
          </table:table-cell>
          <table:table-cell table:style-name="ce3" table:formula="of:=AVERAGE([.Q34:.Q38])" office:value-type="float" office:value="908.546664244" calcext:value-type="float">
            <text:p>908.55</text:p>
          </table:table-cell>
          <table:table-cell table:number-columns-repeated="2"/>
          <table:table-cell table:style-name="ce3" table:formula="of:=AVERAGE([.T34:.T38])" office:value-type="float" office:value="1433.72661952" calcext:value-type="float">
            <text:p>1433.73</text:p>
          </table:table-cell>
          <table:table-cell table:style-name="ce3" table:formula="of:=AVERAGE([.U34:.U38])" office:value-type="float" office:value="309.7210470026" calcext:value-type="float">
            <text:p>309.72</text:p>
          </table:table-cell>
          <table:table-cell table:style-name="ce3" table:formula="of:=AVERAGE([.V34:.V38])" office:value-type="float" office:value="1124.0055725174" calcext:value-type="float">
            <text:p>1124.01</text:p>
          </table:table-cell>
          <table:table-cell table:style-name="ce3"/>
          <table:table-cell table:style-name="ce3" table:formula="of:=AVERAGE([.X34:.X38])" office:value-type="float" office:value="2007.57658462" calcext:value-type="float">
            <text:p>2007.58</text:p>
          </table:table-cell>
          <table:table-cell table:style-name="ce3" table:formula="of:=AVERAGE([.Y34:.Y38])" office:value-type="float" office:value="318.0579247606" calcext:value-type="float">
            <text:p>318.06</text:p>
          </table:table-cell>
          <table:table-cell table:style-name="ce3" table:formula="of:=AVERAGE([.Z34:.Z38])" office:value-type="float" office:value="1689.5186598594" calcext:value-type="float">
            <text:p>1689.52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Runs: 34</text:p>
          </table:table-cell>
          <table:table-cell office:value-type="string" calcext:value-type="string">
            <text:p>Success: 28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rrors: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rong object found (2x remote, 1x spoon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avigation error (1x dwa invalid trajectory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bject not found (1x remote, 1x spoon), both times bad light</text:p>
          </table:table-cell>
          <table:table-cell table:number-columns-repeated="25"/>
        </table:table-row>
      </table:table>
      <table:table table:name="full_search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1186.111058" calcext:value-type="float">
            <text:p>1186.111058</text:p>
          </table:table-cell>
          <table:table-cell office:value-type="float" office:value="87.8015642166" calcext:value-type="float">
            <text:p>87.8015642166</text:p>
          </table:table-cell>
          <table:table-cell office:value-type="float" office:value="96.248445034" calcext:value-type="float">
            <text:p>96.248445034</text:p>
          </table:table-cell>
          <table:table-cell office:value-type="float" office:value="896.241544247" calcext:value-type="float">
            <text:p>896.241544247</text:p>
          </table:table-cell>
          <table:table-cell office:value-type="float" office:value="56.8032660484" calcext:value-type="float">
            <text:p>56.8032660484</text:p>
          </table:table-cell>
          <table:table-cell table:style-name="ce5" table:number-columns-repeated="2"/>
          <table:table-cell office:value-type="float" office:value="1882.61613607" calcext:value-type="float">
            <text:p>1882.61613607</text:p>
          </table:table-cell>
          <table:table-cell office:value-type="float" office:value="0" calcext:value-type="float">
            <text:p>0</text:p>
          </table:table-cell>
          <table:table-cell office:value-type="float" office:value="162.610586405" calcext:value-type="float">
            <text:p>162.610586405</text:p>
          </table:table-cell>
          <table:table-cell office:value-type="float" office:value="1713.57447958" calcext:value-type="float">
            <text:p>1713.57447958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274.995448828" calcext:value-type="float">
            <text:p>274.9954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34985209" calcext:value-type="float">
            <text:p>249.634985209</text:p>
          </table:table-cell>
          <table:table-cell office:value-type="float" office:value="21.4009466171" calcext:value-type="float">
            <text:p>21.4009466171</text:p>
          </table:table-cell>
        </table:table-row>
        <table:table-row table:style-name="ro1">
          <table:table-cell/>
          <table:table-cell office:value-type="float" office:value="590.189095974" calcext:value-type="float">
            <text:p>590.189095974</text:p>
          </table:table-cell>
          <table:table-cell office:value-type="float" office:value="57.0078582764" calcext:value-type="float">
            <text:p>57.0078582764</text:p>
          </table:table-cell>
          <table:table-cell office:value-type="float" office:value="87.4370675087" calcext:value-type="float">
            <text:p>87.4370675087</text:p>
          </table:table-cell>
          <table:table-cell office:value-type="float" office:value="347.926439762" calcext:value-type="float">
            <text:p>347.926439762</text:p>
          </table:table-cell>
          <table:table-cell office:value-type="float" office:value="56.0117599964" calcext:value-type="float">
            <text:p>56.0117599964</text:p>
          </table:table-cell>
          <table:table-cell table:style-name="ce5" table:number-columns-repeated="2"/>
          <table:table-cell office:value-type="float" office:value="447.676231384" calcext:value-type="float">
            <text:p>447.676231384</text:p>
          </table:table-cell>
          <table:table-cell office:value-type="float" office:value="0" calcext:value-type="float">
            <text:p>0</text:p>
          </table:table-cell>
          <table:table-cell office:value-type="float" office:value="121.424663544" calcext:value-type="float">
            <text:p>121.424663544</text:p>
          </table:table-cell>
          <table:table-cell office:value-type="float" office:value="318.547799349" calcext:value-type="float">
            <text:p>318.547799349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1077.47635078" calcext:value-type="float">
            <text:p>1077.4763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47837925" calcext:value-type="float">
            <text:p>1052.47837925</text:p>
          </table:table-cell>
          <table:table-cell office:value-type="float" office:value="20.3998959064" calcext:value-type="float">
            <text:p>20.3998959064</text:p>
          </table:table-cell>
        </table:table-row>
        <table:table-row table:style-name="ro1">
          <table:table-cell/>
          <table:table-cell office:value-type="float" office:value="814.850021839" calcext:value-type="float">
            <text:p>814.850021839</text:p>
          </table:table-cell>
          <table:table-cell office:value-type="float" office:value="61.0024602413" calcext:value-type="float">
            <text:p>61.0024602413</text:p>
          </table:table-cell>
          <table:table-cell office:value-type="float" office:value="91.0190176964" calcext:value-type="float">
            <text:p>91.0190176964</text:p>
          </table:table-cell>
          <table:table-cell office:value-type="float" office:value="568.433133364" calcext:value-type="float">
            <text:p>568.433133364</text:p>
          </table:table-cell>
          <table:table-cell office:value-type="float" office:value="58.8067622185" calcext:value-type="float">
            <text:p>58.8067622185</text:p>
          </table:table-cell>
          <table:table-cell table:style-name="ce5" table:number-columns-repeated="2"/>
          <table:table-cell office:value-type="float" office:value="425.280315399" calcext:value-type="float">
            <text:p>425.280315399</text:p>
          </table:table-cell>
          <table:table-cell office:value-type="float" office:value="0" calcext:value-type="float">
            <text:p>0</text:p>
          </table:table-cell>
          <table:table-cell office:value-type="float" office:value="148.419117451" calcext:value-type="float">
            <text:p>148.419117451</text:p>
          </table:table-cell>
          <table:table-cell office:value-type="float" office:value="270.114762545" calcext:value-type="float">
            <text:p>270.114762545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1058.39850521" calcext:value-type="float">
            <text:p>1058.3985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39544463" calcext:value-type="float">
            <text:p>1031.39544463</text:p>
          </table:table-cell>
          <table:table-cell office:value-type="float" office:value="20.9940736294" calcext:value-type="float">
            <text:p>20.9940736294</text:p>
          </table:table-cell>
        </table:table-row>
        <table:table-row table:style-name="ro1">
          <table:table-cell/>
          <table:table-cell office:value-type="float" office:value="400.563981056" calcext:value-type="float">
            <text:p>400.563981056</text:p>
          </table:table-cell>
          <table:table-cell office:value-type="float" office:value="43.804176569" calcext:value-type="float">
            <text:p>43.804176569</text:p>
          </table:table-cell>
          <table:table-cell office:value-type="float" office:value="115.833212614" calcext:value-type="float">
            <text:p>115.833212614</text:p>
          </table:table-cell>
          <table:table-cell office:value-type="float" office:value="143.113963366" calcext:value-type="float">
            <text:p>143.113963366</text:p>
          </table:table-cell>
          <table:table-cell office:value-type="float" office:value="60.400690794" calcext:value-type="float">
            <text:p>60.400690794</text:p>
          </table:table-cell>
          <table:table-cell table:style-name="ce5" table:number-columns-repeated="2"/>
          <table:table-cell office:value-type="float" office:value="511.531738281" calcext:value-type="float">
            <text:p>511.531738281</text:p>
          </table:table-cell>
          <table:table-cell office:value-type="float" office:value="0" calcext:value-type="float">
            <text:p>0</text:p>
          </table:table-cell>
          <table:table-cell office:value-type="float" office:value="160.416682959" calcext:value-type="float">
            <text:p>160.416682959</text:p>
          </table:table-cell>
          <table:table-cell office:value-type="float" office:value="343.590056419" calcext:value-type="float">
            <text:p>343.590056419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439.841646433" calcext:value-type="float">
            <text:p>439.841646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108391523" calcext:value-type="float">
            <text:p>416.108391523</text:p>
          </table:table-cell>
          <table:table-cell office:value-type="float" office:value="19.8043453693" calcext:value-type="float">
            <text:p>19.8043453693</text:p>
          </table:table-cell>
        </table:table-row>
        <table:table-row table:style-name="ro1">
          <table:table-cell/>
          <table:table-cell office:value-type="float" office:value="345.791271925" calcext:value-type="float">
            <text:p>345.791271925</text:p>
          </table:table-cell>
          <table:table-cell office:value-type="float" office:value="25.4040248394" calcext:value-type="float">
            <text:p>25.4040248394</text:p>
          </table:table-cell>
          <table:table-cell office:value-type="float" office:value="77.6624419689" calcext:value-type="float">
            <text:p>77.6624419689</text:p>
          </table:table-cell>
          <table:table-cell office:value-type="float" office:value="193.471235037" calcext:value-type="float">
            <text:p>193.471235037</text:p>
          </table:table-cell>
          <table:table-cell office:value-type="float" office:value="20.6006660461" calcext:value-type="float">
            <text:p>20.6006660461</text:p>
          </table:table-cell>
          <table:table-cell table:style-name="ce5" table:number-columns-repeated="2"/>
          <table:table-cell office:value-type="float" office:value="1168.51895595" calcext:value-type="float">
            <text:p>1168.51895595</text:p>
          </table:table-cell>
          <table:table-cell office:value-type="float" office:value="0" calcext:value-type="float">
            <text:p>0</text:p>
          </table:table-cell>
          <table:table-cell office:value-type="float" office:value="304.230722189" calcext:value-type="float">
            <text:p>304.230722189</text:p>
          </table:table-cell>
          <table:table-cell office:value-type="float" office:value="857.76717782" calcext:value-type="float">
            <text:p>857.76717782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5" table:number-columns-repeated="5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6" table:formula="of:=AVERAGE([.B6:.B10])" office:value-type="float" office:value="667.5010857588" calcext:value-type="float">
            <text:p>667.50</text:p>
          </table:table-cell>
          <table:table-cell table:style-name="ce6" table:formula="of:=AVERAGE([.C6:.C10])" office:value-type="float" office:value="55.00401682854" calcext:value-type="float">
            <text:p>55.00</text:p>
          </table:table-cell>
          <table:table-cell table:style-name="ce6" table:formula="of:=AVERAGE([.D6:.D10])" office:value-type="float" office:value="93.6400369644" calcext:value-type="float">
            <text:p>93.64</text:p>
          </table:table-cell>
          <table:table-cell table:style-name="ce6" table:formula="of:=AVERAGE([.E6:.E10])" office:value-type="float" office:value="429.8372631552" calcext:value-type="float">
            <text:p>429.84</text:p>
          </table:table-cell>
          <table:table-cell table:style-name="ce6" table:formula="of:=AVERAGE([.F6:.F10])" office:value-type="float" office:value="50.52462902068" calcext:value-type="float">
            <text:p>50.52</text:p>
          </table:table-cell>
          <table:table-cell table:style-name="ce6" table:number-columns-repeated="2"/>
          <table:table-cell table:style-name="ce6" table:formula="of:=AVERAGE([.I6:.I10])" office:value-type="float" office:value="887.1246754168" calcext:value-type="float">
            <text:p>887.12</text:p>
          </table:table-cell>
          <table:table-cell table:style-name="ce6" table:formula="of:=AVERAGE([.J6:.J10])" office:value-type="float" office:value="0" calcext:value-type="float">
            <text:p>0.00</text:p>
          </table:table-cell>
          <table:table-cell table:style-name="ce6" table:formula="of:=AVERAGE([.K6:.K10])" office:value-type="float" office:value="179.4203545096" calcext:value-type="float">
            <text:p>179.42</text:p>
          </table:table-cell>
          <table:table-cell table:style-name="ce6" table:formula="of:=AVERAGE([.L6:.L10])" office:value-type="float" office:value="700.7188551426" calcext:value-type="float">
            <text:p>700.72</text:p>
          </table:table-cell>
          <table:table-cell table:style-name="ce6" table:formula="of:=AVERAGE([.M6:.M10])" office:value-type="float" office:value="0" calcext:value-type="float">
            <text:p>0.00</text:p>
          </table:table-cell>
          <table:table-cell table:style-name="ce6"/>
          <table:table-cell/>
          <table:table-cell table:style-name="ce6" table:formula="of:=AVERAGE([.P6:.P10])" office:value-type="float" office:value="712.67798781275" calcext:value-type="float">
            <text:p>712.68</text:p>
          </table:table-cell>
          <table:table-cell table:style-name="ce6" table:formula="of:=AVERAGE([.Q6:.Q10])" office:value-type="float" office:value="0" calcext:value-type="float">
            <text:p>0.00</text:p>
          </table:table-cell>
          <table:table-cell table:style-name="ce6" table:formula="of:=AVERAGE([.R6:.R10])" office:value-type="float" office:value="0" calcext:value-type="float">
            <text:p>0.00</text:p>
          </table:table-cell>
          <table:table-cell table:style-name="ce6" table:formula="of:=AVERAGE([.S6:.S10])" office:value-type="float" office:value="687.404300153" calcext:value-type="float">
            <text:p>687.40</text:p>
          </table:table-cell>
          <table:table-cell table:style-name="ce6" table:formula="of:=AVERAGE([.T6:.T10])" office:value-type="float" office:value="20.64981538055" calcext:value-type="float">
            <text:p>20.6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ath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62.3340508394" calcext:value-type="float">
            <text:p>62.3340508394</text:p>
          </table:table-cell>
          <table:table-cell office:value-type="float" office:value="5.47905715785" calcext:value-type="float">
            <text:p>5.4790571579</text:p>
          </table:table-cell>
          <table:table-cell office:value-type="float" office:value="15.1725376436" calcext:value-type="float">
            <text:p>15.1725376436</text:p>
          </table:table-cell>
          <table:table-cell office:value-type="float" office:value="40.7889285642" calcext:value-type="float">
            <text:p>40.7889285642</text:p>
          </table:table-cell>
          <table:table-cell office:value-type="float" office:value="0.722065443677" calcext:value-type="float">
            <text:p>0.7220654437</text:p>
          </table:table-cell>
          <table:table-cell table:style-name="ce5" table:number-columns-repeated="2"/>
          <table:table-cell office:value-type="float" office:value="167.211595579" calcext:value-type="float">
            <text:p>167.211595579</text:p>
          </table:table-cell>
          <table:table-cell office:value-type="float" office:value="0" calcext:value-type="float">
            <text:p>0</text:p>
          </table:table-cell>
          <table:table-cell office:value-type="float" office:value="27.7709434779" calcext:value-type="float">
            <text:p>27.7709434779</text:p>
          </table:table-cell>
          <table:table-cell office:value-type="float" office:value="139.402728006" calcext:value-type="float">
            <text:p>139.402728006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16.1134000796" calcext:value-type="float">
            <text:p>16.1134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33935358" calcext:value-type="float">
            <text:p>15.9333935358</text:p>
          </table:table-cell>
          <table:table-cell office:value-type="float" office:value="0.170584025583" calcext:value-type="float">
            <text:p>0.1705840256</text:p>
          </table:table-cell>
        </table:table-row>
        <table:table-row table:style-name="ro1">
          <table:table-cell/>
          <table:table-cell office:value-type="float" office:value="38.6762137728" calcext:value-type="float">
            <text:p>38.6762137728</text:p>
          </table:table-cell>
          <table:table-cell office:value-type="float" office:value="5.66366122413" calcext:value-type="float">
            <text:p>5.6636612241</text:p>
          </table:table-cell>
          <table:table-cell office:value-type="float" office:value="14.5717634505" calcext:value-type="float">
            <text:p>14.5717634505</text:p>
          </table:table-cell>
          <table:table-cell office:value-type="float" office:value="17.5022513023" calcext:value-type="float">
            <text:p>17.5022513023</text:p>
          </table:table-cell>
          <table:table-cell office:value-type="float" office:value="0.653239775313" calcext:value-type="float">
            <text:p>0.6532397753</text:p>
          </table:table-cell>
          <table:table-cell table:style-name="ce5" table:number-columns-repeated="2"/>
          <table:table-cell office:value-type="float" office:value="37.7291621825" calcext:value-type="float">
            <text:p>37.7291621825</text:p>
          </table:table-cell>
          <table:table-cell office:value-type="float" office:value="0" calcext:value-type="float">
            <text:p>0</text:p>
          </table:table-cell>
          <table:table-cell office:value-type="float" office:value="17.4242308454" calcext:value-type="float">
            <text:p>17.4242308454</text:p>
          </table:table-cell>
          <table:table-cell office:value-type="float" office:value="20.2729360521" calcext:value-type="float">
            <text:p>20.2729360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.0212950129" calcext:value-type="float">
            <text:p>59.021295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419532268" calcext:value-type="float">
            <text:p>58.6419532268</text:p>
          </table:table-cell>
          <table:table-cell office:value-type="float" office:value="0.328273970564" calcext:value-type="float">
            <text:p>0.3282739706</text:p>
          </table:table-cell>
        </table:table-row>
        <table:table-row table:style-name="ro1">
          <table:table-cell/>
          <table:table-cell office:value-type="float" office:value="50.0680494319" calcext:value-type="float">
            <text:p>50.0680494319</text:p>
          </table:table-cell>
          <table:table-cell office:value-type="float" office:value="4.31616290172" calcext:value-type="float">
            <text:p>4.3161629017</text:p>
          </table:table-cell>
          <table:table-cell office:value-type="float" office:value="13.3937016003" calcext:value-type="float">
            <text:p>13.3937016003</text:p>
          </table:table-cell>
          <table:table-cell office:value-type="float" office:value="31.7745674187" calcext:value-type="float">
            <text:p>31.7745674187</text:p>
          </table:table-cell>
          <table:table-cell office:value-type="float" office:value="0.478211770128" calcext:value-type="float">
            <text:p>0.4782117701</text:p>
          </table:table-cell>
          <table:table-cell table:style-name="ce5" table:number-columns-repeated="2"/>
          <table:table-cell office:value-type="float" office:value="45.0661144814" calcext:value-type="float">
            <text:p>45.0661144814</text:p>
          </table:table-cell>
          <table:table-cell office:value-type="float" office:value="0" calcext:value-type="float">
            <text:p>0</text:p>
          </table:table-cell>
          <table:table-cell office:value-type="float" office:value="25.9654123414" calcext:value-type="float">
            <text:p>25.9654123414</text:p>
          </table:table-cell>
          <table:table-cell office:value-type="float" office:value="19.0678018792" calcext:value-type="float">
            <text:p>19.06780187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.427119002" calcext:value-type="float">
            <text:p>75.4271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979441395" calcext:value-type="float">
            <text:p>74.9979441395</text:p>
          </table:table-cell>
          <table:table-cell office:value-type="float" office:value="0.347187593511" calcext:value-type="float">
            <text:p>0.3471875935</text:p>
          </table:table-cell>
        </table:table-row>
        <table:table-row table:style-name="ro1">
          <table:table-cell/>
          <table:table-cell office:value-type="float" office:value="22.605566258" calcext:value-type="float">
            <text:p>22.605566258</text:p>
          </table:table-cell>
          <table:table-cell office:value-type="float" office:value="3.63064417111" calcext:value-type="float">
            <text:p>3.6306441711</text:p>
          </table:table-cell>
          <table:table-cell office:value-type="float" office:value="12.6524973177" calcext:value-type="float">
            <text:p>12.6524973177</text:p>
          </table:table-cell>
          <table:table-cell office:value-type="float" office:value="5.65025392014" calcext:value-type="float">
            <text:p>5.6502539201</text:p>
          </table:table-cell>
          <table:table-cell office:value-type="float" office:value="0.632908136926" calcext:value-type="float">
            <text:p>0.6329081369</text:p>
          </table:table-cell>
          <table:table-cell table:style-name="ce5" table:number-columns-repeated="2"/>
          <table:table-cell office:value-type="float" office:value="45.613186466" calcext:value-type="float">
            <text:p>45.613186466</text:p>
          </table:table-cell>
          <table:table-cell office:value-type="float" office:value="0" calcext:value-type="float">
            <text:p>0</text:p>
          </table:table-cell>
          <table:table-cell office:value-type="float" office:value="27.4354646774" calcext:value-type="float">
            <text:p>27.4354646774</text:p>
          </table:table-cell>
          <table:table-cell office:value-type="float" office:value="18.1651787096" calcext:value-type="float">
            <text:p>18.1651787096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27.1764388551" calcext:value-type="float">
            <text:p>27.176438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331049" calcext:value-type="float">
            <text:p>27.010331049</text:p>
          </table:table-cell>
          <table:table-cell office:value-type="float" office:value="0.165979865875" calcext:value-type="float">
            <text:p>0.1659798659</text:p>
          </table:table-cell>
        </table:table-row>
        <table:table-row table:style-name="ro1">
          <table:table-cell/>
          <table:table-cell office:value-type="float" office:value="26.9869346772" calcext:value-type="float">
            <text:p>26.9869346772</text:p>
          </table:table-cell>
          <table:table-cell office:value-type="float" office:value="2.04324349497" calcext:value-type="float">
            <text:p>2.043243495</text:p>
          </table:table-cell>
          <table:table-cell office:value-type="float" office:value="12.3826210128" calcext:value-type="float">
            <text:p>12.3826210128</text:p>
          </table:table-cell>
          <table:table-cell office:value-type="float" office:value="12.3457298209" calcext:value-type="float">
            <text:p>12.3457298209</text:p>
          </table:table-cell>
          <table:table-cell office:value-type="float" office:value="0.182869311668" calcext:value-type="float">
            <text:p>0.1828693117</text:p>
          </table:table-cell>
          <table:table-cell table:style-name="ce5" table:number-columns-repeated="2"/>
          <table:table-cell office:value-type="float" office:value="72.2960734481" calcext:value-type="float">
            <text:p>72.2960734481</text:p>
          </table:table-cell>
          <table:table-cell office:value-type="float" office:value="0" calcext:value-type="float">
            <text:p>0</text:p>
          </table:table-cell>
          <table:table-cell office:value-type="float" office:value="24.288982356" calcext:value-type="float">
            <text:p>24.288982356</text:p>
          </table:table-cell>
          <table:table-cell office:value-type="float" office:value="47.9912985646" calcext:value-type="float">
            <text:p>47.9912985646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5" table:number-columns-repeated="5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6" table:formula="of:=AVERAGE([.B17:.B21])" office:value-type="float" office:value="40.13416299586" calcext:value-type="float">
            <text:p>40.13</text:p>
          </table:table-cell>
          <table:table-cell table:style-name="ce6" table:formula="of:=AVERAGE([.C17:.C21])" office:value-type="float" office:value="4.226553789956" calcext:value-type="float">
            <text:p>4.23</text:p>
          </table:table-cell>
          <table:table-cell table:style-name="ce6" table:formula="of:=AVERAGE([.D17:.D21])" office:value-type="float" office:value="13.63462420498" calcext:value-type="float">
            <text:p>13.63</text:p>
          </table:table-cell>
          <table:table-cell table:style-name="ce6" table:formula="of:=AVERAGE([.E17:.E21])" office:value-type="float" office:value="21.612346205248" calcext:value-type="float">
            <text:p>21.61</text:p>
          </table:table-cell>
          <table:table-cell table:style-name="ce6" table:formula="of:=AVERAGE([.F17:.F21])" office:value-type="float" office:value="0.5338588875424" calcext:value-type="float">
            <text:p>0.53</text:p>
          </table:table-cell>
          <table:table-cell table:style-name="ce6" table:number-columns-repeated="2"/>
          <table:table-cell table:style-name="ce6" table:formula="of:=AVERAGE([.I17:.I21])" office:value-type="float" office:value="73.5832264314" calcext:value-type="float">
            <text:p>73.58</text:p>
          </table:table-cell>
          <table:table-cell table:style-name="ce6" table:formula="of:=AVERAGE([.J17:.J21])" office:value-type="float" office:value="0" calcext:value-type="float">
            <text:p>0.00</text:p>
          </table:table-cell>
          <table:table-cell table:style-name="ce6" table:formula="of:=AVERAGE([.K17:.K21])" office:value-type="float" office:value="24.57700673962" calcext:value-type="float">
            <text:p>24.58</text:p>
          </table:table-cell>
          <table:table-cell table:style-name="ce6" table:formula="of:=AVERAGE([.L17:.L21])" office:value-type="float" office:value="48.9799886423" calcext:value-type="float">
            <text:p>48.98</text:p>
          </table:table-cell>
          <table:table-cell table:style-name="ce6" table:formula="of:=AVERAGE([.M17:.M21])" office:value-type="float" office:value="0" calcext:value-type="float">
            <text:p>0.00</text:p>
          </table:table-cell>
          <table:table-cell table:style-name="ce6"/>
          <table:table-cell/>
          <table:table-cell table:style-name="ce6" table:formula="of:=AVERAGE([.P17:.P21])" office:value-type="float" office:value="44.4345632374" calcext:value-type="float">
            <text:p>44.43</text:p>
          </table:table-cell>
          <table:table-cell table:style-name="ce6" table:formula="of:=AVERAGE([.Q17:.Q21])" office:value-type="float" office:value="0" calcext:value-type="float">
            <text:p>0.00</text:p>
          </table:table-cell>
          <table:table-cell table:style-name="ce6" table:formula="of:=AVERAGE([.R17:.R21])" office:value-type="float" office:value="0" calcext:value-type="float">
            <text:p>0.00</text:p>
          </table:table-cell>
          <table:table-cell table:style-name="ce6" table:formula="of:=AVERAGE([.S17:.S21])" office:value-type="float" office:value="44.145905487775" calcext:value-type="float">
            <text:p>44.15</text:p>
          </table:table-cell>
          <table:table-cell table:style-name="ce6" table:formula="of:=AVERAGE([.T17:.T21])" office:value-type="float" office:value="0.25300636388325" calcext:value-type="float">
            <text:p>0.2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path turn lengt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formed</text:p>
          </table:table-cell>
          <table:table-cell table:number-columns-repeated="6"/>
          <table:table-cell office:value-type="string" calcext:value-type="string">
            <text:p>uninformed, explore then search</text:p>
          </table:table-cell>
          <table:table-cell table:number-columns-repeated="6"/>
          <table:table-cell office:value-type="string" calcext:value-type="string">
            <text:p>uninformed, no expl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/>
          <table:table-cell office:value-type="float" office:value="3505.43759984" calcext:value-type="float">
            <text:p>3505.43759984</text:p>
          </table:table-cell>
          <table:table-cell office:value-type="float" office:value="280.223899575" calcext:value-type="float">
            <text:p>280.223899575</text:p>
          </table:table-cell>
          <table:table-cell office:value-type="float" office:value="333.199612044" calcext:value-type="float">
            <text:p>333.199612044</text:p>
          </table:table-cell>
          <table:table-cell office:value-type="float" office:value="2591.76182535" calcext:value-type="float">
            <text:p>2591.76182535</text:p>
          </table:table-cell>
          <table:table-cell office:value-type="float" office:value="162.647287671" calcext:value-type="float">
            <text:p>162.647287671</text:p>
          </table:table-cell>
          <table:table-cell table:style-name="ce5" table:number-columns-repeated="2"/>
          <table:table-cell office:value-type="float" office:value="4839.31631987" calcext:value-type="float">
            <text:p>4839.31631987</text:p>
          </table:table-cell>
          <table:table-cell office:value-type="float" office:value="0" calcext:value-type="float">
            <text:p>0</text:p>
          </table:table-cell>
          <table:table-cell office:value-type="float" office:value="534.606252111" calcext:value-type="float">
            <text:p>534.606252111</text:p>
          </table:table-cell>
          <table:table-cell office:value-type="float" office:value="4283.36944218" calcext:value-type="float">
            <text:p>4283.36944218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705.72873124" calcext:value-type="float">
            <text:p>705.7287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.960694356" calcext:value-type="float">
            <text:p>668.960694356</text:p>
          </table:table-cell>
          <table:table-cell office:value-type="float" office:value="36.2602770834" calcext:value-type="float">
            <text:p>36.2602770834</text:p>
          </table:table-cell>
        </table:table-row>
        <table:table-row table:style-name="ro1">
          <table:table-cell/>
          <table:table-cell office:value-type="float" office:value="1688.67293485" calcext:value-type="float">
            <text:p>1688.67293485</text:p>
          </table:table-cell>
          <table:table-cell office:value-type="float" office:value="174.608878205" calcext:value-type="float">
            <text:p>174.608878205</text:p>
          </table:table-cell>
          <table:table-cell office:value-type="float" office:value="233.841394645" calcext:value-type="float">
            <text:p>233.841394645</text:p>
          </table:table-cell>
          <table:table-cell office:value-type="float" office:value="1022.51898139" calcext:value-type="float">
            <text:p>1022.51898139</text:p>
          </table:table-cell>
          <table:table-cell office:value-type="float" office:value="161.539352625" calcext:value-type="float">
            <text:p>161.539352625</text:p>
          </table:table-cell>
          <table:table-cell table:style-name="ce5" table:number-columns-repeated="2"/>
          <table:table-cell office:value-type="float" office:value="1431.19442592" calcext:value-type="float">
            <text:p>1431.19442592</text:p>
          </table:table-cell>
          <table:table-cell office:value-type="float" office:value="0" calcext:value-type="float">
            <text:p>0</text:p>
          </table:table-cell>
          <table:table-cell office:value-type="float" office:value="379.191196812" calcext:value-type="float">
            <text:p>379.191196812</text:p>
          </table:table-cell>
          <table:table-cell office:value-type="float" office:value="1021.72893384" calcext:value-type="float">
            <text:p>1021.72893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81.30813773" calcext:value-type="float">
            <text:p>2881.3081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.61534074" calcext:value-type="float">
            <text:p>2850.61534074</text:p>
          </table:table-cell>
          <table:table-cell office:value-type="float" office:value="30.3357429857" calcext:value-type="float">
            <text:p>30.3357429857</text:p>
          </table:table-cell>
        </table:table-row>
        <table:table-row table:style-name="ro1">
          <table:table-cell/>
          <table:table-cell office:value-type="float" office:value="2513.06710636" calcext:value-type="float">
            <text:p>2513.06710636</text:p>
          </table:table-cell>
          <table:table-cell office:value-type="float" office:value="193.912577255" calcext:value-type="float">
            <text:p>193.912577255</text:p>
          </table:table-cell>
          <table:table-cell office:value-type="float" office:value="249.108336555" calcext:value-type="float">
            <text:p>249.108336555</text:p>
          </table:table-cell>
          <table:table-cell office:value-type="float" office:value="1887.93197589" calcext:value-type="float">
            <text:p>1887.93197589</text:p>
          </table:table-cell>
          <table:table-cell office:value-type="float" office:value="111.991774049" calcext:value-type="float">
            <text:p>111.991774049</text:p>
          </table:table-cell>
          <table:table-cell table:style-name="ce5" table:number-columns-repeated="2"/>
          <table:table-cell office:value-type="float" office:value="1203.24639075" calcext:value-type="float">
            <text:p>1203.24639075</text:p>
          </table:table-cell>
          <table:table-cell office:value-type="float" office:value="0" calcext:value-type="float">
            <text:p>0</text:p>
          </table:table-cell>
          <table:table-cell office:value-type="float" office:value="364.628097389" calcext:value-type="float">
            <text:p>364.628097389</text:p>
          </table:table-cell>
          <table:table-cell office:value-type="float" office:value="827.036567706" calcext:value-type="float">
            <text:p>827.0365677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7.31603904" calcext:value-type="float">
            <text:p>2687.3160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.5960796" calcext:value-type="float">
            <text:p>2654.5960796</text:p>
          </table:table-cell>
          <table:table-cell office:value-type="float" office:value="32.184856945" calcext:value-type="float">
            <text:p>32.184856945</text:p>
          </table:table-cell>
        </table:table-row>
        <table:table-row table:style-name="ro1">
          <table:table-cell/>
          <table:table-cell office:value-type="float" office:value="1475.55919022" calcext:value-type="float">
            <text:p>1475.55919022</text:p>
          </table:table-cell>
          <table:table-cell office:value-type="float" office:value="177.30796111" calcext:value-type="float">
            <text:p>177.30796111</text:p>
          </table:table-cell>
          <table:table-cell office:value-type="float" office:value="387.578491919" calcext:value-type="float">
            <text:p>387.578491919</text:p>
          </table:table-cell>
          <table:table-cell office:value-type="float" office:value="617.552814039" calcext:value-type="float">
            <text:p>617.552814039</text:p>
          </table:table-cell>
          <table:table-cell office:value-type="float" office:value="173.539479974" calcext:value-type="float">
            <text:p>173.539479974</text:p>
          </table:table-cell>
          <table:table-cell table:style-name="ce5" table:number-columns-repeated="2"/>
          <table:table-cell office:value-type="float" office:value="1351.77933524" calcext:value-type="float">
            <text:p>1351.77933524</text:p>
          </table:table-cell>
          <table:table-cell office:value-type="float" office:value="0" calcext:value-type="float">
            <text:p>0</text:p>
          </table:table-cell>
          <table:table-cell office:value-type="float" office:value="369.200673791" calcext:value-type="float">
            <text:p>369.200673791</text:p>
          </table:table-cell>
          <table:table-cell office:value-type="float" office:value="974.494899217" calcext:value-type="float">
            <text:p>974.494899217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1184.85016428" calcext:value-type="float">
            <text:p>1184.850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69302526" calcext:value-type="float">
            <text:p>1152.69302526</text:p>
          </table:table-cell>
          <table:table-cell office:value-type="float" office:value="31.9435857579" calcext:value-type="float">
            <text:p>31.9435857579</text:p>
          </table:table-cell>
        </table:table-row>
        <table:table-row table:style-name="ro1">
          <table:table-cell/>
          <table:table-cell office:value-type="float" office:value="918.442931825" calcext:value-type="float">
            <text:p>918.442931825</text:p>
          </table:table-cell>
          <table:table-cell office:value-type="float" office:value="66.9460283345" calcext:value-type="float">
            <text:p>66.9460283345</text:p>
          </table:table-cell>
          <table:table-cell office:value-type="float" office:value="214.86457202" calcext:value-type="float">
            <text:p>214.86457202</text:p>
          </table:table-cell>
          <table:table-cell office:value-type="float" office:value="531.543754415" calcext:value-type="float">
            <text:p>531.543754415</text:p>
          </table:table-cell>
          <table:table-cell office:value-type="float" office:value="41.6386517675" calcext:value-type="float">
            <text:p>41.6386517675</text:p>
          </table:table-cell>
          <table:table-cell table:style-name="ce5" table:number-columns-repeated="2"/>
          <table:table-cell office:value-type="float" office:value="3301.4746404" calcext:value-type="float">
            <text:p>3301.4746404</text:p>
          </table:table-cell>
          <table:table-cell office:value-type="float" office:value="0" calcext:value-type="float">
            <text:p>0</text:p>
          </table:table-cell>
          <table:table-cell office:value-type="float" office:value="1039.22150418" calcext:value-type="float">
            <text:p>1039.22150418</text:p>
          </table:table-cell>
          <table:table-cell office:value-type="float" office:value="2234.64374777" calcext:value-type="float">
            <text:p>2234.64374777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5" table:number-columns-repeated="5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6" table:formula="of:=AVERAGE([.B29:.B33])" office:value-type="float" office:value="2020.235952619" calcext:value-type="float">
            <text:p>2020.24</text:p>
          </table:table-cell>
          <table:table-cell table:style-name="ce6" table:formula="of:=AVERAGE([.C29:.C33])" office:value-type="float" office:value="178.5998688959" calcext:value-type="float">
            <text:p>178.60</text:p>
          </table:table-cell>
          <table:table-cell table:style-name="ce6" table:formula="of:=AVERAGE([.D29:.D33])" office:value-type="float" office:value="283.7184814366" calcext:value-type="float">
            <text:p>283.72</text:p>
          </table:table-cell>
          <table:table-cell table:style-name="ce6" table:formula="of:=AVERAGE([.E29:.E33])" office:value-type="float" office:value="1330.2618702168" calcext:value-type="float">
            <text:p>1330.26</text:p>
          </table:table-cell>
          <table:table-cell table:style-name="ce6" table:formula="of:=AVERAGE([.F29:.F33])" office:value-type="float" office:value="130.2713092173" calcext:value-type="float">
            <text:p>130.27</text:p>
          </table:table-cell>
          <table:table-cell table:style-name="ce6" table:number-columns-repeated="2"/>
          <table:table-cell table:style-name="ce6" table:formula="of:=AVERAGE([.I29:.I33])" office:value-type="float" office:value="2425.402222436" calcext:value-type="float">
            <text:p>2425.40</text:p>
          </table:table-cell>
          <table:table-cell table:style-name="ce6" table:formula="of:=AVERAGE([.J29:.J33])" office:value-type="float" office:value="0" calcext:value-type="float">
            <text:p>0.00</text:p>
          </table:table-cell>
          <table:table-cell table:style-name="ce6" table:formula="of:=AVERAGE([.K29:.K33])" office:value-type="float" office:value="537.3695448566" calcext:value-type="float">
            <text:p>537.37</text:p>
          </table:table-cell>
          <table:table-cell table:style-name="ce6" table:formula="of:=AVERAGE([.L29:.L33])" office:value-type="float" office:value="1868.2547181426" calcext:value-type="float">
            <text:p>1868.25</text:p>
          </table:table-cell>
          <table:table-cell table:style-name="ce6" table:formula="of:=AVERAGE([.M29:.M33])" office:value-type="float" office:value="0" calcext:value-type="float">
            <text:p>0.00</text:p>
          </table:table-cell>
          <table:table-cell table:style-name="ce6"/>
          <table:table-cell/>
          <table:table-cell table:style-name="ce6" table:formula="of:=AVERAGE([.P29:.P33])" office:value-type="float" office:value="1864.8007680725" calcext:value-type="float">
            <text:p>1864.80</text:p>
          </table:table-cell>
          <table:table-cell table:style-name="ce6" table:formula="of:=AVERAGE([.Q29:.Q33])" office:value-type="float" office:value="0" calcext:value-type="float">
            <text:p>0.00</text:p>
          </table:table-cell>
          <table:table-cell table:style-name="ce6" table:formula="of:=AVERAGE([.R29:.R33])" office:value-type="float" office:value="0" calcext:value-type="float">
            <text:p>0.00</text:p>
          </table:table-cell>
          <table:table-cell table:style-name="ce6" table:formula="of:=AVERAGE([.S29:.S33])" office:value-type="float" office:value="1831.716284989" calcext:value-type="float">
            <text:p>1831.72</text:p>
          </table:table-cell>
          <table:table-cell table:style-name="ce6" table:formula="of:=AVERAGE([.T29:.T33])" office:value-type="float" office:value="32.681115693" calcext:value-type="float">
            <text:p>32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21:40:37.407074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5:21.740981024</meta:creation-date>
    <dc:date>2018-04-13T21:45:53.619234286</dc:date>
    <meta:editing-duration>PT3H14M22S</meta:editing-duration>
    <meta:editing-cycles>10</meta:editing-cycles>
    <meta:generator>LibreOffice/5.1.6.2$Linux_X86_64 LibreOffice_project/10m0$Build-2</meta:generator>
    <meta:document-statistic meta:table-count="2" meta:cell-count="723" meta:object-count="0"/>
  </office:meta>
</office:document-meta>
</file>
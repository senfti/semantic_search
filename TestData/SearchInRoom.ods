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76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6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ne_room_search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row table:style-name="ro1" table:number-rows-repeated="2">
          <table:table-cell table:number-columns-repeated="39"/>
        </table:table-row>
        <table:table-row table:style-name="ro1">
          <table:table-cell office:value-type="string" calcext:value-type="string">
            <text:p>Spoon on Table, Time</text:p>
          </table:table-cell>
          <table:table-cell table:number-columns-repeated="8"/>
          <table:table-cell office:value-type="string" calcext:value-type="string">
            <text:p>Remote on CouchTable</text:p>
          </table:table-cell>
          <table:table-cell table:number-columns-repeated="8"/>
          <table:table-cell office:value-type="string" calcext:value-type="string">
            <text:p>Remote on KitchenTable</text:p>
          </table:table-cell>
          <table:table-cell table:number-columns-repeated="8"/>
          <table:table-cell office:value-type="string" calcext:value-type="string">
            <text:p>Lab Bowl behind coffe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inform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175.072071791" calcext:value-type="float">
            <text:p>175.07</text:p>
          </table:table-cell>
          <table:table-cell table:style-name="ce2" office:value-type="float" office:value="134.629767418" calcext:value-type="float">
            <text:p>134.63</text:p>
          </table:table-cell>
          <table:table-cell table:style-name="ce2" table:formula="of:=[one_room_search.B6]-[one_room_search.C6]" office:value-type="float" office:value="40.442304373" calcext:value-type="float">
            <text:p>40.44</text:p>
          </table:table-cell>
          <table:table-cell table:style-name="ce2"/>
          <table:table-cell table:style-name="ce2" office:value-type="float" office:value="171.899055481" calcext:value-type="float">
            <text:p>171.90</text:p>
          </table:table-cell>
          <table:table-cell table:style-name="ce2" office:value-type="float" office:value="74.3296275139" calcext:value-type="float">
            <text:p>74.33</text:p>
          </table:table-cell>
          <table:table-cell table:style-name="ce2" table:formula="of:=[one_room_search.F6]-[one_room_search.G6]" office:value-type="float" office:value="97.5694279671" calcext:value-type="float">
            <text:p>97.57</text:p>
          </table:table-cell>
          <table:table-cell table:number-columns-repeated="2"/>
          <table:table-cell table:style-name="ce2" office:value-type="float" office:value="101.200848341" calcext:value-type="float">
            <text:p>101.20</text:p>
          </table:table-cell>
          <table:table-cell table:style-name="ce2" office:value-type="float" office:value="71.0400195122" calcext:value-type="float">
            <text:p>71.04</text:p>
          </table:table-cell>
          <table:table-cell table:style-name="ce2" table:formula="of:=[one_room_search.K6]-[one_room_search.L6]" office:value-type="float" office:value="30.1608288288" calcext:value-type="float">
            <text:p>30.16</text:p>
          </table:table-cell>
          <table:table-cell table:style-name="ce2"/>
          <table:table-cell table:style-name="ce2" office:value-type="float" office:value="195.089064598" calcext:value-type="float">
            <text:p>195.09</text:p>
          </table:table-cell>
          <table:table-cell table:style-name="ce2" office:value-type="float" office:value="84.5747725964" calcext:value-type="float">
            <text:p>84.57</text:p>
          </table:table-cell>
          <table:table-cell table:style-name="ce2" table:formula="of:=[one_room_search.O6]-[one_room_search.P6]" office:value-type="float" office:value="110.5142920016" calcext:value-type="float">
            <text:p>110.51</text:p>
          </table:table-cell>
          <table:table-cell table:number-columns-repeated="2"/>
          <table:table-cell table:style-name="ce2" office:value-type="float" office:value="516.031609058" calcext:value-type="float">
            <text:p>516.03</text:p>
          </table:table-cell>
          <table:table-cell table:style-name="ce2" office:value-type="float" office:value="152.69244504" calcext:value-type="float">
            <text:p>152.69</text:p>
          </table:table-cell>
          <table:table-cell table:style-name="ce2" table:formula="of:=[one_room_search.T6]-[one_room_search.U6]" office:value-type="float" office:value="363.339164018" calcext:value-type="float">
            <text:p>363.34</text:p>
          </table:table-cell>
          <table:table-cell table:style-name="ce2"/>
          <table:table-cell table:style-name="ce2" office:value-type="float" office:value="472.290265799" calcext:value-type="float">
            <text:p>472.29</text:p>
          </table:table-cell>
          <table:table-cell table:style-name="ce2" office:value-type="float" office:value="85.3127450943" calcext:value-type="float">
            <text:p>85.31</text:p>
          </table:table-cell>
          <table:table-cell table:style-name="ce2" table:formula="of:=[one_room_search.X6]-[one_room_search.Y6]" office:value-type="float" office:value="386.9775207047" calcext:value-type="float">
            <text:p>386.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775.153986692" calcext:value-type="float">
            <text:p>775.15</text:p>
          </table:table-cell>
          <table:table-cell table:style-name="ce2" office:value-type="float" office:value="517.624473572" calcext:value-type="float">
            <text:p>517.62</text:p>
          </table:table-cell>
          <table:table-cell table:style-name="ce2" table:formula="of:=[one_room_search.AC6]-[one_room_search.AD6]" office:value-type="float" office:value="257.52951312" calcext:value-type="float">
            <text:p>257.53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1369.1473012" calcext:value-type="float">
            <text:p>1369.1473012</text:p>
          </table:table-cell>
          <table:table-cell office:value-type="float" office:value="462.209053516" calcext:value-type="float">
            <text:p>462.209053516</text:p>
          </table:table-cell>
          <table:table-cell table:style-name="ce2" table:formula="of:=[one_room_search.AG6]-[one_room_search.AH6]" office:value-type="float" office:value="906.938247684" calcext:value-type="float">
            <text:p>906.94</text:p>
          </table:table-cell>
          <table:table-cell office:value-type="float" office:value="10" calcext:value-type="float">
            <text:p>10</text:p>
          </table:table-cell>
          <table:table-cell office:value-type="float" office:value="329.841547966" calcext:value-type="float">
            <text:p>329.841547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358.441792965" calcext:value-type="float">
            <text:p>358.44</text:p>
          </table:table-cell>
          <table:table-cell table:style-name="ce2" office:value-type="float" office:value="95.9376180172" calcext:value-type="float">
            <text:p>95.94</text:p>
          </table:table-cell>
          <table:table-cell table:style-name="ce2" table:formula="of:=[one_room_search.B7]-[one_room_search.C7]" office:value-type="float" office:value="262.5041749478" calcext:value-type="float">
            <text:p>262.50</text:p>
          </table:table-cell>
          <table:table-cell table:style-name="ce2"/>
          <table:table-cell table:style-name="ce2" office:value-type="float" office:value="628.016088009" calcext:value-type="float">
            <text:p>628.02</text:p>
          </table:table-cell>
          <table:table-cell table:style-name="ce2" office:value-type="float" office:value="86.3883881569" calcext:value-type="float">
            <text:p>86.39</text:p>
          </table:table-cell>
          <table:table-cell table:style-name="ce2" table:formula="of:=[one_room_search.F7]-[one_room_search.G7]" office:value-type="float" office:value="541.6276998521" calcext:value-type="float">
            <text:p>541.63</text:p>
          </table:table-cell>
          <table:table-cell table:number-columns-repeated="2"/>
          <table:table-cell table:style-name="ce2" office:value-type="float" office:value="148.562063932" calcext:value-type="float">
            <text:p>148.56</text:p>
          </table:table-cell>
          <table:table-cell table:style-name="ce2" office:value-type="float" office:value="74.0481243134" calcext:value-type="float">
            <text:p>74.05</text:p>
          </table:table-cell>
          <table:table-cell table:style-name="ce2" table:formula="of:=[one_room_search.K7]-[one_room_search.L7]" office:value-type="float" office:value="74.5139396186" calcext:value-type="float">
            <text:p>74.51</text:p>
          </table:table-cell>
          <table:table-cell table:style-name="ce2"/>
          <table:table-cell table:style-name="ce2" office:value-type="float" office:value="449.116690636" calcext:value-type="float">
            <text:p>449.12</text:p>
          </table:table-cell>
          <table:table-cell table:style-name="ce2" office:value-type="float" office:value="95.5737941265" calcext:value-type="float">
            <text:p>95.57</text:p>
          </table:table-cell>
          <table:table-cell table:style-name="ce2" table:formula="of:=[one_room_search.O7]-[one_room_search.P7]" office:value-type="float" office:value="353.5428965095" calcext:value-type="float">
            <text:p>353.54</text:p>
          </table:table-cell>
          <table:table-cell table:number-columns-repeated="2"/>
          <table:table-cell table:style-name="ce2" office:value-type="float" office:value="419.570059538" calcext:value-type="float">
            <text:p>419.57</text:p>
          </table:table-cell>
          <table:table-cell table:style-name="ce2" office:value-type="float" office:value="77.9245374203" calcext:value-type="float">
            <text:p>77.92</text:p>
          </table:table-cell>
          <table:table-cell table:style-name="ce2" table:formula="of:=[one_room_search.T7]-[one_room_search.U7]" office:value-type="float" office:value="341.6455221177" calcext:value-type="float">
            <text:p>341.65</text:p>
          </table:table-cell>
          <table:table-cell table:style-name="ce2"/>
          <table:table-cell table:style-name="ce2" office:value-type="float" office:value="858.611993313" calcext:value-type="float">
            <text:p>858.61</text:p>
          </table:table-cell>
          <table:table-cell table:style-name="ce2" office:value-type="float" office:value="80.6271471977" calcext:value-type="float">
            <text:p>80.63</text:p>
          </table:table-cell>
          <table:table-cell table:style-name="ce2" table:formula="of:=[one_room_search.X7]-[one_room_search.Y7]" office:value-type="float" office:value="777.9848461153" calcext:value-type="float">
            <text:p>777.9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756.762353897" calcext:value-type="float">
            <text:p>756.76</text:p>
          </table:table-cell>
          <table:table-cell table:style-name="ce2" office:value-type="float" office:value="630.955423832" calcext:value-type="float">
            <text:p>630.96</text:p>
          </table:table-cell>
          <table:table-cell table:style-name="ce2" table:formula="of:=[one_room_search.AC7]-[one_room_search.AD7]" office:value-type="float" office:value="125.806930065" calcext:value-type="float">
            <text:p>125.81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1346.85583234" calcext:value-type="float">
            <text:p>1346.85583234</text:p>
          </table:table-cell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2801.13865042" calcext:value-type="float">
            <text:p>2801.138650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287.835073709" calcext:value-type="float">
            <text:p>287.84</text:p>
          </table:table-cell>
          <table:table-cell table:style-name="ce2" office:value-type="float" office:value="77.3778150082" calcext:value-type="float">
            <text:p>77.38</text:p>
          </table:table-cell>
          <table:table-cell table:style-name="ce2" table:formula="of:=[one_room_search.B8]-[one_room_search.C8]" office:value-type="float" office:value="210.4572587008" calcext:value-type="float">
            <text:p>210.46</text:p>
          </table:table-cell>
          <table:table-cell table:style-name="ce2"/>
          <table:table-cell table:style-name="ce2" office:value-type="float" office:value="113.377553701" calcext:value-type="float">
            <text:p>113.38</text:p>
          </table:table-cell>
          <table:table-cell table:style-name="ce2" office:value-type="float" office:value="74.1069102287" calcext:value-type="float">
            <text:p>74.11</text:p>
          </table:table-cell>
          <table:table-cell table:style-name="ce2" table:formula="of:=[one_room_search.F8]-[one_room_search.G8]" office:value-type="float" office:value="39.2706434723" calcext:value-type="float">
            <text:p>39.27</text:p>
          </table:table-cell>
          <table:table-cell table:number-columns-repeated="2"/>
          <table:table-cell table:style-name="ce2" office:value-type="float" office:value="103.94940424" calcext:value-type="float">
            <text:p>103.95</text:p>
          </table:table-cell>
          <table:table-cell table:style-name="ce2" office:value-type="float" office:value="77.9526352882" calcext:value-type="float">
            <text:p>77.95</text:p>
          </table:table-cell>
          <table:table-cell table:style-name="ce2" table:formula="of:=[one_room_search.K8]-[one_room_search.L8]" office:value-type="float" office:value="25.9967689518" calcext:value-type="float">
            <text:p>26.00</text:p>
          </table:table-cell>
          <table:table-cell table:style-name="ce2"/>
          <table:table-cell table:style-name="ce2" office:value-type="float" office:value="617.857666016" calcext:value-type="float">
            <text:p>617.86</text:p>
          </table:table-cell>
          <table:table-cell table:style-name="ce2" office:value-type="float" office:value="120.832186699" calcext:value-type="float">
            <text:p>120.83</text:p>
          </table:table-cell>
          <table:table-cell table:style-name="ce2" table:formula="of:=[one_room_search.O8]-[one_room_search.P8]" office:value-type="float" office:value="497.025479317" calcext:value-type="float">
            <text:p>497.03</text:p>
          </table:table-cell>
          <table:table-cell table:number-columns-repeated="2"/>
          <table:table-cell table:style-name="ce2" office:value-type="float" office:value="539.522620201" calcext:value-type="float">
            <text:p>539.52</text:p>
          </table:table-cell>
          <table:table-cell table:style-name="ce2" office:value-type="float" office:value="120.296654701" calcext:value-type="float">
            <text:p>120.30</text:p>
          </table:table-cell>
          <table:table-cell table:style-name="ce2" table:formula="of:=[one_room_search.T8]-[one_room_search.U8]" office:value-type="float" office:value="419.2259655" calcext:value-type="float">
            <text:p>419.23</text:p>
          </table:table-cell>
          <table:table-cell table:style-name="ce2"/>
          <table:table-cell table:style-name="ce2" office:value-type="float" office:value="502.869000673" calcext:value-type="float">
            <text:p>502.87</text:p>
          </table:table-cell>
          <table:table-cell table:style-name="ce2" office:value-type="float" office:value="71.8212380409" calcext:value-type="float">
            <text:p>71.82</text:p>
          </table:table-cell>
          <table:table-cell table:style-name="ce2" table:formula="of:=[one_room_search.X8]-[one_room_search.Y8]" office:value-type="float" office:value="431.0477626321" calcext:value-type="float">
            <text:p>431.0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878.112246037" calcext:value-type="float">
            <text:p>878.11</text:p>
          </table:table-cell>
          <table:table-cell table:style-name="ce2" office:value-type="float" office:value="695.710998058" calcext:value-type="float">
            <text:p>695.71</text:p>
          </table:table-cell>
          <table:table-cell table:style-name="ce2" table:formula="of:=[one_room_search.AC8]-[one_room_search.AD8]" office:value-type="float" office:value="182.401247979" calcext:value-type="float">
            <text:p>182.40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/>
          <table:table-cell table:style-name="ce2" office:value-type="float" office:value="134.523976088" calcext:value-type="float">
            <text:p>134.52</text:p>
          </table:table-cell>
          <table:table-cell table:style-name="ce2" office:value-type="float" office:value="68.5082485676" calcext:value-type="float">
            <text:p>68.51</text:p>
          </table:table-cell>
          <table:table-cell table:style-name="ce2" table:formula="of:=[one_room_search.B9]-[one_room_search.C9]" office:value-type="float" office:value="66.0157275204" calcext:value-type="float">
            <text:p>66.02</text:p>
          </table:table-cell>
          <table:table-cell table:style-name="ce2"/>
          <table:table-cell table:style-name="ce2" office:value-type="float" office:value="775.503843546" calcext:value-type="float">
            <text:p>775.50</text:p>
          </table:table-cell>
          <table:table-cell table:style-name="ce2" office:value-type="float" office:value="69.7423915863" calcext:value-type="float">
            <text:p>69.74</text:p>
          </table:table-cell>
          <table:table-cell table:style-name="ce2" table:formula="of:=[one_room_search.F9]-[one_room_search.G9]" office:value-type="float" office:value="705.7614519597" calcext:value-type="float">
            <text:p>705.76</text:p>
          </table:table-cell>
          <table:table-cell table:number-columns-repeated="2"/>
          <table:table-cell table:style-name="ce2" office:value-type="float" office:value="182.668864489" calcext:value-type="float">
            <text:p>182.67</text:p>
          </table:table-cell>
          <table:table-cell table:style-name="ce2" office:value-type="float" office:value="69.9216268063" calcext:value-type="float">
            <text:p>69.92</text:p>
          </table:table-cell>
          <table:table-cell table:style-name="ce2" table:formula="of:=[one_room_search.K9]-[one_room_search.L9]" office:value-type="float" office:value="112.7472376827" calcext:value-type="float">
            <text:p>112.75</text:p>
          </table:table-cell>
          <table:table-cell table:style-name="ce2"/>
          <table:table-cell table:style-name="ce2" office:value-type="float" office:value="343.665700197" calcext:value-type="float">
            <text:p>343.67</text:p>
          </table:table-cell>
          <table:table-cell table:style-name="ce2" office:value-type="float" office:value="82.7563233376" calcext:value-type="float">
            <text:p>82.76</text:p>
          </table:table-cell>
          <table:table-cell table:style-name="ce2" table:formula="of:=[one_room_search.O9]-[one_room_search.P9]" office:value-type="float" office:value="260.9093768594" calcext:value-type="float">
            <text:p>260.91</text:p>
          </table:table-cell>
          <table:table-cell table:number-columns-repeated="2"/>
          <table:table-cell table:style-name="ce2" office:value-type="float" office:value="476.477777958" calcext:value-type="float">
            <text:p>476.48</text:p>
          </table:table-cell>
          <table:table-cell table:style-name="ce2" office:value-type="float" office:value="111.048654556" calcext:value-type="float">
            <text:p>111.05</text:p>
          </table:table-cell>
          <table:table-cell table:style-name="ce2" table:formula="of:=[one_room_search.T9]-[one_room_search.U9]" office:value-type="float" office:value="365.429123402" calcext:value-type="float">
            <text:p>365.43</text:p>
          </table:table-cell>
          <table:table-cell table:style-name="ce2"/>
          <table:table-cell table:style-name="ce2" office:value-type="float" office:value="353.760957718" calcext:value-type="float">
            <text:p>353.76</text:p>
          </table:table-cell>
          <table:table-cell table:style-name="ce2" office:value-type="float" office:value="88.6263048649" calcext:value-type="float">
            <text:p>88.63</text:p>
          </table:table-cell>
          <table:table-cell table:style-name="ce2" table:formula="of:=[one_room_search.X9]-[one_room_search.Y9]" office:value-type="float" office:value="265.1346528531" calcext:value-type="float">
            <text:p>265.13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829.159554958" calcext:value-type="float">
            <text:p>829.16</text:p>
          </table:table-cell>
          <table:table-cell table:style-name="ce2" office:value-type="float" office:value="581.421534777" calcext:value-type="float">
            <text:p>581.42</text:p>
          </table:table-cell>
          <table:table-cell table:style-name="ce2" table:formula="of:=[one_room_search.AC9]-[one_room_search.AD9]" office:value-type="float" office:value="247.738020181" calcext:value-type="float">
            <text:p>247.74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/>
          <table:table-cell table:style-name="ce2" office:value-type="float" office:value="374.941551447" calcext:value-type="float">
            <text:p>374.94</text:p>
          </table:table-cell>
          <table:table-cell table:style-name="ce2" office:value-type="float" office:value="85.9570860863" calcext:value-type="float">
            <text:p>85.96</text:p>
          </table:table-cell>
          <table:table-cell table:style-name="ce2" table:formula="of:=[one_room_search.B10]-[one_room_search.C10]" office:value-type="float" office:value="288.9844653607" calcext:value-type="float">
            <text:p>288.98</text:p>
          </table:table-cell>
          <table:table-cell table:style-name="ce2"/>
          <table:table-cell table:style-name="ce2" office:value-type="float" office:value="966.268576622" calcext:value-type="float">
            <text:p>966.27</text:p>
          </table:table-cell>
          <table:table-cell table:style-name="ce2" office:value-type="float" office:value="83.0174088478" calcext:value-type="float">
            <text:p>83.02</text:p>
          </table:table-cell>
          <table:table-cell table:style-name="ce2" table:formula="of:=[one_room_search.F10]-[one_room_search.G10]" office:value-type="float" office:value="883.2511677742" calcext:value-type="float">
            <text:p>883.25</text:p>
          </table:table-cell>
          <table:table-cell table:number-columns-repeated="2"/>
          <table:table-cell table:style-name="ce2" office:value-type="float" office:value="277.392449856" calcext:value-type="float">
            <office:annotation draw:style-name="gr1" draw:text-style-name="P2" svg:width="82.18pt" svg:height="50.49pt" svg:x="936pt" svg:y="72.68pt" draw:caption-point-x="-17.29pt" draw:caption-point-y="42.8pt">
              <dc:date>2018-04-09T00:00:00</dc:date>
              <text:p text:style-name="P1"><text:span text:style-name="T1">Was turning half of the time (costmap clearance)</text:span></text:p>
            </office:annotation>
            <text:p>277.39</text:p>
          </table:table-cell>
          <table:table-cell table:style-name="ce2" office:value-type="float" office:value="58.3579318523" calcext:value-type="float">
            <text:p>58.36</text:p>
          </table:table-cell>
          <table:table-cell table:style-name="ce2" table:formula="of:=[one_room_search.K10]-[one_room_search.L10]" office:value-type="float" office:value="219.0345180037" calcext:value-type="float">
            <text:p>219.03</text:p>
          </table:table-cell>
          <table:table-cell table:style-name="ce2"/>
          <table:table-cell table:style-name="ce2" office:value-type="float" office:value="172.832864046" calcext:value-type="float">
            <text:p>172.83</text:p>
          </table:table-cell>
          <table:table-cell table:style-name="ce2" office:value-type="float" office:value="80.076274395" calcext:value-type="float">
            <text:p>80.08</text:p>
          </table:table-cell>
          <table:table-cell table:style-name="ce2" table:formula="of:=[one_room_search.O10]-[one_room_search.P10]" office:value-type="float" office:value="92.756589651" calcext:value-type="float">
            <text:p>92.76</text:p>
          </table:table-cell>
          <table:table-cell table:number-columns-repeated="2"/>
          <table:table-cell table:style-name="ce2" office:value-type="float" office:value="362.75027585" calcext:value-type="float">
            <text:p>362.75</text:p>
          </table:table-cell>
          <table:table-cell table:style-name="ce2" office:value-type="float" office:value="97.4348564148" calcext:value-type="float">
            <text:p>97.43</text:p>
          </table:table-cell>
          <table:table-cell table:style-name="ce2" table:formula="of:=[one_room_search.T10]-[one_room_search.U10]" office:value-type="float" office:value="265.3154194352" calcext:value-type="float">
            <text:p>265.32</text:p>
          </table:table-cell>
          <table:table-cell table:style-name="ce2"/>
          <table:table-cell table:style-name="ce2" office:value-type="float" office:value="939.669893742" calcext:value-type="float">
            <text:p>939.67</text:p>
          </table:table-cell>
          <table:table-cell table:style-name="ce2" office:value-type="float" office:value="225.052073002" calcext:value-type="float">
            <text:p>225.05</text:p>
          </table:table-cell>
          <table:table-cell table:style-name="ce2" table:formula="of:=[one_room_search.X10]-[one_room_search.Y10]" office:value-type="float" office:value="714.61782074" calcext:value-type="float">
            <text:p>714.62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523.604285717" calcext:value-type="float">
            <text:p>523.60</text:p>
          </table:table-cell>
          <table:table-cell table:style-name="ce2" office:value-type="float" office:value="415.035742998" calcext:value-type="float">
            <text:p>415.04</text:p>
          </table:table-cell>
          <table:table-cell table:style-name="ce2" table:formula="of:=[one_room_search.AC10]-[one_room_search.AD10]" office:value-type="float" office:value="108.568542719" calcext:value-type="float">
            <text:p>108.57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one_room_search.B6:.B10])" office:value-type="float" office:value="266.1628932" calcext:value-type="float">
            <text:p>266.16</text:p>
          </table:table-cell>
          <table:table-cell table:style-name="ce3" table:formula="of:=AVERAGE([one_room_search.C6:.C10])" office:value-type="float" office:value="92.48210701946" calcext:value-type="float">
            <text:p>92.48</text:p>
          </table:table-cell>
          <table:table-cell table:style-name="ce3" table:formula="of:=AVERAGE([one_room_search.D6:.D10])" office:value-type="float" office:value="173.68078618054" calcext:value-type="float">
            <text:p>173.68</text:p>
          </table:table-cell>
          <table:table-cell table:style-name="ce3"/>
          <table:table-cell table:style-name="ce3" table:formula="of:=AVERAGE([one_room_search.F6:.F10])" office:value-type="float" office:value="531.0130234718" calcext:value-type="float">
            <text:p>531.01</text:p>
          </table:table-cell>
          <table:table-cell table:style-name="ce3" table:formula="of:=AVERAGE([one_room_search.G6:.G10])" office:value-type="float" office:value="77.51694526672" calcext:value-type="float">
            <text:p>77.52</text:p>
          </table:table-cell>
          <table:table-cell table:style-name="ce3" table:formula="of:=AVERAGE([one_room_search.H6:.H10])" office:value-type="float" office:value="453.49607820508" calcext:value-type="float">
            <text:p>453.50</text:p>
          </table:table-cell>
          <table:table-cell table:number-columns-repeated="2"/>
          <table:table-cell table:style-name="ce3" table:formula="of:=AVERAGE([one_room_search.K6:.K10])" office:value-type="float" office:value="162.7547261716" calcext:value-type="float">
            <text:p>162.75</text:p>
          </table:table-cell>
          <table:table-cell table:style-name="ce3" table:formula="of:=AVERAGE([one_room_search.L6:.L10])" office:value-type="float" office:value="70.26406755448" calcext:value-type="float">
            <text:p>70.26</text:p>
          </table:table-cell>
          <table:table-cell table:style-name="ce3" table:formula="of:=AVERAGE([one_room_search.M6:.M10])" office:value-type="float" office:value="92.49065861712" calcext:value-type="float">
            <text:p>92.49</text:p>
          </table:table-cell>
          <table:table-cell table:style-name="ce3"/>
          <table:table-cell table:style-name="ce3" table:formula="of:=AVERAGE([one_room_search.O6:.O10])" office:value-type="float" office:value="355.7123970986" calcext:value-type="float">
            <text:p>355.71</text:p>
          </table:table-cell>
          <table:table-cell table:style-name="ce3" table:formula="of:=AVERAGE([one_room_search.P6:.P10])" office:value-type="float" office:value="92.7626702309" calcext:value-type="float">
            <text:p>92.76</text:p>
          </table:table-cell>
          <table:table-cell table:style-name="ce3" table:formula="of:=AVERAGE([one_room_search.Q6:.Q10])" office:value-type="float" office:value="262.9497268677" calcext:value-type="float">
            <text:p>262.95</text:p>
          </table:table-cell>
          <table:table-cell table:number-columns-repeated="2"/>
          <table:table-cell table:style-name="ce3" table:formula="of:=AVERAGE([one_room_search.T6:.T10])" office:value-type="float" office:value="462.870468521" calcext:value-type="float">
            <text:p>462.87</text:p>
          </table:table-cell>
          <table:table-cell table:style-name="ce3" table:formula="of:=AVERAGE([one_room_search.U6:.U10])" office:value-type="float" office:value="111.87942962642" calcext:value-type="float">
            <text:p>111.88</text:p>
          </table:table-cell>
          <table:table-cell table:style-name="ce3" table:formula="of:=AVERAGE([one_room_search.V6:.V10])" office:value-type="float" office:value="350.99103889458" calcext:value-type="float">
            <text:p>350.99</text:p>
          </table:table-cell>
          <table:table-cell table:style-name="ce3"/>
          <table:table-cell table:style-name="ce3" table:formula="of:=AVERAGE([one_room_search.X6:.X10])" office:value-type="float" office:value="625.440422249" calcext:value-type="float">
            <text:p>625.44</text:p>
          </table:table-cell>
          <table:table-cell table:style-name="ce3" table:formula="of:=AVERAGE([one_room_search.Y6:.Y10])" office:value-type="float" office:value="110.28790163996" calcext:value-type="float">
            <text:p>110.29</text:p>
          </table:table-cell>
          <table:table-cell table:style-name="ce3" table:formula="of:=AVERAGE([one_room_search.Z6:.Z10])" office:value-type="float" office:value="515.15252060904" calcext:value-type="float">
            <text:p>515.1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1132.64575911" calcext:value-type="float">
            <text:p>1132.65</text:p>
          </table:table-cell>
          <table:table-cell table:style-name="ce2" office:value-type="float" office:value="677.184596539" calcext:value-type="float">
            <text:p>677.18</text:p>
          </table:table-cell>
          <table:table-cell table:style-name="ce2" table:formula="of:=[one_room_search.AC11]-[one_room_search.AD11]" office:value-type="float" office:value="455.461162571" calcext:value-type="float">
            <text:p>455.46</text:p>
          </table:table-cell>
          <table:table-cell table:number-columns-repeated="8"/>
        </table:table-row>
        <table:table-row table:style-name="ro1">
          <table:table-cell table:number-columns-repeated="28"/>
          <table:table-cell table:style-name="ce3" table:formula="of:=AVERAGE([one_room_search.AC6:.AC11])" office:value-type="float" office:value="815.906364401833" calcext:value-type="float">
            <text:p>815.91</text:p>
          </table:table-cell>
          <table:table-cell table:style-name="ce3" table:formula="of:=AVERAGE([one_room_search.AD6:.AD11])" office:value-type="float" office:value="586.322128296" calcext:value-type="float">
            <text:p>586.32</text:p>
          </table:table-cell>
          <table:table-cell table:style-name="ce3" table:formula="of:=AVERAGE([one_room_search.AE6:.AE11])" office:value-type="float" office:value="229.584236105833" calcext:value-type="float">
            <text:p>229.58</text:p>
          </table:table-cell>
          <table:table-cell table:style-name="ce3"/>
          <table:table-cell table:style-name="ce3" table:formula="of:=AVERAGE([one_room_search.AG6:.AG11])" office:value-type="float" office:value="1358.00156677" calcext:value-type="float">
            <text:p>1358.00</text:p>
          </table:table-cell>
          <table:table-cell table:style-name="ce3" table:formula="of:=AVERAGE([one_room_search.AH6:.AH11])" office:value-type="float" office:value="462.209053516" calcext:value-type="float">
            <text:p>462.21</text:p>
          </table:table-cell>
          <table:table-cell table:style-name="ce3" table:formula="of:=AVERAGE([one_room_search.AI6:.AI11])" office:value-type="float" office:value="906.938247684" calcext:value-type="float">
            <text:p>906.94</text:p>
          </table:table-cell>
          <table:table-cell table:style-name="ce3"/>
          <table:table-cell table:style-name="ce3" table:formula="of:=AVERAGE([one_room_search.AK6:.AK11])" office:value-type="float" office:value="1565.490099193" calcext:value-type="float">
            <text:p>1565.49</text:p>
          </table:table-cell>
          <table:table-cell table:style-name="ce3" table:formula="of:=AVERAGE([one_room_search.AL6:.AL11])" office:value-type="float" office:value="0" calcext:value-type="float">
            <text:p>0.00</text:p>
          </table:table-cell>
          <table:table-cell/>
        </table:table-row>
        <table:table-row table:style-name="ro1" table:number-rows-repeated="3">
          <table:table-cell table:number-columns-repeated="39"/>
        </table:table-row>
        <table:table-row table:style-name="ro1">
          <table:table-cell office:value-type="string" calcext:value-type="string">
            <text:p>Spoon on Table, Path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Path</text:p>
          </table:table-cell>
          <table:table-cell table:number-columns-repeated="8"/>
          <table:table-cell office:value-type="string" calcext:value-type="string">
            <text:p>Remote on KitchenTable, Path</text:p>
          </table:table-cell>
          <table:table-cell table:number-columns-repeated="8"/>
          <table:table-cell office:value-type="string" calcext:value-type="string">
            <text:p>Lab Bowl behind coffee, Pat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9.17591400075" calcext:value-type="float">
            <text:p>9.18</text:p>
          </table:table-cell>
          <table:table-cell table:style-name="ce2" office:value-type="float" office:value="7.01476564022" calcext:value-type="float">
            <text:p>7.01</text:p>
          </table:table-cell>
          <table:table-cell table:style-name="ce2" table:formula="of:=[one_room_search.B19]-[one_room_search.C19]" office:value-type="float" office:value="2.16114836053" calcext:value-type="float">
            <text:p>2.16</text:p>
          </table:table-cell>
          <table:table-cell table:style-name="ce2"/>
          <table:table-cell table:style-name="ce2" office:value-type="float" office:value="8.44983318724" calcext:value-type="float">
            <text:p>8.45</text:p>
          </table:table-cell>
          <table:table-cell table:style-name="ce2" office:value-type="float" office:value="5.8648301269" calcext:value-type="float">
            <text:p>5.86</text:p>
          </table:table-cell>
          <table:table-cell table:style-name="ce2" table:formula="of:=[one_room_search.F19]-[one_room_search.G19]" office:value-type="float" office:value="2.58500306034" calcext:value-type="float">
            <text:p>2.59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5.1145863788" calcext:value-type="float">
            <text:p>15.11</text:p>
          </table:table-cell>
          <table:table-cell table:style-name="ce2" office:value-type="float" office:value="6.48887451129" calcext:value-type="float">
            <text:p>6.49</text:p>
          </table:table-cell>
          <table:table-cell table:style-name="ce2" table:formula="of:=[one_room_search.B20]-[one_room_search.C20]" office:value-type="float" office:value="8.62571186751" calcext:value-type="float">
            <text:p>8.63</text:p>
          </table:table-cell>
          <table:table-cell table:style-name="ce2"/>
          <table:table-cell table:style-name="ce2" office:value-type="float" office:value="32.9920591163" calcext:value-type="float">
            <text:p>32.99</text:p>
          </table:table-cell>
          <table:table-cell table:style-name="ce2" office:value-type="float" office:value="7.1790986332" calcext:value-type="float">
            <text:p>7.18</text:p>
          </table:table-cell>
          <table:table-cell table:style-name="ce2" table:formula="of:=[one_room_search.F20]-[one_room_search.G20]" office:value-type="float" office:value="25.8129604831" calcext:value-type="float">
            <text:p>25.81</text:p>
          </table:table-cell>
          <table:table-cell table:number-columns-repeated="2"/>
          <table:table-cell table:style-name="ce2" office:value-type="float" office:value="8.34350925411" calcext:value-type="float">
            <text:p>8.34</text:p>
          </table:table-cell>
          <table:table-cell table:style-name="ce2" office:value-type="float" office:value="5.74223779388" calcext:value-type="float">
            <text:p>5.74</text:p>
          </table:table-cell>
          <table:table-cell table:style-name="ce2" table:formula="of:=[one_room_search.K20]-[one_room_search.L20]" office:value-type="float" office:value="2.60127146023" calcext:value-type="float">
            <text:p>2.60</text:p>
          </table:table-cell>
          <table:table-cell table:style-name="ce2"/>
          <table:table-cell table:style-name="ce2" office:value-type="float" office:value="13.6534587347" calcext:value-type="float">
            <text:p>13.65</text:p>
          </table:table-cell>
          <table:table-cell table:style-name="ce2" office:value-type="float" office:value="7.1710440226" calcext:value-type="float">
            <text:p>7.17</text:p>
          </table:table-cell>
          <table:table-cell table:style-name="ce2" table:formula="of:=[one_room_search.O20]-[one_room_search.P20]" office:value-type="float" office:value="6.4824147121" calcext:value-type="float">
            <text:p>6.48</text:p>
          </table:table-cell>
          <table:table-cell table:number-columns-repeated="2"/>
          <table:table-cell table:style-name="ce2" office:value-type="float" office:value="24.8680307465" calcext:value-type="float">
            <text:p>24.87</text:p>
          </table:table-cell>
          <table:table-cell table:style-name="ce2" office:value-type="float" office:value="6.64855261193" calcext:value-type="float">
            <text:p>6.65</text:p>
          </table:table-cell>
          <table:table-cell table:style-name="ce2" table:formula="of:=[one_room_search.T20]-[one_room_search.U20]" office:value-type="float" office:value="18.21947813457" calcext:value-type="float">
            <text:p>18.22</text:p>
          </table:table-cell>
          <table:table-cell table:style-name="ce2"/>
          <table:table-cell table:style-name="ce2" office:value-type="float" office:value="25.6387306494" calcext:value-type="float">
            <text:p>25.64</text:p>
          </table:table-cell>
          <table:table-cell table:style-name="ce2" office:value-type="float" office:value="7.93397608034" calcext:value-type="float">
            <text:p>7.93</text:p>
          </table:table-cell>
          <table:table-cell table:style-name="ce2" table:formula="of:=[one_room_search.X20]-[one_room_search.Y20]" office:value-type="float" office:value="17.70475456906" calcext:value-type="float">
            <text:p>17.70</text:p>
          </table:table-cell>
          <table:table-cell table:number-columns-repeated="2"/>
          <table:table-cell table:style-name="ce2" office:value-type="float" office:value="79.2745684928" calcext:value-type="float">
            <text:p>79.27</text:p>
          </table:table-cell>
          <table:table-cell table:style-name="ce2" office:value-type="float" office:value="61.5163436149" calcext:value-type="float">
            <text:p>61.52</text:p>
          </table:table-cell>
          <table:table-cell table:style-name="ce2" table:formula="of:=[one_room_search.AC20]-[one_room_search.AD20]" office:value-type="float" office:value="17.7582248779" calcext:value-type="float">
            <text:p>17.76</text:p>
          </table:table-cell>
          <table:table-cell table:style-name="ce2"/>
          <table:table-cell table:style-name="ce2" office:value-type="float" office:value="117.122576147" calcext:value-type="float">
            <text:p>117.12</text:p>
          </table:table-cell>
          <table:table-cell table:style-name="ce2" office:value-type="float" office:value="69.090763672" calcext:value-type="float">
            <text:p>69.09</text:p>
          </table:table-cell>
          <table:table-cell table:style-name="ce2" office:value-type="float" office:value="117.122576147" calcext:value-type="float">
            <text:p>117.12</text:p>
          </table:table-cell>
          <table:table-cell/>
          <table:table-cell office:value-type="float" office:value="17.3335773261" calcext:value-type="float">
            <text:p>17.3335773261</text:p>
          </table:table-cell>
          <table:table-cell office:value-type="float" office:value="0.00377220869121" calcext:value-type="float">
            <text:p>0.0037722087</text:p>
          </table:table-cell>
          <table:table-cell/>
        </table:table-row>
        <table:table-row table:style-name="ro1">
          <table:table-cell/>
          <table:table-cell table:style-name="ce2" office:value-type="float" office:value="14.3831111313" calcext:value-type="float">
            <text:p>14.38</text:p>
          </table:table-cell>
          <table:table-cell table:style-name="ce2" office:value-type="float" office:value="7.33319541068" calcext:value-type="float">
            <text:p>7.33</text:p>
          </table:table-cell>
          <table:table-cell table:style-name="ce2" table:formula="of:=[one_room_search.B21]-[one_room_search.C21]" office:value-type="float" office:value="7.04991572062" calcext:value-type="float">
            <text:p>7.05</text:p>
          </table:table-cell>
          <table:table-cell table:style-name="ce2"/>
          <table:table-cell table:style-name="ce2" office:value-type="float" office:value="8.66017412066" calcext:value-type="float">
            <text:p>8.66</text:p>
          </table:table-cell>
          <table:table-cell table:style-name="ce2" office:value-type="float" office:value="6.98917906963" calcext:value-type="float">
            <text:p>6.99</text:p>
          </table:table-cell>
          <table:table-cell table:style-name="ce2" table:formula="of:=[one_room_search.F21]-[one_room_search.G21]" office:value-type="float" office:value="1.67099505103" calcext:value-type="float">
            <text:p>1.67</text:p>
          </table:table-cell>
          <table:table-cell table:number-columns-repeated="2"/>
          <table:table-cell table:style-name="ce2" office:value-type="float" office:value="11.1093388011" calcext:value-type="float">
            <text:p>11.11</text:p>
          </table:table-cell>
          <table:table-cell table:style-name="ce2" office:value-type="float" office:value="6.82405936359" calcext:value-type="float">
            <text:p>6.82</text:p>
          </table:table-cell>
          <table:table-cell table:style-name="ce2" table:formula="of:=[one_room_search.K21]-[one_room_search.L21]" office:value-type="float" office:value="4.28527943751" calcext:value-type="float">
            <text:p>4.29</text:p>
          </table:table-cell>
          <table:table-cell table:style-name="ce2"/>
          <table:table-cell table:style-name="ce2" office:value-type="float" office:value="18.9286186193" calcext:value-type="float">
            <text:p>18.93</text:p>
          </table:table-cell>
          <table:table-cell table:style-name="ce2" office:value-type="float" office:value="6.91914019608" calcext:value-type="float">
            <text:p>6.92</text:p>
          </table:table-cell>
          <table:table-cell table:style-name="ce2" table:formula="of:=[one_room_search.O21]-[one_room_search.P21]" office:value-type="float" office:value="12.00947842322" calcext:value-type="float">
            <text:p>12.01</text:p>
          </table:table-cell>
          <table:table-cell table:number-columns-repeated="2"/>
          <table:table-cell table:style-name="ce2" office:value-type="float" office:value="19.5945768496" calcext:value-type="float">
            <text:p>19.59</text:p>
          </table:table-cell>
          <table:table-cell table:style-name="ce2" office:value-type="float" office:value="6.13151621893" calcext:value-type="float">
            <text:p>6.13</text:p>
          </table:table-cell>
          <table:table-cell table:style-name="ce2" table:formula="of:=[one_room_search.T21]-[one_room_search.U21]" office:value-type="float" office:value="13.46306063067" calcext:value-type="float">
            <text:p>13.46</text:p>
          </table:table-cell>
          <table:table-cell table:style-name="ce2"/>
          <table:table-cell table:style-name="ce2" office:value-type="float" office:value="38.5690868089" calcext:value-type="float">
            <text:p>38.57</text:p>
          </table:table-cell>
          <table:table-cell table:style-name="ce2" office:value-type="float" office:value="5.77973492331" calcext:value-type="float">
            <text:p>5.78</text:p>
          </table:table-cell>
          <table:table-cell table:style-name="ce2" table:formula="of:=[one_room_search.X21]-[one_room_search.Y21]" office:value-type="float" office:value="32.78935188559" calcext:value-type="float">
            <text:p>32.79</text:p>
          </table:table-cell>
          <table:table-cell table:number-columns-repeated="2"/>
          <table:table-cell table:style-name="ce2" office:value-type="float" office:value="71.3682009098" calcext:value-type="float">
            <text:p>71.37</text:p>
          </table:table-cell>
          <table:table-cell table:style-name="ce2" office:value-type="float" office:value="68.053510202" calcext:value-type="float">
            <text:p>68.05</text:p>
          </table:table-cell>
          <table:table-cell table:style-name="ce2" table:formula="of:=[one_room_search.AC21]-[one_room_search.AD21]" office:value-type="float" office:value="3.3146907078" calcext:value-type="float">
            <text:p>3.31</text:p>
          </table:table-cell>
          <table:table-cell table:style-name="ce2"/>
          <table:table-cell office:value-type="float" office:value="58.5913538282" calcext:value-type="float">
            <text:p>58.5913538282</text:p>
          </table:table-cell>
          <table:table-cell/>
          <table:table-cell table:style-name="ce2"/>
          <table:table-cell/>
          <table:table-cell office:value-type="float" office:value="192.123849311" calcext:value-type="float">
            <text:p>192.123849311</text:p>
          </table:table-cell>
          <table:table-cell office:value-type="float" office:value="0.00378299271483" calcext:value-type="float">
            <text:p>0.0037829927</text:p>
          </table:table-cell>
          <table:table-cell/>
        </table:table-row>
        <table:table-row table:style-name="ro1">
          <table:table-cell/>
          <table:table-cell table:style-name="ce2" office:value-type="float" office:value="5.47550647171" calcext:value-type="float">
            <text:p>5.48</text:p>
          </table:table-cell>
          <table:table-cell table:style-name="ce2" office:value-type="float" office:value="4.05412606815" calcext:value-type="float">
            <text:p>4.05</text:p>
          </table:table-cell>
          <table:table-cell table:style-name="ce2" table:formula="of:=[one_room_search.B22]-[one_room_search.C22]" office:value-type="float" office:value="1.42138040356" calcext:value-type="float">
            <text:p>1.42</text:p>
          </table:table-cell>
          <table:table-cell table:style-name="ce2"/>
          <table:table-cell table:style-name="ce2" office:value-type="float" office:value="46.952306282" calcext:value-type="float">
            <text:p>46.95</text:p>
          </table:table-cell>
          <table:table-cell table:style-name="ce2" office:value-type="float" office:value="6.36701513094" calcext:value-type="float">
            <text:p>6.37</text:p>
          </table:table-cell>
          <table:table-cell table:style-name="ce2" table:formula="of:=[one_room_search.F22]-[one_room_search.G22]" office:value-type="float" office:value="40.58529115106" calcext:value-type="float">
            <text:p>40.59</text:p>
          </table:table-cell>
          <table:table-cell table:number-columns-repeated="2"/>
          <table:table-cell table:style-name="ce2" office:value-type="float" office:value="8.36658855041" calcext:value-type="float">
            <text:p>8.37</text:p>
          </table:table-cell>
          <table:table-cell table:style-name="ce2" office:value-type="float" office:value="6.08700792374" calcext:value-type="float">
            <text:p>6.09</text:p>
          </table:table-cell>
          <table:table-cell table:style-name="ce2" table:formula="of:=[one_room_search.K22]-[one_room_search.L22]" office:value-type="float" office:value="2.27958062667" calcext:value-type="float">
            <text:p>2.28</text:p>
          </table:table-cell>
          <table:table-cell table:style-name="ce2"/>
          <table:table-cell table:style-name="ce2" office:value-type="float" office:value="29.6828061196" calcext:value-type="float">
            <text:p>29.68</text:p>
          </table:table-cell>
          <table:table-cell table:style-name="ce2" office:value-type="float" office:value="8.98152174672" calcext:value-type="float">
            <text:p>8.98</text:p>
          </table:table-cell>
          <table:table-cell table:style-name="ce2" table:formula="of:=[one_room_search.O22]-[one_room_search.P22]" office:value-type="float" office:value="20.70128437288" calcext:value-type="float">
            <text:p>20.70</text:p>
          </table:table-cell>
          <table:table-cell table:number-columns-repeated="2"/>
          <table:table-cell table:style-name="ce2" office:value-type="float" office:value="20.3705021836" calcext:value-type="float">
            <text:p>20.37</text:p>
          </table:table-cell>
          <table:table-cell table:style-name="ce2" office:value-type="float" office:value="3.76784267449" calcext:value-type="float">
            <text:p>3.77</text:p>
          </table:table-cell>
          <table:table-cell table:style-name="ce2" table:formula="of:=[one_room_search.T22]-[one_room_search.U22]" office:value-type="float" office:value="16.60265950911" calcext:value-type="float">
            <text:p>16.60</text:p>
          </table:table-cell>
          <table:table-cell table:style-name="ce2"/>
          <table:table-cell table:style-name="ce2" office:value-type="float" office:value="25.6548830724" calcext:value-type="float">
            <text:p>25.65</text:p>
          </table:table-cell>
          <table:table-cell table:style-name="ce2" office:value-type="float" office:value="4.99043668563" calcext:value-type="float">
            <text:p>4.99</text:p>
          </table:table-cell>
          <table:table-cell table:style-name="ce2" table:formula="of:=[one_room_search.X22]-[one_room_search.Y22]" office:value-type="float" office:value="20.66444638677" calcext:value-type="float">
            <text:p>20.66</text:p>
          </table:table-cell>
          <table:table-cell table:number-columns-repeated="2"/>
          <table:table-cell table:style-name="ce2" office:value-type="float" office:value="71.822349065" calcext:value-type="float">
            <text:p>71.82</text:p>
          </table:table-cell>
          <table:table-cell table:style-name="ce2" office:value-type="float" office:value="64.7764525557" calcext:value-type="float">
            <text:p>64.78</text:p>
          </table:table-cell>
          <table:table-cell table:style-name="ce2" table:formula="of:=[one_room_search.AC22]-[one_room_search.AD22]" office:value-type="float" office:value="7.04589650929999" calcext:value-type="float">
            <text:p>7.05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/>
          <table:table-cell table:style-name="ce2" office:value-type="float" office:value="19.0068480382" calcext:value-type="float">
            <text:p>19.01</text:p>
          </table:table-cell>
          <table:table-cell table:style-name="ce2" office:value-type="float" office:value="8.55068776034" calcext:value-type="float">
            <text:p>8.55</text:p>
          </table:table-cell>
          <table:table-cell table:style-name="ce2" table:formula="of:=[one_room_search.B23]-[one_room_search.C23]" office:value-type="float" office:value="10.45616027786" calcext:value-type="float">
            <text:p>10.46</text:p>
          </table:table-cell>
          <table:table-cell table:style-name="ce2"/>
          <table:table-cell table:style-name="ce2" office:value-type="float" office:value="53.2613641221" calcext:value-type="float">
            <text:p>53.26</text:p>
          </table:table-cell>
          <table:table-cell table:style-name="ce2" office:value-type="float" office:value="5.81856285337" calcext:value-type="float">
            <text:p>5.82</text:p>
          </table:table-cell>
          <table:table-cell table:style-name="ce2" table:formula="of:=[one_room_search.F23]-[one_room_search.G23]" office:value-type="float" office:value="47.44280126873" calcext:value-type="float">
            <text:p>47.44</text:p>
          </table:table-cell>
          <table:table-cell table:number-columns-repeated="2"/>
          <table:table-cell table:style-name="ce2" office:value-type="float" office:value="11.7526418414" calcext:value-type="float">
            <text:p>11.75</text:p>
          </table:table-cell>
          <table:table-cell table:style-name="ce2" office:value-type="float" office:value="4.75004220388" calcext:value-type="float">
            <text:p>4.75</text:p>
          </table:table-cell>
          <table:table-cell table:style-name="ce2" table:formula="of:=[one_room_search.K23]-[one_room_search.L23]" office:value-type="float" office:value="7.00259963752" calcext:value-type="float">
            <text:p>7.00</text:p>
          </table:table-cell>
          <table:table-cell table:style-name="ce2"/>
          <table:table-cell table:style-name="ce2" office:value-type="float" office:value="14.55007018" calcext:value-type="float">
            <text:p>14.55</text:p>
          </table:table-cell>
          <table:table-cell table:style-name="ce2" office:value-type="float" office:value="4.98845842471" calcext:value-type="float">
            <text:p>4.99</text:p>
          </table:table-cell>
          <table:table-cell table:style-name="ce2" table:formula="of:=[one_room_search.O23]-[one_room_search.P23]" office:value-type="float" office:value="9.56161175529" calcext:value-type="float">
            <text:p>9.56</text:p>
          </table:table-cell>
          <table:table-cell table:number-columns-repeated="2"/>
          <table:table-cell table:style-name="ce2" office:value-type="float" office:value="26.7939738166" calcext:value-type="float">
            <text:p>26.79</text:p>
          </table:table-cell>
          <table:table-cell table:style-name="ce2" office:value-type="float" office:value="6.87104768793" calcext:value-type="float">
            <text:p>6.87</text:p>
          </table:table-cell>
          <table:table-cell table:style-name="ce2" table:formula="of:=[one_room_search.T23]-[one_room_search.U23]" office:value-type="float" office:value="19.92292612867" calcext:value-type="float">
            <text:p>19.92</text:p>
          </table:table-cell>
          <table:table-cell table:style-name="ce2"/>
          <table:table-cell table:style-name="ce2" office:value-type="float" office:value="20.8873423727" calcext:value-type="float">
            <text:p>20.89</text:p>
          </table:table-cell>
          <table:table-cell table:style-name="ce2" office:value-type="float" office:value="8.72368303756" calcext:value-type="float">
            <text:p>8.72</text:p>
          </table:table-cell>
          <table:table-cell table:style-name="ce2" table:formula="of:=[one_room_search.X23]-[one_room_search.Y23]" office:value-type="float" office:value="12.16365933514" calcext:value-type="float">
            <text:p>12.16</text:p>
          </table:table-cell>
          <table:table-cell table:number-columns-repeated="2"/>
          <table:table-cell table:style-name="ce2" office:value-type="float" office:value="88.0483343628" calcext:value-type="float">
            <text:p>88.05</text:p>
          </table:table-cell>
          <table:table-cell table:style-name="ce2" office:value-type="float" office:value="70.6873616836" calcext:value-type="float">
            <text:p>70.69</text:p>
          </table:table-cell>
          <table:table-cell table:style-name="ce2" table:formula="of:=[one_room_search.AC23]-[one_room_search.AD23]" office:value-type="float" office:value="17.3609726792" calcext:value-type="float">
            <text:p>17.36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one_room_search.B19:.B23])" office:value-type="float" office:value="12.631193204152" calcext:value-type="float">
            <text:p>12.63</text:p>
          </table:table-cell>
          <table:table-cell table:style-name="ce3" table:formula="of:=AVERAGE([one_room_search.C19:.C23])" office:value-type="float" office:value="6.688329878136" calcext:value-type="float">
            <text:p>6.69</text:p>
          </table:table-cell>
          <table:table-cell table:style-name="ce3" table:formula="of:=AVERAGE([one_room_search.D19:.D23])" office:value-type="float" office:value="5.942863326016" calcext:value-type="float">
            <text:p>5.94</text:p>
          </table:table-cell>
          <table:table-cell table:style-name="ce3"/>
          <table:table-cell table:style-name="ce3" table:formula="of:=AVERAGE([one_room_search.F19:.F23])" office:value-type="float" office:value="30.06314736566" calcext:value-type="float">
            <text:p>30.06</text:p>
          </table:table-cell>
          <table:table-cell table:style-name="ce3" table:formula="of:=AVERAGE([one_room_search.G19:.G23])" office:value-type="float" office:value="6.443737162808" calcext:value-type="float">
            <text:p>6.44</text:p>
          </table:table-cell>
          <table:table-cell table:style-name="ce3" table:formula="of:=AVERAGE([one_room_search.H19:.H23])" office:value-type="float" office:value="23.619410202852" calcext:value-type="float">
            <text:p>23.62</text:p>
          </table:table-cell>
          <table:table-cell table:number-columns-repeated="2"/>
          <table:table-cell table:style-name="ce2" office:value-type="float" office:value="9.6394934685" calcext:value-type="float">
            <text:p>9.64</text:p>
          </table:table-cell>
          <table:table-cell table:style-name="ce2" office:value-type="float" office:value="4.6360224369" calcext:value-type="float">
            <text:p>4.64</text:p>
          </table:table-cell>
          <table:table-cell table:style-name="ce2" table:formula="of:=[one_room_search.K24]-[one_room_search.L24]" office:value-type="float" office:value="5.0034710316" calcext:value-type="float">
            <text:p>5.00</text:p>
          </table:table-cell>
          <table:table-cell table:style-name="ce2"/>
          <table:table-cell table:style-name="ce2" office:value-type="float" office:value="11.7097121667" calcext:value-type="float">
            <text:p>11.71</text:p>
          </table:table-cell>
          <table:table-cell table:style-name="ce2" office:value-type="float" office:value="7.46832760582" calcext:value-type="float">
            <text:p>7.47</text:p>
          </table:table-cell>
          <table:table-cell table:style-name="ce2" table:formula="of:=[one_room_search.O24]-[one_room_search.P24]" office:value-type="float" office:value="4.24138456088" calcext:value-type="float">
            <text:p>4.24</text:p>
          </table:table-cell>
          <table:table-cell table:number-columns-repeated="2"/>
          <table:table-cell table:style-name="ce2" office:value-type="float" office:value="14.8839112498" calcext:value-type="float">
            <text:p>14.88</text:p>
          </table:table-cell>
          <table:table-cell table:style-name="ce2" office:value-type="float" office:value="6.40722926927" calcext:value-type="float">
            <text:p>6.41</text:p>
          </table:table-cell>
          <table:table-cell table:style-name="ce2" table:formula="of:=[one_room_search.T24]-[one_room_search.U24]" office:value-type="float" office:value="8.47668198053" calcext:value-type="float">
            <text:p>8.48</text:p>
          </table:table-cell>
          <table:table-cell table:style-name="ce2"/>
          <table:table-cell table:style-name="ce2" office:value-type="float" office:value="47.5531648585" calcext:value-type="float">
            <text:p>47.55</text:p>
          </table:table-cell>
          <table:table-cell table:style-name="ce2" office:value-type="float" office:value="8.05721107133" calcext:value-type="float">
            <text:p>8.06</text:p>
          </table:table-cell>
          <table:table-cell table:style-name="ce2" table:formula="of:=[one_room_search.X24]-[one_room_search.Y24]" office:value-type="float" office:value="39.49595378717" calcext:value-type="float">
            <text:p>39.50</text:p>
          </table:table-cell>
          <table:table-cell table:number-columns-repeated="2"/>
          <table:table-cell table:style-name="ce2" office:value-type="float" office:value="60.3420370807" calcext:value-type="float">
            <text:p>60.34</text:p>
          </table:table-cell>
          <table:table-cell table:style-name="ce2" office:value-type="float" office:value="58.0404612151" calcext:value-type="float">
            <text:p>58.04</text:p>
          </table:table-cell>
          <table:table-cell table:style-name="ce2" table:formula="of:=[one_room_search.AC24]-[one_room_search.AD24]" office:value-type="float" office:value="2.3015758656" calcext:value-type="float">
            <text:p>2.30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number-columns-repeated="10"/>
          <table:table-cell table:style-name="ce3" table:formula="of:=AVERAGE([one_room_search.K20:.K24])" office:value-type="float" office:value="9.842314383104" calcext:value-type="float">
            <text:p>9.84</text:p>
          </table:table-cell>
          <table:table-cell table:style-name="ce3" table:formula="of:=AVERAGE([one_room_search.L20:.L24])" office:value-type="float" office:value="5.607873944398" calcext:value-type="float">
            <text:p>5.61</text:p>
          </table:table-cell>
          <table:table-cell table:style-name="ce3" table:formula="of:=AVERAGE([one_room_search.M20:.M24])" office:value-type="float" office:value="4.234440438706" calcext:value-type="float">
            <text:p>4.23</text:p>
          </table:table-cell>
          <table:table-cell table:style-name="ce3"/>
          <table:table-cell table:style-name="ce3" table:formula="of:=AVERAGE([one_room_search.O20:.O24])" office:value-type="float" office:value="17.70493316406" calcext:value-type="float">
            <text:p>17.70</text:p>
          </table:table-cell>
          <table:table-cell table:style-name="ce3" table:formula="of:=AVERAGE([one_room_search.P20:.P24])" office:value-type="float" office:value="7.105698399186" calcext:value-type="float">
            <text:p>7.11</text:p>
          </table:table-cell>
          <table:table-cell table:style-name="ce3" table:formula="of:=AVERAGE([one_room_search.Q20:.Q24])" office:value-type="float" office:value="10.599234764874" calcext:value-type="float">
            <text:p>10.60</text:p>
          </table:table-cell>
          <table:table-cell table:number-columns-repeated="2"/>
          <table:table-cell table:style-name="ce3" table:formula="of:=AVERAGE([one_room_search.T20:.T24])" office:value-type="float" office:value="21.30219896922" calcext:value-type="float">
            <text:p>21.30</text:p>
          </table:table-cell>
          <table:table-cell table:style-name="ce3" table:formula="of:=AVERAGE([one_room_search.U20:.U24])" office:value-type="float" office:value="5.96523769251" calcext:value-type="float">
            <text:p>5.97</text:p>
          </table:table-cell>
          <table:table-cell table:style-name="ce3" table:formula="of:=AVERAGE([one_room_search.V20:.V24])" office:value-type="float" office:value="15.33696127671" calcext:value-type="float">
            <text:p>15.34</text:p>
          </table:table-cell>
          <table:table-cell table:style-name="ce3"/>
          <table:table-cell table:style-name="ce3" table:formula="of:=AVERAGE([one_room_search.X20:.X24])" office:value-type="float" office:value="31.66064155238" calcext:value-type="float">
            <text:p>31.66</text:p>
          </table:table-cell>
          <table:table-cell table:style-name="ce3" table:formula="of:=AVERAGE([one_room_search.Y20:.Y24])" office:value-type="float" office:value="7.097008359634" calcext:value-type="float">
            <text:p>7.10</text:p>
          </table:table-cell>
          <table:table-cell table:style-name="ce3" table:formula="of:=AVERAGE([one_room_search.Z20:.Z24])" office:value-type="float" office:value="24.563633192746" calcext:value-type="float">
            <text:p>24.56</text:p>
          </table:table-cell>
          <table:table-cell table:number-columns-repeated="2"/>
          <table:table-cell table:style-name="ce2" office:value-type="float" office:value="118.189193689" calcext:value-type="float">
            <text:p>118.19</text:p>
          </table:table-cell>
          <table:table-cell table:style-name="ce2" office:value-type="float" office:value="86.9246536191" calcext:value-type="float">
            <text:p>86.92</text:p>
          </table:table-cell>
          <table:table-cell table:style-name="ce2" table:formula="of:=[one_room_search.AC25]-[one_room_search.AD25]" office:value-type="float" office:value="31.2645400699" calcext:value-type="float">
            <text:p>31.26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28"/>
          <table:table-cell table:style-name="ce3" table:formula="of:=AVERAGE([one_room_search.AC20:.AC26])" office:value-type="float" office:value="81.5074472666833" calcext:value-type="float">
            <text:p>81.51</text:p>
          </table:table-cell>
          <table:table-cell table:style-name="ce3" table:formula="of:=AVERAGE([one_room_search.AD20:.AD26])" office:value-type="float" office:value="68.3331304817333" calcext:value-type="float">
            <text:p>68.33</text:p>
          </table:table-cell>
          <table:table-cell table:style-name="ce3" table:formula="of:=AVERAGE([one_room_search.AE20:.AE26])" office:value-type="float" office:value="13.17431678495" calcext:value-type="float">
            <text:p>13.17</text:p>
          </table:table-cell>
          <table:table-cell table:style-name="ce3"/>
          <table:table-cell table:style-name="ce3" table:formula="of:=AVERAGE([one_room_search.AG20:.AG26])" office:value-type="float" office:value="87.8569649876" calcext:value-type="float">
            <text:p>87.86</text:p>
          </table:table-cell>
          <table:table-cell table:style-name="ce3" table:formula="of:=AVERAGE([one_room_search.AH20:.AH26])" office:value-type="float" office:value="69.090763672" calcext:value-type="float">
            <text:p>69.09</text:p>
          </table:table-cell>
          <table:table-cell table:style-name="ce3" table:formula="of:=AVERAGE([one_room_search.AI20:.AI26])" office:value-type="float" office:value="117.122576147" calcext:value-type="float">
            <text:p>117.12</text:p>
          </table:table-cell>
          <table:table-cell table:style-name="ce3"/>
          <table:table-cell table:style-name="ce3" table:formula="of:=AVERAGE([one_room_search.AK20:.AK26])" office:value-type="float" office:value="104.72871331855" calcext:value-type="float">
            <text:p>104.73</text:p>
          </table:table-cell>
          <table:table-cell table:style-name="ce3" table:formula="of:=AVERAGE([one_room_search.AL20:.AL26])" office:value-type="float" office:value="0.00377760070302" calcext:value-type="float">
            <text:p>0.00</text:p>
          </table:table-cell>
          <table:table-cell/>
        </table:table-row>
        <table:table-row table:style-name="ro1" table:number-rows-repeated="2">
          <table:table-cell table:number-columns-repeated="39"/>
        </table:table-row>
        <table:table-row table:style-name="ro1">
          <table:table-cell office:value-type="string" calcext:value-type="string">
            <text:p>Spoon on Table, Angle Path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Angle Path</text:p>
          </table:table-cell>
          <table:table-cell table:number-columns-repeated="8"/>
          <table:table-cell office:value-type="string" calcext:value-type="string">
            <text:p>Remote on KitchenTable, Angle Path</text:p>
          </table:table-cell>
          <table:table-cell table:number-columns-repeated="8"/>
          <table:table-cell office:value-type="string" calcext:value-type="string">
            <text:p>Lab Bowl behind coffee, Angle Pat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460.383424238" calcext:value-type="float">
            <text:p>460.38</text:p>
          </table:table-cell>
          <table:table-cell table:style-name="ce2" office:value-type="float" office:value="193.621728097" calcext:value-type="float">
            <text:p>193.62</text:p>
          </table:table-cell>
          <table:table-cell table:style-name="ce2" table:formula="of:=[one_room_search.B33]-[one_room_search.C33]" office:value-type="float" office:value="266.761696141" calcext:value-type="float">
            <text:p>266.76</text:p>
          </table:table-cell>
          <table:table-cell table:style-name="ce2"/>
          <table:table-cell table:style-name="ce2" office:value-type="float" office:value="634.731752027" calcext:value-type="float">
            <text:p>634.73</text:p>
          </table:table-cell>
          <table:table-cell table:style-name="ce2" office:value-type="float" office:value="205.507572715" calcext:value-type="float">
            <text:p>205.51</text:p>
          </table:table-cell>
          <table:table-cell table:style-name="ce2" table:formula="of:=[one_room_search.F33]-[one_room_search.G33]" office:value-type="float" office:value="429.224179312" calcext:value-type="float">
            <text:p>429.22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225.14776544" calcext:value-type="float">
            <text:p>1225.15</text:p>
          </table:table-cell>
          <table:table-cell table:style-name="ce2" office:value-type="float" office:value="239.739869973" calcext:value-type="float">
            <text:p>239.74</text:p>
          </table:table-cell>
          <table:table-cell table:style-name="ce2" table:formula="of:=[one_room_search.B34]-[one_room_search.C34]" office:value-type="float" office:value="985.407895467" calcext:value-type="float">
            <text:p>985.41</text:p>
          </table:table-cell>
          <table:table-cell table:style-name="ce2"/>
          <table:table-cell table:style-name="ce2" office:value-type="float" office:value="2132.0158316" calcext:value-type="float">
            <text:p>2132.02</text:p>
          </table:table-cell>
          <table:table-cell table:style-name="ce2" office:value-type="float" office:value="227.343817104" calcext:value-type="float">
            <text:p>227.34</text:p>
          </table:table-cell>
          <table:table-cell table:style-name="ce2" table:formula="of:=[one_room_search.F34]-[one_room_search.G34]" office:value-type="float" office:value="1904.672014496" calcext:value-type="float">
            <text:p>1904.67</text:p>
          </table:table-cell>
          <table:table-cell table:number-columns-repeated="2"/>
          <table:table-cell table:style-name="ce2" office:value-type="float" office:value="256.723166708" calcext:value-type="float">
            <text:p>256.72</text:p>
          </table:table-cell>
          <table:table-cell table:style-name="ce2" office:value-type="float" office:value="218.320782764" calcext:value-type="float">
            <text:p>218.32</text:p>
          </table:table-cell>
          <table:table-cell table:style-name="ce2" table:formula="of:=[one_room_search.K34]-[one_room_search.L34]" office:value-type="float" office:value="38.402383944" calcext:value-type="float">
            <text:p>38.40</text:p>
          </table:table-cell>
          <table:table-cell table:style-name="ce2"/>
          <table:table-cell table:style-name="ce2" office:value-type="float" office:value="734.418690489" calcext:value-type="float">
            <text:p>734.42</text:p>
          </table:table-cell>
          <table:table-cell table:style-name="ce2" office:value-type="float" office:value="242.559389342" calcext:value-type="float">
            <text:p>242.56</text:p>
          </table:table-cell>
          <table:table-cell table:style-name="ce2" table:formula="of:=[one_room_search.O34]-[one_room_search.P34]" office:value-type="float" office:value="491.859301147" calcext:value-type="float">
            <text:p>491.86</text:p>
          </table:table-cell>
          <table:table-cell table:number-columns-repeated="2"/>
          <table:table-cell table:style-name="ce2" office:value-type="float" office:value="1552.81302562" calcext:value-type="float">
            <text:p>1552.81</text:p>
          </table:table-cell>
          <table:table-cell table:style-name="ce2" office:value-type="float" office:value="373.66760746" calcext:value-type="float">
            <text:p>373.67</text:p>
          </table:table-cell>
          <table:table-cell table:style-name="ce2" table:formula="of:=[one_room_search.T34]-[one_room_search.U34]" office:value-type="float" office:value="1179.14541816" calcext:value-type="float">
            <text:p>1179.15</text:p>
          </table:table-cell>
          <table:table-cell table:style-name="ce2"/>
          <table:table-cell table:style-name="ce2" office:value-type="float" office:value="1292.17295464" calcext:value-type="float">
            <text:p>1292.17</text:p>
          </table:table-cell>
          <table:table-cell table:style-name="ce2" office:value-type="float" office:value="212.441345305" calcext:value-type="float">
            <text:p>212.44</text:p>
          </table:table-cell>
          <table:table-cell table:style-name="ce2" table:formula="of:=[one_room_search.X34]-[one_room_search.Y34]" office:value-type="float" office:value="1079.731609335" calcext:value-type="float">
            <text:p>1079.73</text:p>
          </table:table-cell>
          <table:table-cell table:number-columns-repeated="2"/>
          <table:table-cell table:style-name="ce2" office:value-type="float" office:value="2595.69361728" calcext:value-type="float">
            <text:p>2595.69</text:p>
          </table:table-cell>
          <table:table-cell table:style-name="ce2" office:value-type="float" office:value="1598.38720981" calcext:value-type="float">
            <text:p>1598.39</text:p>
          </table:table-cell>
          <table:table-cell table:style-name="ce2" table:formula="of:=[one_room_search.AC34]-[one_room_search.AD34]" office:value-type="float" office:value="997.30640747" calcext:value-type="float">
            <text:p>997.31</text:p>
          </table:table-cell>
          <table:table-cell table:style-name="ce2"/>
          <table:table-cell table:style-name="ce2" office:value-type="float" office:value="3899.49101991" calcext:value-type="float">
            <text:p>3899.49</text:p>
          </table:table-cell>
          <table:table-cell table:style-name="ce2" office:value-type="float" office:value="1374.67794718" calcext:value-type="float">
            <text:p>1374.68</text:p>
          </table:table-cell>
          <table:table-cell table:style-name="ce2" table:formula="of:=[one_room_search.AG34]-[one_room_search.AH34]" office:value-type="float" office:value="2524.81307273" calcext:value-type="float">
            <text:p>2524.81</text:p>
          </table:table-cell>
          <table:table-cell/>
          <table:table-cell office:value-type="float" office:value="1042.72459808" calcext:value-type="float">
            <text:p>1042.72459808</text:p>
          </table:table-cell>
          <table:table-cell office:value-type="float" office:value="0.076699256897" calcext:value-type="float">
            <text:p>0.0766992569</text:p>
          </table:table-cell>
          <table:table-cell/>
        </table:table-row>
        <table:table-row table:style-name="ro1">
          <table:table-cell/>
          <table:table-cell table:style-name="ce2" office:value-type="float" office:value="796.640380385" calcext:value-type="float">
            <text:p>796.64</text:p>
          </table:table-cell>
          <table:table-cell table:style-name="ce2" office:value-type="float" office:value="220.569022206" calcext:value-type="float">
            <text:p>220.57</text:p>
          </table:table-cell>
          <table:table-cell table:style-name="ce2" table:formula="of:=[one_room_search.B35]-[one_room_search.C35]" office:value-type="float" office:value="576.071358179" calcext:value-type="float">
            <text:p>576.07</text:p>
          </table:table-cell>
          <table:table-cell table:style-name="ce2"/>
          <table:table-cell table:style-name="ce2" office:value-type="float" office:value="466.864707755" calcext:value-type="float">
            <text:p>466.86</text:p>
          </table:table-cell>
          <table:table-cell table:style-name="ce2" office:value-type="float" office:value="227.585647347" calcext:value-type="float">
            <text:p>227.59</text:p>
          </table:table-cell>
          <table:table-cell table:style-name="ce2" table:formula="of:=[one_room_search.F35]-[one_room_search.G35]" office:value-type="float" office:value="239.279060408" calcext:value-type="float">
            <text:p>239.28</text:p>
          </table:table-cell>
          <table:table-cell table:number-columns-repeated="2"/>
          <table:table-cell table:style-name="ce2" office:value-type="float" office:value="579.813083417" calcext:value-type="float">
            <text:p>579.81</text:p>
          </table:table-cell>
          <table:table-cell table:style-name="ce2" office:value-type="float" office:value="226.040836862" calcext:value-type="float">
            <text:p>226.04</text:p>
          </table:table-cell>
          <table:table-cell table:style-name="ce2" table:formula="of:=[one_room_search.K35]-[one_room_search.L35]" office:value-type="float" office:value="353.772246555" calcext:value-type="float">
            <text:p>353.77</text:p>
          </table:table-cell>
          <table:table-cell table:style-name="ce2"/>
          <table:table-cell table:style-name="ce2" office:value-type="float" office:value="1627.91898137" calcext:value-type="float">
            <text:p>1627.92</text:p>
          </table:table-cell>
          <table:table-cell table:style-name="ce2" office:value-type="float" office:value="228.27430136" calcext:value-type="float">
            <text:p>228.27</text:p>
          </table:table-cell>
          <table:table-cell table:style-name="ce2" table:formula="of:=[one_room_search.O35]-[one_room_search.P35]" office:value-type="float" office:value="1399.64468001" calcext:value-type="float">
            <text:p>1399.64</text:p>
          </table:table-cell>
          <table:table-cell table:number-columns-repeated="2"/>
          <table:table-cell table:style-name="ce2" office:value-type="float" office:value="1328.46649989" calcext:value-type="float">
            <text:p>1328.47</text:p>
          </table:table-cell>
          <table:table-cell table:style-name="ce2" office:value-type="float" office:value="180.418455192" calcext:value-type="float">
            <text:p>180.42</text:p>
          </table:table-cell>
          <table:table-cell table:style-name="ce2" table:formula="of:=[one_room_search.T35]-[one_room_search.U35]" office:value-type="float" office:value="1148.048044698" calcext:value-type="float">
            <text:p>1148.05</text:p>
          </table:table-cell>
          <table:table-cell table:style-name="ce2"/>
          <table:table-cell table:style-name="ce2" office:value-type="float" office:value="2793.84008461" calcext:value-type="float">
            <text:p>2793.84</text:p>
          </table:table-cell>
          <table:table-cell table:style-name="ce2" office:value-type="float" office:value="250.867828913" calcext:value-type="float">
            <text:p>250.87</text:p>
          </table:table-cell>
          <table:table-cell table:style-name="ce2" table:formula="of:=[one_room_search.X35]-[one_room_search.Y35]" office:value-type="float" office:value="2542.972255697" calcext:value-type="float">
            <text:p>2542.97</text:p>
          </table:table-cell>
          <table:table-cell table:number-columns-repeated="2"/>
          <table:table-cell table:style-name="ce2" office:value-type="float" office:value="2185.56660621" calcext:value-type="float">
            <text:p>2185.57</text:p>
          </table:table-cell>
          <table:table-cell table:style-name="ce2" office:value-type="float" office:value="1862.55699681" calcext:value-type="float">
            <text:p>1862.56</text:p>
          </table:table-cell>
          <table:table-cell table:style-name="ce2" table:formula="of:=[one_room_search.AC35]-[one_room_search.AD35]" office:value-type="float" office:value="323.0096094" calcext:value-type="float">
            <text:p>323.01</text:p>
          </table:table-cell>
          <table:table-cell table:style-name="ce2"/>
          <table:table-cell office:value-type="float" office:value="3667.37866088" calcext:value-type="float">
            <text:p>3667.37866088</text:p>
          </table:table-cell>
          <table:table-cell/>
          <table:table-cell table:style-name="ce2"/>
          <table:table-cell/>
          <table:table-cell office:value-type="float" office:value="7576.89887285" calcext:value-type="float">
            <text:p>7576.89887285</text:p>
          </table:table-cell>
          <table:table-cell office:value-type="float" office:value="0.0411039352417" calcext:value-type="float">
            <text:p>0.0411039352</text:p>
          </table:table-cell>
          <table:table-cell/>
        </table:table-row>
        <table:table-row table:style-name="ro1">
          <table:table-cell/>
          <table:table-cell table:style-name="ce2" office:value-type="float" office:value="491.160143617" calcext:value-type="float">
            <text:p>491.16</text:p>
          </table:table-cell>
          <table:table-cell table:style-name="ce2" office:value-type="float" office:value="227.124703181" calcext:value-type="float">
            <text:p>227.12</text:p>
          </table:table-cell>
          <table:table-cell table:style-name="ce2" table:formula="of:=[one_room_search.B36]-[one_room_search.C36]" office:value-type="float" office:value="264.035440436" calcext:value-type="float">
            <text:p>264.04</text:p>
          </table:table-cell>
          <table:table-cell table:style-name="ce2"/>
          <table:table-cell table:style-name="ce2" office:value-type="float" office:value="2243.21878376" calcext:value-type="float">
            <text:p>2243.22</text:p>
          </table:table-cell>
          <table:table-cell table:style-name="ce2" office:value-type="float" office:value="145.950409903" calcext:value-type="float">
            <text:p>145.95</text:p>
          </table:table-cell>
          <table:table-cell table:style-name="ce2" table:formula="of:=[one_room_search.F36]-[one_room_search.G36]" office:value-type="float" office:value="2097.268373857" calcext:value-type="float">
            <text:p>2097.27</text:p>
          </table:table-cell>
          <table:table-cell table:number-columns-repeated="2"/>
          <table:table-cell table:style-name="ce2" office:value-type="float" office:value="334.341314015" calcext:value-type="float">
            <text:p>334.34</text:p>
          </table:table-cell>
          <table:table-cell table:style-name="ce2" office:value-type="float" office:value="224.103255215" calcext:value-type="float">
            <text:p>224.10</text:p>
          </table:table-cell>
          <table:table-cell table:style-name="ce2" table:formula="of:=[one_room_search.K36]-[one_room_search.L36]" office:value-type="float" office:value="110.2380588" calcext:value-type="float">
            <text:p>110.24</text:p>
          </table:table-cell>
          <table:table-cell table:style-name="ce2"/>
          <table:table-cell table:style-name="ce2" office:value-type="float" office:value="1803.67817296" calcext:value-type="float">
            <text:p>1803.68</text:p>
          </table:table-cell>
          <table:table-cell table:style-name="ce2" office:value-type="float" office:value="330.341614862" calcext:value-type="float">
            <text:p>330.34</text:p>
          </table:table-cell>
          <table:table-cell table:style-name="ce2" table:formula="of:=[one_room_search.O36]-[one_room_search.P36]" office:value-type="float" office:value="1473.336558098" calcext:value-type="float">
            <text:p>1473.34</text:p>
          </table:table-cell>
          <table:table-cell table:number-columns-repeated="2"/>
          <table:table-cell table:style-name="ce2" office:value-type="float" office:value="1325.33416722" calcext:value-type="float">
            <text:p>1325.33</text:p>
          </table:table-cell>
          <table:table-cell table:style-name="ce2" office:value-type="float" office:value="255.001191813" calcext:value-type="float">
            <text:p>255.00</text:p>
          </table:table-cell>
          <table:table-cell table:style-name="ce2" table:formula="of:=[one_room_search.T36]-[one_room_search.U36]" office:value-type="float" office:value="1070.332975407" calcext:value-type="float">
            <text:p>1070.33</text:p>
          </table:table-cell>
          <table:table-cell table:style-name="ce2"/>
          <table:table-cell table:style-name="ce2" office:value-type="float" office:value="1459.10504793" calcext:value-type="float">
            <text:p>1459.11</text:p>
          </table:table-cell>
          <table:table-cell table:style-name="ce2" office:value-type="float" office:value="188.945618585" calcext:value-type="float">
            <text:p>188.95</text:p>
          </table:table-cell>
          <table:table-cell table:style-name="ce2" table:formula="of:=[one_room_search.X36]-[one_room_search.Y36]" office:value-type="float" office:value="1270.159429345" calcext:value-type="float">
            <text:p>1270.16</text:p>
          </table:table-cell>
          <table:table-cell table:number-columns-repeated="2"/>
          <table:table-cell table:style-name="ce2" office:value-type="float" office:value="2349.50173796" calcext:value-type="float">
            <text:p>2349.50</text:p>
          </table:table-cell>
          <table:table-cell table:style-name="ce2" office:value-type="float" office:value="1863.35007103" calcext:value-type="float">
            <text:p>1863.35</text:p>
          </table:table-cell>
          <table:table-cell table:style-name="ce2" table:formula="of:=[one_room_search.AC36]-[one_room_search.AD36]" office:value-type="float" office:value="486.15166693" calcext:value-type="float">
            <text:p>486.15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/>
          <table:table-cell table:style-name="ce2" office:value-type="float" office:value="1050.76663455" calcext:value-type="float">
            <text:p>1050.77</text:p>
          </table:table-cell>
          <table:table-cell table:style-name="ce2" office:value-type="float" office:value="203.412638925" calcext:value-type="float">
            <text:p>203.41</text:p>
          </table:table-cell>
          <table:table-cell table:style-name="ce2" table:formula="of:=[one_room_search.B37]-[one_room_search.C37]" office:value-type="float" office:value="847.353995625" calcext:value-type="float">
            <text:p>847.35</text:p>
          </table:table-cell>
          <table:table-cell table:style-name="ce2"/>
          <table:table-cell table:style-name="ce2" office:value-type="float" office:value="2939.61992109" calcext:value-type="float">
            <text:p>2939.62</text:p>
          </table:table-cell>
          <table:table-cell table:style-name="ce2" office:value-type="float" office:value="259.263117731" calcext:value-type="float">
            <text:p>259.26</text:p>
          </table:table-cell>
          <table:table-cell table:style-name="ce2" table:formula="of:=[one_room_search.F37]-[one_room_search.G37]" office:value-type="float" office:value="2680.356803359" calcext:value-type="float">
            <text:p>2680.36</text:p>
          </table:table-cell>
          <table:table-cell table:number-columns-repeated="2"/>
          <table:table-cell table:style-name="ce2" office:value-type="float" office:value="623.29718963" calcext:value-type="float">
            <text:p>623.30</text:p>
          </table:table-cell>
          <table:table-cell table:style-name="ce2" office:value-type="float" office:value="188.529030203" calcext:value-type="float">
            <text:p>188.53</text:p>
          </table:table-cell>
          <table:table-cell table:style-name="ce2" table:formula="of:=[one_room_search.K37]-[one_room_search.L37]" office:value-type="float" office:value="434.768159427" calcext:value-type="float">
            <text:p>434.77</text:p>
          </table:table-cell>
          <table:table-cell table:style-name="ce2"/>
          <table:table-cell table:style-name="ce2" office:value-type="float" office:value="1099.20584463" calcext:value-type="float">
            <text:p>1099.21</text:p>
          </table:table-cell>
          <table:table-cell table:style-name="ce2" office:value-type="float" office:value="228.205918698" calcext:value-type="float">
            <text:p>228.21</text:p>
          </table:table-cell>
          <table:table-cell table:style-name="ce2" table:formula="of:=[one_room_search.O37]-[one_room_search.P37]" office:value-type="float" office:value="870.999925932" calcext:value-type="float">
            <text:p>871.00</text:p>
          </table:table-cell>
          <table:table-cell table:number-columns-repeated="2"/>
          <table:table-cell table:style-name="ce2" office:value-type="float" office:value="1617.31623447" calcext:value-type="float">
            <text:p>1617.32</text:p>
          </table:table-cell>
          <table:table-cell table:style-name="ce2" office:value-type="float" office:value="403.612606896" calcext:value-type="float">
            <text:p>403.61</text:p>
          </table:table-cell>
          <table:table-cell table:style-name="ce2" table:formula="of:=[one_room_search.T37]-[one_room_search.U37]" office:value-type="float" office:value="1213.703627574" calcext:value-type="float">
            <text:p>1213.70</text:p>
          </table:table-cell>
          <table:table-cell table:style-name="ce2"/>
          <table:table-cell table:style-name="ce2" office:value-type="float" office:value="1574.52187125" calcext:value-type="float">
            <text:p>1574.52</text:p>
          </table:table-cell>
          <table:table-cell table:style-name="ce2" office:value-type="float" office:value="236.013391043" calcext:value-type="float">
            <text:p>236.01</text:p>
          </table:table-cell>
          <table:table-cell table:style-name="ce2" table:formula="of:=[one_room_search.X37]-[one_room_search.Y37]" office:value-type="float" office:value="1338.508480207" calcext:value-type="float">
            <text:p>1338.51</text:p>
          </table:table-cell>
          <table:table-cell table:number-columns-repeated="2"/>
          <table:table-cell table:style-name="ce2" office:value-type="float" office:value="2624.20713555" calcext:value-type="float">
            <text:p>2624.21</text:p>
          </table:table-cell>
          <table:table-cell table:style-name="ce2" office:value-type="float" office:value="1778.02891209" calcext:value-type="float">
            <text:p>1778.03</text:p>
          </table:table-cell>
          <table:table-cell table:style-name="ce2" table:formula="of:=[one_room_search.AC37]-[one_room_search.AD37]" office:value-type="float" office:value="846.17822346" calcext:value-type="float">
            <text:p>846.18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one_room_search.B33:.B37])" office:value-type="float" office:value="804.819669646" calcext:value-type="float">
            <text:p>804.82</text:p>
          </table:table-cell>
          <table:table-cell table:style-name="ce3" table:formula="of:=AVERAGE([one_room_search.C33:.C37])" office:value-type="float" office:value="216.8935924764" calcext:value-type="float">
            <text:p>216.89</text:p>
          </table:table-cell>
          <table:table-cell table:style-name="ce3" table:formula="of:=AVERAGE([one_room_search.D33:.D37])" office:value-type="float" office:value="587.9260771696" calcext:value-type="float">
            <text:p>587.93</text:p>
          </table:table-cell>
          <table:table-cell table:style-name="ce3"/>
          <table:table-cell table:style-name="ce3" table:formula="of:=AVERAGE([one_room_search.F33:.F37])" office:value-type="float" office:value="1683.2901992464" calcext:value-type="float">
            <text:p>1683.29</text:p>
          </table:table-cell>
          <table:table-cell table:style-name="ce3" table:formula="of:=AVERAGE([one_room_search.G33:.G37])" office:value-type="float" office:value="213.13011296" calcext:value-type="float">
            <text:p>213.13</text:p>
          </table:table-cell>
          <table:table-cell table:style-name="ce3" table:formula="of:=AVERAGE([one_room_search.H33:.H37])" office:value-type="float" office:value="1470.1600862864" calcext:value-type="float">
            <text:p>1470.16</text:p>
          </table:table-cell>
          <table:table-cell table:number-columns-repeated="2"/>
          <table:table-cell table:style-name="ce2" office:value-type="float" office:value="823.013073031" calcext:value-type="float">
            <text:p>823.01</text:p>
          </table:table-cell>
          <table:table-cell table:style-name="ce2" office:value-type="float" office:value="134.395762019" calcext:value-type="float">
            <text:p>134.40</text:p>
          </table:table-cell>
          <table:table-cell table:style-name="ce2" table:formula="of:=[one_room_search.K38]-[one_room_search.L38]" office:value-type="float" office:value="688.617311012" calcext:value-type="float">
            <text:p>688.62</text:p>
          </table:table-cell>
          <table:table-cell table:style-name="ce2"/>
          <table:table-cell table:style-name="ce2" office:value-type="float" office:value="546.007771579" calcext:value-type="float">
            <text:p>546.01</text:p>
          </table:table-cell>
          <table:table-cell table:style-name="ce2" office:value-type="float" office:value="239.114915546" calcext:value-type="float">
            <text:p>239.11</text:p>
          </table:table-cell>
          <table:table-cell table:style-name="ce2" table:formula="of:=[one_room_search.O38]-[one_room_search.P38]" office:value-type="float" office:value="306.892856033" calcext:value-type="float">
            <text:p>306.89</text:p>
          </table:table-cell>
          <table:table-cell table:number-columns-repeated="2"/>
          <table:table-cell table:style-name="ce2" office:value-type="float" office:value="1344.7031704" calcext:value-type="float">
            <text:p>1344.70</text:p>
          </table:table-cell>
          <table:table-cell table:style-name="ce2" office:value-type="float" office:value="335.905373652" calcext:value-type="float">
            <text:p>335.91</text:p>
          </table:table-cell>
          <table:table-cell table:style-name="ce2" table:formula="of:=[one_room_search.T38]-[one_room_search.U38]" office:value-type="float" office:value="1008.797796748" calcext:value-type="float">
            <text:p>1008.80</text:p>
          </table:table-cell>
          <table:table-cell table:style-name="ce2"/>
          <table:table-cell table:style-name="ce2" office:value-type="float" office:value="2918.24296467" calcext:value-type="float">
            <text:p>2918.24</text:p>
          </table:table-cell>
          <table:table-cell table:style-name="ce2" office:value-type="float" office:value="702.021439957" calcext:value-type="float">
            <text:p>702.02</text:p>
          </table:table-cell>
          <table:table-cell table:style-name="ce2" table:formula="of:=[one_room_search.X38]-[one_room_search.Y38]" office:value-type="float" office:value="2216.221524713" calcext:value-type="float">
            <text:p>2216.22</text:p>
          </table:table-cell>
          <table:table-cell table:number-columns-repeated="2"/>
          <table:table-cell table:style-name="ce2" office:value-type="float" office:value="1445.07840828" calcext:value-type="float">
            <text:p>1445.08</text:p>
          </table:table-cell>
          <table:table-cell table:style-name="ce2" office:value-type="float" office:value="1206.6285478" calcext:value-type="float">
            <text:p>1206.63</text:p>
          </table:table-cell>
          <table:table-cell table:style-name="ce2" table:formula="of:=[one_room_search.AC38]-[one_room_search.AD38]" office:value-type="float" office:value="238.44986048" calcext:value-type="float">
            <text:p>238.45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number-columns-repeated="10"/>
          <table:table-cell table:style-name="ce3" table:formula="of:=AVERAGE([one_room_search.K34:.K38])" office:value-type="float" office:value="523.4375653602" calcext:value-type="float">
            <text:p>523.44</text:p>
          </table:table-cell>
          <table:table-cell table:style-name="ce3" table:formula="of:=AVERAGE([one_room_search.L34:.L38])" office:value-type="float" office:value="198.2779334126" calcext:value-type="float">
            <text:p>198.28</text:p>
          </table:table-cell>
          <table:table-cell table:style-name="ce3" table:formula="of:=AVERAGE([one_room_search.M34:.M38])" office:value-type="float" office:value="325.1596319476" calcext:value-type="float">
            <text:p>325.16</text:p>
          </table:table-cell>
          <table:table-cell table:style-name="ce3"/>
          <table:table-cell table:style-name="ce3" table:formula="of:=AVERAGE([one_room_search.O34:.O38])" office:value-type="float" office:value="1162.2458922056" calcext:value-type="float">
            <text:p>1162.25</text:p>
          </table:table-cell>
          <table:table-cell table:style-name="ce3" table:formula="of:=AVERAGE([one_room_search.P34:.P38])" office:value-type="float" office:value="253.6992279616" calcext:value-type="float">
            <text:p>253.70</text:p>
          </table:table-cell>
          <table:table-cell table:style-name="ce3" table:formula="of:=AVERAGE([one_room_search.Q34:.Q38])" office:value-type="float" office:value="908.546664244" calcext:value-type="float">
            <text:p>908.55</text:p>
          </table:table-cell>
          <table:table-cell table:number-columns-repeated="2"/>
          <table:table-cell table:style-name="ce3" table:formula="of:=AVERAGE([one_room_search.T34:.T38])" office:value-type="float" office:value="1433.72661952" calcext:value-type="float">
            <text:p>1433.73</text:p>
          </table:table-cell>
          <table:table-cell table:style-name="ce3" table:formula="of:=AVERAGE([one_room_search.U34:.U38])" office:value-type="float" office:value="309.7210470026" calcext:value-type="float">
            <text:p>309.72</text:p>
          </table:table-cell>
          <table:table-cell table:style-name="ce3" table:formula="of:=AVERAGE([one_room_search.V34:.V38])" office:value-type="float" office:value="1124.0055725174" calcext:value-type="float">
            <text:p>1124.01</text:p>
          </table:table-cell>
          <table:table-cell table:style-name="ce3"/>
          <table:table-cell table:style-name="ce3" table:formula="of:=AVERAGE([one_room_search.X34:.X38])" office:value-type="float" office:value="2007.57658462" calcext:value-type="float">
            <text:p>2007.58</text:p>
          </table:table-cell>
          <table:table-cell table:style-name="ce3" table:formula="of:=AVERAGE([one_room_search.Y34:.Y38])" office:value-type="float" office:value="318.0579247606" calcext:value-type="float">
            <text:p>318.06</text:p>
          </table:table-cell>
          <table:table-cell table:style-name="ce3" table:formula="of:=AVERAGE([one_room_search.Z34:.Z38])" office:value-type="float" office:value="1689.5186598594" calcext:value-type="float">
            <text:p>1689.52</text:p>
          </table:table-cell>
          <table:table-cell table:number-columns-repeated="2"/>
          <table:table-cell table:style-name="ce2" office:value-type="float" office:value="3398.89393615" calcext:value-type="float">
            <text:p>3398.89</text:p>
          </table:table-cell>
          <table:table-cell table:style-name="ce2" office:value-type="float" office:value="1906.28652865" calcext:value-type="float">
            <text:p>1906.29</text:p>
          </table:table-cell>
          <table:table-cell table:style-name="ce2" table:formula="of:=[one_room_search.AC39]-[one_room_search.AD39]" office:value-type="float" office:value="1492.6074075" calcext:value-type="float">
            <text:p>1492.61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number-columns-repeated="28"/>
          <table:table-cell table:style-name="ce3" table:formula="of:=AVERAGE([one_room_search.AC34:.AC39])" office:value-type="float" office:value="2433.156906905" calcext:value-type="float">
            <text:p>2433.16</text:p>
          </table:table-cell>
          <table:table-cell table:style-name="ce3" table:formula="of:=AVERAGE([one_room_search.AD34:.AD39])" office:value-type="float" office:value="1702.53971103167" calcext:value-type="float">
            <text:p>1702.54</text:p>
          </table:table-cell>
          <table:table-cell table:style-name="ce3" table:formula="of:=AVERAGE([one_room_search.AE34:.AE39])" office:value-type="float" office:value="730.617195873333" calcext:value-type="float">
            <text:p>730.62</text:p>
          </table:table-cell>
          <table:table-cell table:style-name="ce3"/>
          <table:table-cell table:style-name="ce3" table:formula="of:=AVERAGE([one_room_search.AG34:.AG39])" office:value-type="float" office:value="3783.434840395" calcext:value-type="float">
            <text:p>3783.43</text:p>
          </table:table-cell>
          <table:table-cell table:style-name="ce3" table:formula="of:=AVERAGE([one_room_search.AH34:.AH39])" office:value-type="float" office:value="1374.67794718" calcext:value-type="float">
            <text:p>1374.68</text:p>
          </table:table-cell>
          <table:table-cell table:style-name="ce3" table:formula="of:=AVERAGE([one_room_search.AI34:.AI39])" office:value-type="float" office:value="2524.81307273" calcext:value-type="float">
            <text:p>2524.81</text:p>
          </table:table-cell>
          <table:table-cell table:style-name="ce3"/>
          <table:table-cell table:style-name="ce3" table:formula="of:=AVERAGE([one_room_search.AK34:.AK39])" office:value-type="float" office:value="4309.811735465" calcext:value-type="float">
            <text:p>4309.81</text:p>
          </table:table-cell>
          <table:table-cell table:style-name="ce3" table:formula="of:=AVERAGE([one_room_search.AL34:.AL39])" office:value-type="float" office:value="0.05890159606935" calcext:value-type="float">
            <text:p>0.06</text:p>
          </table:table-cell>
          <table:table-cell/>
        </table:table-row>
        <table:table-row table:style-name="ro1" table:number-rows-repeated="13">
          <table:table-cell table:number-columns-repeated="39"/>
        </table:table-row>
        <table:table-row table:style-name="ro1">
          <table:table-cell office:value-type="string" calcext:value-type="string">
            <text:p>Runs: 34</text:p>
          </table:table-cell>
          <table:table-cell office:value-type="string" calcext:value-type="string">
            <text:p>Success: 28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Errors: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wrong object found (2x remote, 1x spoon)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avigation error (1x dwa invalid trajectory)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object not found (1x remote, 1x spoon), both times bad light</text:p>
          </table:table-cell>
          <table:table-cell table:number-columns-repeated="38"/>
        </table:table-row>
      </table:table>
      <table:table table:name="full_search" table:style-name="ta1"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344.542884588" calcext:value-type="float">
            <text:p>344.542884588</text:p>
          </table:table-cell>
          <table:table-cell office:value-type="float" office:value="31.8014850616" calcext:value-type="float">
            <text:p>31.8014850616</text:p>
          </table:table-cell>
          <table:table-cell office:value-type="float" office:value="78.6478016376" calcext:value-type="float">
            <text:p>78.6478016376</text:p>
          </table:table-cell>
          <table:table-cell office:value-type="float" office:value="147.618535519" calcext:value-type="float">
            <text:p>147.618535519</text:p>
          </table:table-cell>
          <table:table-cell office:value-type="float" office:value="56.6030631065" calcext:value-type="float">
            <text:p>56.6030631065</text:p>
          </table:table-cell>
          <table:table-cell table:style-name="ce2"/>
          <table:table-cell table:style-name="ce2" office:value-type="string" calcext:value-type="string">
            <text:p>r30</text:p>
          </table:table-cell>
          <table:table-cell office:value-type="float" office:value="1882.61613607" calcext:value-type="float">
            <text:p>1882.61613607</text:p>
          </table:table-cell>
          <table:table-cell office:value-type="float" office:value="0" calcext:value-type="float">
            <text:p>0</text:p>
          </table:table-cell>
          <table:table-cell office:value-type="float" office:value="162.610586405" calcext:value-type="float">
            <text:p>162.610586405</text:p>
          </table:table-cell>
          <table:table-cell office:value-type="float" office:value="1713.57447958" calcext:value-type="float">
            <text:p>1713.57447958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27</text:p>
          </table:table-cell>
          <table:table-cell office:value-type="float" office:value="274.995448828" calcext:value-type="float">
            <text:p>274.9954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.634985209" calcext:value-type="float">
            <text:p>249.634985209</text:p>
          </table:table-cell>
          <table:table-cell office:value-type="float" office:value="21.4009466171" calcext:value-type="float">
            <text:p>21.4009466171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349.645720959" calcext:value-type="float">
            <text:p>349.645720959</text:p>
          </table:table-cell>
          <table:table-cell office:value-type="float" office:value="55.8065154552" calcext:value-type="float">
            <text:p>55.8065154552</text:p>
          </table:table-cell>
          <table:table-cell office:value-type="float" office:value="109.036174774" calcext:value-type="float">
            <text:p>109.036174774</text:p>
          </table:table-cell>
          <table:table-cell office:value-type="float" office:value="92.9844353199" calcext:value-type="float">
            <text:p>92.9844353199</text:p>
          </table:table-cell>
          <table:table-cell office:value-type="float" office:value="56.408747673" calcext:value-type="float">
            <text:p>56.408747673</text:p>
          </table:table-cell>
          <table:table-cell table:style-name="ce2"/>
          <table:table-cell table:style-name="ce2" office:value-type="string" calcext:value-type="string">
            <text:p>r31</text:p>
          </table:table-cell>
          <table:table-cell office:value-type="float" office:value="447.676231384" calcext:value-type="float">
            <text:p>447.676231384</text:p>
          </table:table-cell>
          <table:table-cell office:value-type="float" office:value="0" calcext:value-type="float">
            <text:p>0</text:p>
          </table:table-cell>
          <table:table-cell office:value-type="float" office:value="121.424663544" calcext:value-type="float">
            <text:p>121.424663544</text:p>
          </table:table-cell>
          <table:table-cell office:value-type="float" office:value="318.547799349" calcext:value-type="float">
            <text:p>318.547799349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28</text:p>
          </table:table-cell>
          <table:table-cell office:value-type="float" office:value="1077.47635078" calcext:value-type="float">
            <text:p>1077.4763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.47837925" calcext:value-type="float">
            <text:p>1052.47837925</text:p>
          </table:table-cell>
          <table:table-cell office:value-type="float" office:value="20.3998959064" calcext:value-type="float">
            <text:p>20.3998959064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float" office:value="814.850021839" calcext:value-type="float">
            <text:p>814.850021839</text:p>
          </table:table-cell>
          <table:table-cell office:value-type="float" office:value="61.0024602413" calcext:value-type="float">
            <text:p>61.0024602413</text:p>
          </table:table-cell>
          <table:table-cell office:value-type="float" office:value="91.0190176964" calcext:value-type="float">
            <text:p>91.0190176964</text:p>
          </table:table-cell>
          <table:table-cell office:value-type="float" office:value="568.433133364" calcext:value-type="float">
            <text:p>568.433133364</text:p>
          </table:table-cell>
          <table:table-cell office:value-type="float" office:value="58.8067622185" calcext:value-type="float">
            <text:p>58.8067622185</text:p>
          </table:table-cell>
          <table:table-cell table:style-name="ce2"/>
          <table:table-cell table:style-name="ce2" office:value-type="string" calcext:value-type="string">
            <text:p>r33</text:p>
          </table:table-cell>
          <table:table-cell office:value-type="float" office:value="425.280315399" calcext:value-type="float">
            <text:p>425.280315399</text:p>
          </table:table-cell>
          <table:table-cell office:value-type="float" office:value="0" calcext:value-type="float">
            <text:p>0</text:p>
          </table:table-cell>
          <table:table-cell office:value-type="float" office:value="148.419117451" calcext:value-type="float">
            <text:p>148.419117451</text:p>
          </table:table-cell>
          <table:table-cell office:value-type="float" office:value="270.114762545" calcext:value-type="float">
            <text:p>270.114762545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29</text:p>
          </table:table-cell>
          <table:table-cell office:value-type="float" office:value="1058.39850521" calcext:value-type="float">
            <text:p>1058.3985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.39544463" calcext:value-type="float">
            <text:p>1031.39544463</text:p>
          </table:table-cell>
          <table:table-cell office:value-type="float" office:value="20.9940736294" calcext:value-type="float">
            <text:p>20.994073629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float" office:value="400.563981056" calcext:value-type="float">
            <text:p>400.563981056</text:p>
          </table:table-cell>
          <table:table-cell office:value-type="float" office:value="43.804176569" calcext:value-type="float">
            <text:p>43.804176569</text:p>
          </table:table-cell>
          <table:table-cell office:value-type="float" office:value="115.833212614" calcext:value-type="float">
            <text:p>115.833212614</text:p>
          </table:table-cell>
          <table:table-cell office:value-type="float" office:value="143.113963366" calcext:value-type="float">
            <text:p>143.113963366</text:p>
          </table:table-cell>
          <table:table-cell office:value-type="float" office:value="60.400690794" calcext:value-type="float">
            <text:p>60.400690794</text:p>
          </table:table-cell>
          <table:table-cell table:style-name="ce2"/>
          <table:table-cell table:style-name="ce2" office:value-type="string" calcext:value-type="string">
            <text:p>s34</text:p>
          </table:table-cell>
          <table:table-cell office:value-type="float" office:value="511.531738281" calcext:value-type="float">
            <text:p>511.531738281</text:p>
          </table:table-cell>
          <table:table-cell office:value-type="float" office:value="0" calcext:value-type="float">
            <text:p>0</text:p>
          </table:table-cell>
          <table:table-cell office:value-type="float" office:value="160.416682959" calcext:value-type="float">
            <text:p>160.416682959</text:p>
          </table:table-cell>
          <table:table-cell office:value-type="float" office:value="343.590056419" calcext:value-type="float">
            <text:p>343.590056419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s37</text:p>
          </table:table-cell>
          <table:table-cell office:value-type="float" office:value="439.841646433" calcext:value-type="float">
            <text:p>439.841646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108391523" calcext:value-type="float">
            <text:p>416.108391523</text:p>
          </table:table-cell>
          <table:table-cell office:value-type="float" office:value="19.8043453693" calcext:value-type="float">
            <text:p>19.8043453693</text:p>
          </table:table-cell>
        </table:table-row>
        <table:table-row table:style-name="ro1" table:number-rows-repeated="2">
          <table:table-cell table:number-columns-repeated="6"/>
          <table:table-cell table:style-name="ce2" table:number-columns-repeated="2"/>
          <table:table-cell table:number-columns-repeated="5"/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full_search.B6:.B11])" office:value-type="float" office:value="477.4006521105" calcext:value-type="float">
            <text:p>477.40</text:p>
          </table:table-cell>
          <table:table-cell table:style-name="ce3" table:formula="of:=AVERAGE([full_search.C6:.C11])" office:value-type="float" office:value="48.103659331775" calcext:value-type="float">
            <text:p>48.10</text:p>
          </table:table-cell>
          <table:table-cell table:style-name="ce3" table:formula="of:=AVERAGE([full_search.D6:.D11])" office:value-type="float" office:value="98.6340516805" calcext:value-type="float">
            <text:p>98.63</text:p>
          </table:table-cell>
          <table:table-cell table:style-name="ce3" table:formula="of:=AVERAGE([full_search.E6:.E11])" office:value-type="float" office:value="238.037516892225" calcext:value-type="float">
            <text:p>238.04</text:p>
          </table:table-cell>
          <table:table-cell table:style-name="ce3" table:formula="of:=AVERAGE([full_search.F6:.F11])" office:value-type="float" office:value="58.054815948" calcext:value-type="float">
            <text:p>58.05</text:p>
          </table:table-cell>
          <table:table-cell table:style-name="ce3" table:number-columns-repeated="2"/>
          <table:table-cell table:style-name="ce3" table:formula="of:=AVERAGE([full_search.I6:.I11])" office:value-type="float" office:value="816.7761052835" calcext:value-type="float">
            <text:p>816.78</text:p>
          </table:table-cell>
          <table:table-cell table:style-name="ce3" table:formula="of:=AVERAGE([full_search.J6:.J11])" office:value-type="float" office:value="0" calcext:value-type="float">
            <text:p>0.00</text:p>
          </table:table-cell>
          <table:table-cell table:style-name="ce3" table:formula="of:=AVERAGE([full_search.K6:.K11])" office:value-type="float" office:value="148.21776258975" calcext:value-type="float">
            <text:p>148.22</text:p>
          </table:table-cell>
          <table:table-cell table:style-name="ce3" table:formula="of:=AVERAGE([full_search.L6:.L11])" office:value-type="float" office:value="661.45677447325" calcext:value-type="float">
            <text:p>661.46</text:p>
          </table:table-cell>
          <table:table-cell table:style-name="ce3" table:formula="of:=AVERAGE([full_search.M6:.M11])" office:value-type="float" office:value="0" calcext:value-type="float">
            <text:p>0.00</text:p>
          </table:table-cell>
          <table:table-cell table:style-name="ce3" table:number-columns-repeated="2"/>
          <table:table-cell table:style-name="ce3" table:formula="of:=AVERAGE([full_search.P6:.P11])" office:value-type="float" office:value="712.67798781275" calcext:value-type="float">
            <text:p>712.68</text:p>
          </table:table-cell>
          <table:table-cell table:style-name="ce3" table:formula="of:=AVERAGE([full_search.Q6:.Q11])" office:value-type="float" office:value="0" calcext:value-type="float">
            <text:p>0.00</text:p>
          </table:table-cell>
          <table:table-cell table:style-name="ce3" table:formula="of:=AVERAGE([full_search.R6:.R11])" office:value-type="float" office:value="0" calcext:value-type="float">
            <text:p>0.00</text:p>
          </table:table-cell>
          <table:table-cell table:style-name="ce3" table:formula="of:=AVERAGE([full_search.S6:.S11])" office:value-type="float" office:value="687.404300153" calcext:value-type="float">
            <text:p>687.40</text:p>
          </table:table-cell>
          <table:table-cell table:style-name="ce3" table:formula="of:=AVERAGE([full_search.T6:.T11])" office:value-type="float" office:value="20.64981538055" calcext:value-type="float">
            <text:p>20.6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ath length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/>
          <table:table-cell office:value-type="float" office:value="28.3453883987" calcext:value-type="float">
            <text:p>28.3453883987</text:p>
          </table:table-cell>
          <table:table-cell office:value-type="float" office:value="3.37432429831" calcext:value-type="float">
            <text:p>3.3743242983</text:p>
          </table:table-cell>
          <table:table-cell office:value-type="float" office:value="12.4915843859" calcext:value-type="float">
            <text:p>12.4915843859</text:p>
          </table:table-cell>
          <table:table-cell office:value-type="float" office:value="11.6140316829" calcext:value-type="float">
            <text:p>11.6140316829</text:p>
          </table:table-cell>
          <table:table-cell office:value-type="float" office:value="0.746914702602" calcext:value-type="float">
            <text:p>0.7469147026</text:p>
          </table:table-cell>
          <table:table-cell table:style-name="ce2" table:number-columns-repeated="2"/>
          <table:table-cell office:value-type="float" office:value="167.211595579" calcext:value-type="float">
            <text:p>167.211595579</text:p>
          </table:table-cell>
          <table:table-cell office:value-type="float" office:value="0" calcext:value-type="float">
            <text:p>0</text:p>
          </table:table-cell>
          <table:table-cell office:value-type="float" office:value="27.7709434779" calcext:value-type="float">
            <text:p>27.7709434779</text:p>
          </table:table-cell>
          <table:table-cell office:value-type="float" office:value="139.402728006" calcext:value-type="float">
            <text:p>139.40272800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16.1134000796" calcext:value-type="float">
            <text:p>16.1134000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33935358" calcext:value-type="float">
            <text:p>15.9333935358</text:p>
          </table:table-cell>
          <table:table-cell office:value-type="float" office:value="0.170584025583" calcext:value-type="float">
            <text:p>0.1705840256</text:p>
          </table:table-cell>
        </table:table-row>
        <table:table-row table:style-name="ro1">
          <table:table-cell/>
          <table:table-cell office:value-type="float" office:value="26.7970177146" calcext:value-type="float">
            <text:p>26.7970177146</text:p>
          </table:table-cell>
          <table:table-cell office:value-type="float" office:value="4.8562407136" calcext:value-type="float">
            <text:p>4.8562407136</text:p>
          </table:table-cell>
          <table:table-cell office:value-type="float" office:value="15.1565028727" calcext:value-type="float">
            <text:p>15.1565028727</text:p>
          </table:table-cell>
          <table:table-cell office:value-type="float" office:value="6.03613808346" calcext:value-type="float">
            <text:p>6.0361380835</text:p>
          </table:table-cell>
          <table:table-cell office:value-type="float" office:value="0.640586926197" calcext:value-type="float">
            <text:p>0.6405869262</text:p>
          </table:table-cell>
          <table:table-cell table:style-name="ce2" table:number-columns-repeated="2"/>
          <table:table-cell office:value-type="float" office:value="37.7291621825" calcext:value-type="float">
            <text:p>37.7291621825</text:p>
          </table:table-cell>
          <table:table-cell office:value-type="float" office:value="0" calcext:value-type="float">
            <text:p>0</text:p>
          </table:table-cell>
          <table:table-cell office:value-type="float" office:value="17.4242308454" calcext:value-type="float">
            <text:p>17.4242308454</text:p>
          </table:table-cell>
          <table:table-cell office:value-type="float" office:value="20.2729360521" calcext:value-type="float">
            <text:p>20.27293605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.0212950129" calcext:value-type="float">
            <text:p>59.021295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419532268" calcext:value-type="float">
            <text:p>58.6419532268</text:p>
          </table:table-cell>
          <table:table-cell office:value-type="float" office:value="0.328273970564" calcext:value-type="float">
            <text:p>0.3282739706</text:p>
          </table:table-cell>
        </table:table-row>
        <table:table-row table:style-name="ro1">
          <table:table-cell/>
          <table:table-cell office:value-type="float" office:value="50.0680494319" calcext:value-type="float">
            <text:p>50.0680494319</text:p>
          </table:table-cell>
          <table:table-cell office:value-type="float" office:value="4.31616290172" calcext:value-type="float">
            <text:p>4.3161629017</text:p>
          </table:table-cell>
          <table:table-cell office:value-type="float" office:value="13.3937016003" calcext:value-type="float">
            <text:p>13.3937016003</text:p>
          </table:table-cell>
          <table:table-cell office:value-type="float" office:value="31.7745674187" calcext:value-type="float">
            <text:p>31.7745674187</text:p>
          </table:table-cell>
          <table:table-cell office:value-type="float" office:value="0.478211770128" calcext:value-type="float">
            <text:p>0.4782117701</text:p>
          </table:table-cell>
          <table:table-cell table:style-name="ce2" table:number-columns-repeated="2"/>
          <table:table-cell office:value-type="float" office:value="45.0661144814" calcext:value-type="float">
            <text:p>45.0661144814</text:p>
          </table:table-cell>
          <table:table-cell office:value-type="float" office:value="0" calcext:value-type="float">
            <text:p>0</text:p>
          </table:table-cell>
          <table:table-cell office:value-type="float" office:value="25.9654123414" calcext:value-type="float">
            <text:p>25.9654123414</text:p>
          </table:table-cell>
          <table:table-cell office:value-type="float" office:value="19.0678018792" calcext:value-type="float">
            <text:p>19.06780187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.427119002" calcext:value-type="float">
            <text:p>75.42711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979441395" calcext:value-type="float">
            <text:p>74.9979441395</text:p>
          </table:table-cell>
          <table:table-cell office:value-type="float" office:value="0.347187593511" calcext:value-type="float">
            <text:p>0.3471875935</text:p>
          </table:table-cell>
        </table:table-row>
        <table:table-row table:style-name="ro1">
          <table:table-cell/>
          <table:table-cell office:value-type="float" office:value="22.605566258" calcext:value-type="float">
            <text:p>22.605566258</text:p>
          </table:table-cell>
          <table:table-cell office:value-type="float" office:value="3.63064417111" calcext:value-type="float">
            <text:p>3.6306441711</text:p>
          </table:table-cell>
          <table:table-cell office:value-type="float" office:value="12.6524973177" calcext:value-type="float">
            <text:p>12.6524973177</text:p>
          </table:table-cell>
          <table:table-cell office:value-type="float" office:value="5.65025392014" calcext:value-type="float">
            <text:p>5.6502539201</text:p>
          </table:table-cell>
          <table:table-cell office:value-type="float" office:value="0.632908136926" calcext:value-type="float">
            <text:p>0.6329081369</text:p>
          </table:table-cell>
          <table:table-cell table:style-name="ce2" table:number-columns-repeated="2"/>
          <table:table-cell office:value-type="float" office:value="45.613186466" calcext:value-type="float">
            <text:p>45.613186466</text:p>
          </table:table-cell>
          <table:table-cell office:value-type="float" office:value="0" calcext:value-type="float">
            <text:p>0</text:p>
          </table:table-cell>
          <table:table-cell office:value-type="float" office:value="27.4354646774" calcext:value-type="float">
            <text:p>27.4354646774</text:p>
          </table:table-cell>
          <table:table-cell office:value-type="float" office:value="18.1651787096" calcext:value-type="float">
            <text:p>18.165178709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27.1764388551" calcext:value-type="float">
            <text:p>27.1764388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10331049" calcext:value-type="float">
            <text:p>27.010331049</text:p>
          </table:table-cell>
          <table:table-cell office:value-type="float" office:value="0.165979865875" calcext:value-type="float">
            <text:p>0.1659798659</text:p>
          </table:table-cell>
        </table:table-row>
        <table:table-row table:style-name="ro1" table:number-rows-repeated="2">
          <table:table-cell table:number-columns-repeated="6"/>
          <table:table-cell table:style-name="ce2" table:number-columns-repeated="2"/>
          <table:table-cell table:number-columns-repeated="5"/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full_search.B18:.B23])" office:value-type="float" office:value="31.9540054508" calcext:value-type="float">
            <text:p>31.95</text:p>
          </table:table-cell>
          <table:table-cell table:style-name="ce3" table:formula="of:=AVERAGE([full_search.C18:.C23])" office:value-type="float" office:value="4.044343021185" calcext:value-type="float">
            <text:p>4.04</text:p>
          </table:table-cell>
          <table:table-cell table:style-name="ce3" table:formula="of:=AVERAGE([full_search.D18:.D23])" office:value-type="float" office:value="13.42357154415" calcext:value-type="float">
            <text:p>13.42</text:p>
          </table:table-cell>
          <table:table-cell table:style-name="ce3" table:formula="of:=AVERAGE([full_search.E18:.E23])" office:value-type="float" office:value="13.7687477763" calcext:value-type="float">
            <text:p>13.77</text:p>
          </table:table-cell>
          <table:table-cell table:style-name="ce3" table:formula="of:=AVERAGE([full_search.F18:.F23])" office:value-type="float" office:value="0.62465538396325" calcext:value-type="float">
            <text:p>0.62</text:p>
          </table:table-cell>
          <table:table-cell table:style-name="ce3" table:number-columns-repeated="2"/>
          <table:table-cell table:style-name="ce3" table:formula="of:=AVERAGE([full_search.I18:.I23])" office:value-type="float" office:value="73.905014677225" calcext:value-type="float">
            <text:p>73.91</text:p>
          </table:table-cell>
          <table:table-cell table:style-name="ce3" table:formula="of:=AVERAGE([full_search.J18:.J23])" office:value-type="float" office:value="0" calcext:value-type="float">
            <text:p>0.00</text:p>
          </table:table-cell>
          <table:table-cell table:style-name="ce3" table:formula="of:=AVERAGE([full_search.K18:.K23])" office:value-type="float" office:value="24.649012835525" calcext:value-type="float">
            <text:p>24.65</text:p>
          </table:table-cell>
          <table:table-cell table:style-name="ce3" table:formula="of:=AVERAGE([full_search.L18:.L23])" office:value-type="float" office:value="49.227161161725" calcext:value-type="float">
            <text:p>49.23</text:p>
          </table:table-cell>
          <table:table-cell table:style-name="ce3" table:formula="of:=AVERAGE([full_search.M18:.M23])" office:value-type="float" office:value="0" calcext:value-type="float">
            <text:p>0.00</text:p>
          </table:table-cell>
          <table:table-cell table:style-name="ce3" table:number-columns-repeated="2"/>
          <table:table-cell table:style-name="ce3" table:formula="of:=AVERAGE([full_search.P18:.P23])" office:value-type="float" office:value="44.4345632374" calcext:value-type="float">
            <text:p>44.43</text:p>
          </table:table-cell>
          <table:table-cell table:style-name="ce3" table:formula="of:=AVERAGE([full_search.Q18:.Q23])" office:value-type="float" office:value="0" calcext:value-type="float">
            <text:p>0.00</text:p>
          </table:table-cell>
          <table:table-cell table:style-name="ce3" table:formula="of:=AVERAGE([full_search.R18:.R23])" office:value-type="float" office:value="0" calcext:value-type="float">
            <text:p>0.00</text:p>
          </table:table-cell>
          <table:table-cell table:style-name="ce3" table:formula="of:=AVERAGE([full_search.S18:.S23])" office:value-type="float" office:value="44.145905487775" calcext:value-type="float">
            <text:p>44.15</text:p>
          </table:table-cell>
          <table:table-cell table:style-name="ce3" table:formula="of:=AVERAGE([full_search.T18:.T23])" office:value-type="float" office:value="0.25300636388325" calcext:value-type="float">
            <text:p>0.25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path turn length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/>
          <table:table-cell office:value-type="float" office:value="1103.46483163" calcext:value-type="float">
            <text:p>1103.46483163</text:p>
          </table:table-cell>
          <table:table-cell office:value-type="float" office:value="114.554146778" calcext:value-type="float">
            <text:p>114.554146778</text:p>
          </table:table-cell>
          <table:table-cell office:value-type="float" office:value="284.264510151" calcext:value-type="float">
            <text:p>284.264510151</text:p>
          </table:table-cell>
          <table:table-cell office:value-type="float" office:value="445.893146413" calcext:value-type="float">
            <text:p>445.893146413</text:p>
          </table:table-cell>
          <table:table-cell office:value-type="float" office:value="158.186518302" calcext:value-type="float">
            <text:p>158.186518302</text:p>
          </table:table-cell>
          <table:table-cell table:style-name="ce2" table:number-columns-repeated="2"/>
          <table:table-cell office:value-type="float" office:value="4839.31631987" calcext:value-type="float">
            <text:p>4839.31631987</text:p>
          </table:table-cell>
          <table:table-cell office:value-type="float" office:value="0" calcext:value-type="float">
            <text:p>0</text:p>
          </table:table-cell>
          <table:table-cell office:value-type="float" office:value="534.606252111" calcext:value-type="float">
            <text:p>534.606252111</text:p>
          </table:table-cell>
          <table:table-cell office:value-type="float" office:value="4283.36944218" calcext:value-type="float">
            <text:p>4283.36944218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705.72873124" calcext:value-type="float">
            <text:p>705.7287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.960694356" calcext:value-type="float">
            <text:p>668.960694356</text:p>
          </table:table-cell>
          <table:table-cell office:value-type="float" office:value="36.2602770834" calcext:value-type="float">
            <text:p>36.2602770834</text:p>
          </table:table-cell>
        </table:table-row>
        <table:table-row table:style-name="ro1">
          <table:table-cell/>
          <table:table-cell office:value-type="float" office:value="1034.54593848" calcext:value-type="float">
            <text:p>1034.54593848</text:p>
          </table:table-cell>
          <table:table-cell office:value-type="float" office:value="156.440432735" calcext:value-type="float">
            <text:p>156.440432735</text:p>
          </table:table-cell>
          <table:table-cell office:value-type="float" office:value="294.06488204" calcext:value-type="float">
            <text:p>294.06488204</text:p>
          </table:table-cell>
          <table:table-cell office:value-type="float" office:value="405.675518115" calcext:value-type="float">
            <text:p>405.675518115</text:p>
          </table:table-cell>
          <table:table-cell office:value-type="float" office:value="110.624855152" calcext:value-type="float">
            <text:p>110.624855152</text:p>
          </table:table-cell>
          <table:table-cell table:style-name="ce2" table:number-columns-repeated="2"/>
          <table:table-cell office:value-type="float" office:value="1431.19442592" calcext:value-type="float">
            <text:p>1431.19442592</text:p>
          </table:table-cell>
          <table:table-cell office:value-type="float" office:value="0" calcext:value-type="float">
            <text:p>0</text:p>
          </table:table-cell>
          <table:table-cell office:value-type="float" office:value="379.191196812" calcext:value-type="float">
            <text:p>379.191196812</text:p>
          </table:table-cell>
          <table:table-cell office:value-type="float" office:value="1021.72893384" calcext:value-type="float">
            <text:p>1021.72893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81.30813773" calcext:value-type="float">
            <text:p>2881.3081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0.61534074" calcext:value-type="float">
            <text:p>2850.61534074</text:p>
          </table:table-cell>
          <table:table-cell office:value-type="float" office:value="30.3357429857" calcext:value-type="float">
            <text:p>30.3357429857</text:p>
          </table:table-cell>
        </table:table-row>
        <table:table-row table:style-name="ro1">
          <table:table-cell/>
          <table:table-cell office:value-type="float" office:value="2513.06710636" calcext:value-type="float">
            <text:p>2513.06710636</text:p>
          </table:table-cell>
          <table:table-cell office:value-type="float" office:value="193.912577255" calcext:value-type="float">
            <text:p>193.912577255</text:p>
          </table:table-cell>
          <table:table-cell office:value-type="float" office:value="249.108336555" calcext:value-type="float">
            <text:p>249.108336555</text:p>
          </table:table-cell>
          <table:table-cell office:value-type="float" office:value="1887.93197589" calcext:value-type="float">
            <text:p>1887.93197589</text:p>
          </table:table-cell>
          <table:table-cell office:value-type="float" office:value="111.991774049" calcext:value-type="float">
            <text:p>111.991774049</text:p>
          </table:table-cell>
          <table:table-cell table:style-name="ce2" table:number-columns-repeated="2"/>
          <table:table-cell office:value-type="float" office:value="1203.24639075" calcext:value-type="float">
            <text:p>1203.24639075</text:p>
          </table:table-cell>
          <table:table-cell office:value-type="float" office:value="0" calcext:value-type="float">
            <text:p>0</text:p>
          </table:table-cell>
          <table:table-cell office:value-type="float" office:value="364.628097389" calcext:value-type="float">
            <text:p>364.628097389</text:p>
          </table:table-cell>
          <table:table-cell office:value-type="float" office:value="827.036567706" calcext:value-type="float">
            <text:p>827.0365677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87.31603904" calcext:value-type="float">
            <text:p>2687.3160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.5960796" calcext:value-type="float">
            <text:p>2654.5960796</text:p>
          </table:table-cell>
          <table:table-cell office:value-type="float" office:value="32.184856945" calcext:value-type="float">
            <text:p>32.184856945</text:p>
          </table:table-cell>
        </table:table-row>
        <table:table-row table:style-name="ro1">
          <table:table-cell/>
          <table:table-cell office:value-type="float" office:value="1475.55919022" calcext:value-type="float">
            <text:p>1475.55919022</text:p>
          </table:table-cell>
          <table:table-cell office:value-type="float" office:value="177.30796111" calcext:value-type="float">
            <text:p>177.30796111</text:p>
          </table:table-cell>
          <table:table-cell office:value-type="float" office:value="387.578491919" calcext:value-type="float">
            <text:p>387.578491919</text:p>
          </table:table-cell>
          <table:table-cell office:value-type="float" office:value="617.552814039" calcext:value-type="float">
            <text:p>617.552814039</text:p>
          </table:table-cell>
          <table:table-cell office:value-type="float" office:value="173.539479974" calcext:value-type="float">
            <text:p>173.539479974</text:p>
          </table:table-cell>
          <table:table-cell table:style-name="ce2" table:number-columns-repeated="2"/>
          <table:table-cell office:value-type="float" office:value="1351.77933524" calcext:value-type="float">
            <text:p>1351.77933524</text:p>
          </table:table-cell>
          <table:table-cell office:value-type="float" office:value="0" calcext:value-type="float">
            <text:p>0</text:p>
          </table:table-cell>
          <table:table-cell office:value-type="float" office:value="369.200673791" calcext:value-type="float">
            <text:p>369.200673791</text:p>
          </table:table-cell>
          <table:table-cell office:value-type="float" office:value="974.494899217" calcext:value-type="float">
            <text:p>974.494899217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float" office:value="1184.85016428" calcext:value-type="float">
            <text:p>1184.85016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.69302526" calcext:value-type="float">
            <text:p>1152.69302526</text:p>
          </table:table-cell>
          <table:table-cell office:value-type="float" office:value="31.9435857579" calcext:value-type="float">
            <text:p>31.9435857579</text:p>
          </table:table-cell>
        </table:table-row>
        <table:table-row table:style-name="ro1" table:number-rows-repeated="2">
          <table:table-cell table:number-columns-repeated="6"/>
          <table:table-cell table:style-name="ce2" table:number-columns-repeated="2"/>
          <table:table-cell table:number-columns-repeated="5"/>
          <table:table-cell table:style-name="ce2"/>
          <table:table-cell/>
          <table:table-cell table:style-name="ce2"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full_search.B31:.B36])" office:value-type="float" office:value="1531.6592666725" calcext:value-type="float">
            <text:p>1531.66</text:p>
          </table:table-cell>
          <table:table-cell table:style-name="ce3" table:formula="of:=AVERAGE([full_search.C31:.C36])" office:value-type="float" office:value="160.5537794695" calcext:value-type="float">
            <text:p>160.55</text:p>
          </table:table-cell>
          <table:table-cell table:style-name="ce3" table:formula="of:=AVERAGE([full_search.D31:.D36])" office:value-type="float" office:value="303.75405516625" calcext:value-type="float">
            <text:p>303.75</text:p>
          </table:table-cell>
          <table:table-cell table:style-name="ce3" table:formula="of:=AVERAGE([full_search.E31:.E36])" office:value-type="float" office:value="839.26336361425" calcext:value-type="float">
            <text:p>839.26</text:p>
          </table:table-cell>
          <table:table-cell table:style-name="ce3" table:formula="of:=AVERAGE([full_search.F31:.F36])" office:value-type="float" office:value="138.58565686925" calcext:value-type="float">
            <text:p>138.59</text:p>
          </table:table-cell>
          <table:table-cell table:style-name="ce3" table:number-columns-repeated="2"/>
          <table:table-cell table:style-name="ce3" table:formula="of:=AVERAGE([full_search.I31:.I36])" office:value-type="float" office:value="2206.384117945" calcext:value-type="float">
            <text:p>2206.38</text:p>
          </table:table-cell>
          <table:table-cell table:style-name="ce3" table:formula="of:=AVERAGE([full_search.J31:.J36])" office:value-type="float" office:value="0" calcext:value-type="float">
            <text:p>0.00</text:p>
          </table:table-cell>
          <table:table-cell table:style-name="ce3" table:formula="of:=AVERAGE([full_search.K31:.K36])" office:value-type="float" office:value="411.90655502575" calcext:value-type="float">
            <text:p>411.91</text:p>
          </table:table-cell>
          <table:table-cell table:style-name="ce3" table:formula="of:=AVERAGE([full_search.L31:.L36])" office:value-type="float" office:value="1776.65746073575" calcext:value-type="float">
            <text:p>1776.66</text:p>
          </table:table-cell>
          <table:table-cell table:style-name="ce3" table:formula="of:=AVERAGE([full_search.M31:.M36])" office:value-type="float" office:value="0" calcext:value-type="float">
            <text:p>0.00</text:p>
          </table:table-cell>
          <table:table-cell table:style-name="ce3" table:number-columns-repeated="2"/>
          <table:table-cell table:style-name="ce3" table:formula="of:=AVERAGE([full_search.P31:.P36])" office:value-type="float" office:value="1864.8007680725" calcext:value-type="float">
            <text:p>1864.80</text:p>
          </table:table-cell>
          <table:table-cell table:style-name="ce3" table:formula="of:=AVERAGE([full_search.Q31:.Q36])" office:value-type="float" office:value="0" calcext:value-type="float">
            <text:p>0.00</text:p>
          </table:table-cell>
          <table:table-cell table:style-name="ce3" table:formula="of:=AVERAGE([full_search.R31:.R36])" office:value-type="float" office:value="0" calcext:value-type="float">
            <text:p>0.00</text:p>
          </table:table-cell>
          <table:table-cell table:style-name="ce3" table:formula="of:=AVERAGE([full_search.S31:.S36])" office:value-type="float" office:value="1831.716284989" calcext:value-type="float">
            <text:p>1831.72</text:p>
          </table:table-cell>
          <table:table-cell table:style-name="ce3" table:formula="of:=AVERAGE([full_search.T31:.T36])" office:value-type="float" office:value="32.681115693" calcext:value-type="float">
            <text:p>32.68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10"/>
          <table:table-cell office:value-type="float" office:value="344.542884588" calcext:value-type="float">
            <text:p>344.542884588</text:p>
          </table:table-cell>
          <table:table-cell office:value-type="float" office:value="31.8014850616" calcext:value-type="float">
            <text:p>31.8014850616</text:p>
          </table:table-cell>
          <table:table-cell office:value-type="float" office:value="78.6478016376" calcext:value-type="float">
            <text:p>78.6478016376</text:p>
          </table:table-cell>
          <table:table-cell office:value-type="float" office:value="147.618535519" calcext:value-type="float">
            <text:p>147.618535519</text:p>
          </table:table-cell>
          <table:table-cell office:value-type="float" office:value="56.6030631065" calcext:value-type="float">
            <text:p>56.60306310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4.542884588" calcext:value-type="float">
            <text:p>344.542884588</text:p>
          </table:table-cell>
          <table:table-cell office:value-type="float" office:value="60.7036013603" calcext:value-type="float">
            <text:p>60.70360136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344.542884588" calcext:value-type="float">
            <text:p>344.542884588</text:p>
          </table:table-cell>
          <table:table-cell office:value-type="float" office:value="60.7036013603" calcext:value-type="float">
            <text:p>60.7036013603</text:p>
          </table:table-cell>
          <table:table-cell table:number-columns-repeated="2"/>
          <table:table-cell office:value-type="float" office:value="349.645720959" calcext:value-type="float">
            <text:p>349.645720959</text:p>
          </table:table-cell>
          <table:table-cell office:value-type="float" office:value="55.8065154552" calcext:value-type="float">
            <text:p>55.8065154552</text:p>
          </table:table-cell>
          <table:table-cell office:value-type="float" office:value="109.036174774" calcext:value-type="float">
            <text:p>109.036174774</text:p>
          </table:table-cell>
          <table:table-cell office:value-type="float" office:value="92.9844353199" calcext:value-type="float">
            <text:p>92.9844353199</text:p>
          </table:table-cell>
          <table:table-cell office:value-type="float" office:value="56.408747673" calcext:value-type="float">
            <text:p>56.4087476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.645720959" calcext:value-type="float">
            <text:p>349.645720959</text:p>
          </table:table-cell>
          <table:table-cell office:value-type="float" office:value="95.6703898907" calcext:value-type="float">
            <text:p>95.67038989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349.645720959" calcext:value-type="float">
            <text:p>349.645720959</text:p>
          </table:table-cell>
          <table:table-cell office:value-type="float" office:value="95.6703898907" calcext:value-type="float">
            <text:p>95.6703898907</text:p>
          </table:table-cell>
          <table:table-cell table:number-columns-repeated="2"/>
          <table:table-cell office:value-type="float" office:value="814.850021839" calcext:value-type="float">
            <text:p>814.850021839</text:p>
          </table:table-cell>
          <table:table-cell office:value-type="float" office:value="61.0024602413" calcext:value-type="float">
            <text:p>61.0024602413</text:p>
          </table:table-cell>
          <table:table-cell office:value-type="float" office:value="91.0190176964" calcext:value-type="float">
            <text:p>91.0190176964</text:p>
          </table:table-cell>
          <table:table-cell office:value-type="float" office:value="568.433133364" calcext:value-type="float">
            <text:p>568.433133364</text:p>
          </table:table-cell>
          <table:table-cell office:value-type="float" office:value="58.8067622185" calcext:value-type="float">
            <text:p>58.80676221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4.482316732" calcext:value-type="float">
            <text:p>534.482316732</text:p>
          </table:table-cell>
          <table:table-cell office:value-type="float" office:value="120.082190275" calcext:value-type="float">
            <text:p>120.0821902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534.482316732" calcext:value-type="float">
            <text:p>534.482316732</text:p>
          </table:table-cell>
          <table:table-cell office:value-type="float" office:value="120.082190275" calcext:value-type="float">
            <text:p>120.082190275</text:p>
          </table:table-cell>
          <table:table-cell table:number-columns-repeated="2"/>
          <table:table-cell office:value-type="float" office:value="400.563981056" calcext:value-type="float">
            <text:p>400.563981056</text:p>
          </table:table-cell>
          <table:table-cell office:value-type="float" office:value="43.804176569" calcext:value-type="float">
            <text:p>43.804176569</text:p>
          </table:table-cell>
          <table:table-cell office:value-type="float" office:value="115.833212614" calcext:value-type="float">
            <text:p>115.833212614</text:p>
          </table:table-cell>
          <table:table-cell office:value-type="float" office:value="143.113963366" calcext:value-type="float">
            <text:p>143.113963366</text:p>
          </table:table-cell>
          <table:table-cell office:value-type="float" office:value="60.400690794" calcext:value-type="float">
            <text:p>60.4006907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4.850021839" calcext:value-type="float">
            <text:p>814.850021839</text:p>
          </table:table-cell>
          <table:table-cell office:value-type="float" office:value="73.9639773369" calcext:value-type="float">
            <text:p>73.9639773369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float" office:value="814.850021839" calcext:value-type="float">
            <text:p>814.850021839</text:p>
          </table:table-cell>
          <table:table-cell office:value-type="float" office:value="73.9639773369" calcext:value-type="float">
            <text:p>73.9639773369</text:p>
          </table:table-cell>
          <table:table-cell table:number-columns-repeated="2"/>
          <table:table-cell office:value-type="float" office:value="274.995448828" calcext:value-type="float">
            <text:p>274.9954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.634985209" calcext:value-type="float">
            <text:p>249.634985209</text:p>
          </table:table-cell>
          <table:table-cell office:value-type="float" office:value="21.4009466171" calcext:value-type="float">
            <text:p>21.40094661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.563981056" calcext:value-type="float">
            <text:p>400.563981056</text:p>
          </table:table-cell>
          <table:table-cell office:value-type="float" office:value="71.5709733963" calcext:value-type="float">
            <text:p>71.5709733963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float" office:value="400.563981056" calcext:value-type="float">
            <text:p>400.563981056</text:p>
          </table:table-cell>
          <table:table-cell office:value-type="float" office:value="71.5709733963" calcext:value-type="float">
            <text:p>71.5709733963</text:p>
          </table:table-cell>
          <table:table-cell table:number-columns-repeated="2"/>
          <table:table-cell office:value-type="float" office:value="1077.47635078" calcext:value-type="float">
            <text:p>1077.4763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.47837925" calcext:value-type="float">
            <text:p>1052.47837925</text:p>
          </table:table-cell>
          <table:table-cell office:value-type="float" office:value="20.3998959064" calcext:value-type="float">
            <text:p>20.39989590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4.995448828" calcext:value-type="float">
            <text:p>274.995448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table:number-columns-repeated="2"/>
          <table:table-cell office:value-type="float" office:value="274.995448828" calcext:value-type="float">
            <text:p>274.9954488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8.39850521" calcext:value-type="float">
            <text:p>1058.3985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.39544463" calcext:value-type="float">
            <text:p>1031.39544463</text:p>
          </table:table-cell>
          <table:table-cell office:value-type="float" office:value="20.9940736294" calcext:value-type="float">
            <text:p>20.99407362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77.47635078" calcext:value-type="float">
            <text:p>1077.47635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table:number-columns-repeated="2"/>
          <table:table-cell office:value-type="float" office:value="1077.47635078" calcext:value-type="float">
            <text:p>1077.476350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82.61613607" calcext:value-type="float">
            <text:p>1882.61613607</text:p>
          </table:table-cell>
          <table:table-cell office:value-type="float" office:value="0" calcext:value-type="float">
            <text:p>0</text:p>
          </table:table-cell>
          <table:table-cell office:value-type="float" office:value="162.610586405" calcext:value-type="float">
            <text:p>162.610586405</text:p>
          </table:table-cell>
          <table:table-cell office:value-type="float" office:value="1713.57447958" calcext:value-type="float">
            <text:p>1713.574479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8.39850521" calcext:value-type="float">
            <text:p>1058.39850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table:number-columns-repeated="2"/>
          <table:table-cell office:value-type="float" office:value="1058.39850521" calcext:value-type="float">
            <text:p>1058.398505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7.676231384" calcext:value-type="float">
            <text:p>447.676231384</text:p>
          </table:table-cell>
          <table:table-cell office:value-type="float" office:value="0" calcext:value-type="float">
            <text:p>0</text:p>
          </table:table-cell>
          <table:table-cell office:value-type="float" office:value="121.424663544" calcext:value-type="float">
            <text:p>121.424663544</text:p>
          </table:table-cell>
          <table:table-cell office:value-type="float" office:value="318.547799349" calcext:value-type="float">
            <text:p>318.5477993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82.61613607" calcext:value-type="float">
            <text:p>1882.61613607</text:p>
          </table:table-cell>
          <table:table-cell office:value-type="float" office:value="162.610586405" calcext:value-type="float">
            <text:p>162.610586405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1882.61613607" calcext:value-type="float">
            <text:p>1882.61613607</text:p>
          </table:table-cell>
          <table:table-cell office:value-type="float" office:value="162.610586405" calcext:value-type="float">
            <text:p>162.610586405</text:p>
          </table:table-cell>
          <table:table-cell table:number-columns-repeated="2"/>
          <table:table-cell office:value-type="float" office:value="425.280315399" calcext:value-type="float">
            <text:p>425.280315399</text:p>
          </table:table-cell>
          <table:table-cell office:value-type="float" office:value="0" calcext:value-type="float">
            <text:p>0</text:p>
          </table:table-cell>
          <table:table-cell office:value-type="float" office:value="148.419117451" calcext:value-type="float">
            <text:p>148.419117451</text:p>
          </table:table-cell>
          <table:table-cell office:value-type="float" office:value="270.114762545" calcext:value-type="float">
            <text:p>270.1147625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7.676231384" calcext:value-type="float">
            <text:p>447.676231384</text:p>
          </table:table-cell>
          <table:table-cell office:value-type="float" office:value="121.424663544" calcext:value-type="float">
            <text:p>121.424663544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447.676231384" calcext:value-type="float">
            <text:p>447.676231384</text:p>
          </table:table-cell>
          <table:table-cell office:value-type="float" office:value="121.424663544" calcext:value-type="float">
            <text:p>121.424663544</text:p>
          </table:table-cell>
          <table:table-cell table:number-columns-repeated="2"/>
          <table:table-cell office:value-type="float" office:value="511.531738281" calcext:value-type="float">
            <text:p>511.531738281</text:p>
          </table:table-cell>
          <table:table-cell office:value-type="float" office:value="0" calcext:value-type="float">
            <text:p>0</text:p>
          </table:table-cell>
          <table:table-cell office:value-type="float" office:value="160.416682959" calcext:value-type="float">
            <text:p>160.416682959</text:p>
          </table:table-cell>
          <table:table-cell office:value-type="float" office:value="343.590056419" calcext:value-type="float">
            <text:p>343.5900564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5.280315399" calcext:value-type="float">
            <text:p>425.280315399</text:p>
          </table:table-cell>
          <table:table-cell office:value-type="float" office:value="148.419117451" calcext:value-type="float">
            <text:p>148.419117451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425.280315399" calcext:value-type="float">
            <text:p>425.280315399</text:p>
          </table:table-cell>
          <table:table-cell office:value-type="float" office:value="148.419117451" calcext:value-type="float">
            <text:p>148.419117451</text:p>
          </table:table-cell>
          <table:table-cell table:number-columns-repeated="2"/>
          <table:table-cell office:value-type="float" office:value="345.791271925" calcext:value-type="float">
            <text:p>345.791271925</text:p>
          </table:table-cell>
          <table:table-cell office:value-type="float" office:value="25.4040248394" calcext:value-type="float">
            <text:p>25.4040248394</text:p>
          </table:table-cell>
          <table:table-cell office:value-type="float" office:value="77.6624419689" calcext:value-type="float">
            <text:p>77.6624419689</text:p>
          </table:table-cell>
          <table:table-cell office:value-type="float" office:value="193.471235037" calcext:value-type="float">
            <text:p>193.471235037</text:p>
          </table:table-cell>
          <table:table-cell office:value-type="float" office:value="20.6006660461" calcext:value-type="float">
            <text:p>20.60066604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1.531738281" calcext:value-type="float">
            <text:p>511.531738281</text:p>
          </table:table-cell>
          <table:table-cell office:value-type="float" office:value="160.416682959" calcext:value-type="float">
            <text:p>160.4166829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float" office:value="511.531738281" calcext:value-type="float">
            <text:p>511.531738281</text:p>
          </table:table-cell>
          <table:table-cell office:value-type="float" office:value="160.416682959" calcext:value-type="float">
            <text:p>160.416682959</text:p>
          </table:table-cell>
          <table:table-cell table:number-columns-repeated="2"/>
          <table:table-cell office:value-type="float" office:value="439.841646433" calcext:value-type="float">
            <text:p>439.841646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108391523" calcext:value-type="float">
            <text:p>416.108391523</text:p>
          </table:table-cell>
          <table:table-cell office:value-type="float" office:value="19.8043453693" calcext:value-type="float">
            <text:p>19.80434536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5.791271925" calcext:value-type="float">
            <text:p>345.791271925</text:p>
          </table:table-cell>
          <table:table-cell office:value-type="float" office:value="53.2389509678" calcext:value-type="float">
            <text:p>53.2389509678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float" office:value="345.791271925" calcext:value-type="float">
            <text:p>345.791271925</text:p>
          </table:table-cell>
          <table:table-cell office:value-type="float" office:value="53.2389509678" calcext:value-type="float">
            <text:p>53.23895096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9.841646433" calcext:value-type="float">
            <text:p>439.841646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float" office:value="439.841646433" calcext:value-type="float">
            <text:p>439.8416464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.3453883987" calcext:value-type="float">
            <text:p>28.3453883987</text:p>
          </table:table-cell>
          <table:table-cell office:value-type="float" office:value="3.37432429831" calcext:value-type="float">
            <text:p>3.3743242983</text:p>
          </table:table-cell>
          <table:table-cell office:value-type="float" office:value="12.4915843859" calcext:value-type="float">
            <text:p>12.4915843859</text:p>
          </table:table-cell>
          <table:table-cell office:value-type="float" office:value="11.6140316829" calcext:value-type="float">
            <text:p>11.6140316829</text:p>
          </table:table-cell>
          <table:table-cell office:value-type="float" office:value="0.746914702602" calcext:value-type="float">
            <text:p>0.746914702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6.7970177146" calcext:value-type="float">
            <text:p>26.7970177146</text:p>
          </table:table-cell>
          <table:table-cell office:value-type="float" office:value="4.8562407136" calcext:value-type="float">
            <text:p>4.8562407136</text:p>
          </table:table-cell>
          <table:table-cell office:value-type="float" office:value="15.1565028727" calcext:value-type="float">
            <text:p>15.1565028727</text:p>
          </table:table-cell>
          <table:table-cell office:value-type="float" office:value="6.03613808346" calcext:value-type="float">
            <text:p>6.0361380835</text:p>
          </table:table-cell>
          <table:table-cell office:value-type="float" office:value="0.640586926197" calcext:value-type="float">
            <text:p>0.64058692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3506971866" calcext:value-type="float">
            <text:p>28.3506971866</text:p>
          </table:table-cell>
          <table:table-cell office:value-type="float" office:value="4.84827177498" calcext:value-type="float">
            <text:p>4.848271775</text:p>
          </table:table-cell>
          <table:table-cell table:number-columns-repeated="3"/>
          <table:table-cell office:value-type="float" office:value="28.3506971866" calcext:value-type="float">
            <text:p>28.3506971866</text:p>
          </table:table-cell>
          <table:table-cell office:value-type="float" office:value="4.84827177498" calcext:value-type="float">
            <text:p>4.848271775</text:p>
          </table:table-cell>
          <table:table-cell table:number-columns-repeated="2"/>
          <table:table-cell office:value-type="float" office:value="50.0680494319" calcext:value-type="float">
            <text:p>50.0680494319</text:p>
          </table:table-cell>
          <table:table-cell office:value-type="float" office:value="4.31616290172" calcext:value-type="float">
            <text:p>4.3161629017</text:p>
          </table:table-cell>
          <table:table-cell office:value-type="float" office:value="13.3937016003" calcext:value-type="float">
            <text:p>13.3937016003</text:p>
          </table:table-cell>
          <table:table-cell office:value-type="float" office:value="31.7745674187" calcext:value-type="float">
            <text:p>31.7745674187</text:p>
          </table:table-cell>
          <table:table-cell office:value-type="float" office:value="0.478211770128" calcext:value-type="float">
            <text:p>0.47821177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990652648" calcext:value-type="float">
            <text:p>26.7990652648</text:p>
          </table:table-cell>
          <table:table-cell office:value-type="float" office:value="7.87058301134" calcext:value-type="float">
            <text:p>7.8705830113</text:p>
          </table:table-cell>
          <table:table-cell table:number-columns-repeated="3"/>
          <table:table-cell office:value-type="float" office:value="26.7990652648" calcext:value-type="float">
            <text:p>26.7990652648</text:p>
          </table:table-cell>
          <table:table-cell office:value-type="float" office:value="7.87058301134" calcext:value-type="float">
            <text:p>7.8705830113</text:p>
          </table:table-cell>
          <table:table-cell table:number-columns-repeated="2"/>
          <table:table-cell office:value-type="float" office:value="22.605566258" calcext:value-type="float">
            <text:p>22.605566258</text:p>
          </table:table-cell>
          <table:table-cell office:value-type="float" office:value="3.63064417111" calcext:value-type="float">
            <text:p>3.6306441711</text:p>
          </table:table-cell>
          <table:table-cell office:value-type="float" office:value="12.6524973177" calcext:value-type="float">
            <text:p>12.6524973177</text:p>
          </table:table-cell>
          <table:table-cell office:value-type="float" office:value="5.65025392014" calcext:value-type="float">
            <text:p>5.6502539201</text:p>
          </table:table-cell>
          <table:table-cell office:value-type="float" office:value="0.632908136926" calcext:value-type="float">
            <text:p>0.63290813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.4175687229" calcext:value-type="float">
            <text:p>41.4175687229</text:p>
          </table:table-cell>
          <table:table-cell office:value-type="float" office:value="5.40747161315" calcext:value-type="float">
            <text:p>5.4074716132</text:p>
          </table:table-cell>
          <table:table-cell table:number-columns-repeated="3"/>
          <table:table-cell office:value-type="float" office:value="41.4175687229" calcext:value-type="float">
            <text:p>41.4175687229</text:p>
          </table:table-cell>
          <table:table-cell office:value-type="float" office:value="5.40747161315" calcext:value-type="float">
            <text:p>5.4074716132</text:p>
          </table:table-cell>
          <table:table-cell table:number-columns-repeated="2"/>
          <table:table-cell office:value-type="float" office:value="16.1134000796" calcext:value-type="float">
            <text:p>16.1134000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33935358" calcext:value-type="float">
            <text:p>15.9333935358</text:p>
          </table:table-cell>
          <table:table-cell office:value-type="float" office:value="0.170584025583" calcext:value-type="float">
            <text:p>0.17058402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.0857242348" calcext:value-type="float">
            <text:p>50.0857242348</text:p>
          </table:table-cell>
          <table:table-cell office:value-type="float" office:value="5.84699553606" calcext:value-type="float">
            <text:p>5.8469955361</text:p>
          </table:table-cell>
          <table:table-cell table:number-columns-repeated="3"/>
          <table:table-cell office:value-type="float" office:value="50.0857242348" calcext:value-type="float">
            <text:p>50.0857242348</text:p>
          </table:table-cell>
          <table:table-cell office:value-type="float" office:value="5.84699553606" calcext:value-type="float">
            <text:p>5.8469955361</text:p>
          </table:table-cell>
          <table:table-cell table:number-columns-repeated="2"/>
          <table:table-cell office:value-type="float" office:value="59.0212950129" calcext:value-type="float">
            <text:p>59.021295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419532268" calcext:value-type="float">
            <text:p>58.6419532268</text:p>
          </table:table-cell>
          <table:table-cell office:value-type="float" office:value="0.328273970564" calcext:value-type="float">
            <text:p>0.32827397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.6089100616" calcext:value-type="float">
            <text:p>22.6089100616</text:p>
          </table:table-cell>
          <table:table-cell office:value-type="float" office:value="4.60546176606" calcext:value-type="float">
            <text:p>4.6054617661</text:p>
          </table:table-cell>
          <table:table-cell table:number-columns-repeated="3"/>
          <table:table-cell office:value-type="float" office:value="22.6089100616" calcext:value-type="float">
            <text:p>22.6089100616</text:p>
          </table:table-cell>
          <table:table-cell office:value-type="float" office:value="4.60546176606" calcext:value-type="float">
            <text:p>4.6054617661</text:p>
          </table:table-cell>
          <table:table-cell table:number-columns-repeated="2"/>
          <table:table-cell office:value-type="float" office:value="75.427119002" calcext:value-type="float">
            <text:p>75.42711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979441395" calcext:value-type="float">
            <text:p>74.9979441395</text:p>
          </table:table-cell>
          <table:table-cell office:value-type="float" office:value="0.347187593511" calcext:value-type="float">
            <text:p>0.34718759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.1238501329" calcext:value-type="float">
            <text:p>16.1238501329</text:p>
          </table:table-cell>
          <table:table-cell office:value-type="float" office:value="0.00937987216969" calcext:value-type="float">
            <text:p>0.0093798722</text:p>
          </table:table-cell>
          <table:table-cell table:number-columns-repeated="3"/>
          <table:table-cell office:value-type="float" office:value="16.1238501329" calcext:value-type="float">
            <text:p>16.1238501329</text:p>
          </table:table-cell>
          <table:table-cell office:value-type="float" office:value="0.00937987216969" calcext:value-type="float">
            <text:p>0.0093798722</text:p>
          </table:table-cell>
          <table:table-cell table:number-columns-repeated="2"/>
          <table:table-cell office:value-type="float" office:value="167.211595579" calcext:value-type="float">
            <text:p>167.211595579</text:p>
          </table:table-cell>
          <table:table-cell office:value-type="float" office:value="0" calcext:value-type="float">
            <text:p>0</text:p>
          </table:table-cell>
          <table:table-cell office:value-type="float" office:value="27.7709434779" calcext:value-type="float">
            <text:p>27.7709434779</text:p>
          </table:table-cell>
          <table:table-cell office:value-type="float" office:value="139.402728006" calcext:value-type="float">
            <text:p>139.4027280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.1209280465" calcext:value-type="float">
            <text:p>59.1209280465</text:p>
          </table:table-cell>
          <table:table-cell office:value-type="float" office:value="0.00626192620963" calcext:value-type="float">
            <text:p>0.0062619262</text:p>
          </table:table-cell>
          <table:table-cell table:number-columns-repeated="3"/>
          <table:table-cell office:value-type="float" office:value="59.1209280465" calcext:value-type="float">
            <text:p>59.1209280465</text:p>
          </table:table-cell>
          <table:table-cell office:value-type="float" office:value="0.00626192620963" calcext:value-type="float">
            <text:p>0.0062619262</text:p>
          </table:table-cell>
          <table:table-cell table:number-columns-repeated="2"/>
          <table:table-cell office:value-type="float" office:value="37.7291621825" calcext:value-type="float">
            <text:p>37.7291621825</text:p>
          </table:table-cell>
          <table:table-cell office:value-type="float" office:value="0" calcext:value-type="float">
            <text:p>0</text:p>
          </table:table-cell>
          <table:table-cell office:value-type="float" office:value="17.4242308454" calcext:value-type="float">
            <text:p>17.4242308454</text:p>
          </table:table-cell>
          <table:table-cell office:value-type="float" office:value="20.2729360521" calcext:value-type="float">
            <text:p>20.27293605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.5422468656" calcext:value-type="float">
            <text:p>75.5422468656</text:p>
          </table:table-cell>
          <table:table-cell office:value-type="float" office:value="0.011191058844" calcext:value-type="float">
            <text:p>0.0111910588</text:p>
          </table:table-cell>
          <table:table-cell table:number-columns-repeated="3"/>
          <table:table-cell office:value-type="float" office:value="75.5422468656" calcext:value-type="float">
            <text:p>75.5422468656</text:p>
          </table:table-cell>
          <table:table-cell office:value-type="float" office:value="0.011191058844" calcext:value-type="float">
            <text:p>0.0111910588</text:p>
          </table:table-cell>
          <table:table-cell table:number-columns-repeated="2"/>
          <table:table-cell office:value-type="float" office:value="45.0661144814" calcext:value-type="float">
            <text:p>45.0661144814</text:p>
          </table:table-cell>
          <table:table-cell office:value-type="float" office:value="0" calcext:value-type="float">
            <text:p>0</text:p>
          </table:table-cell>
          <table:table-cell office:value-type="float" office:value="25.9654123414" calcext:value-type="float">
            <text:p>25.9654123414</text:p>
          </table:table-cell>
          <table:table-cell office:value-type="float" office:value="19.0678018792" calcext:value-type="float">
            <text:p>19.06780187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7.223350797" calcext:value-type="float">
            <text:p>167.223350797</text:p>
          </table:table-cell>
          <table:table-cell office:value-type="float" office:value="27.6683504211" calcext:value-type="float">
            <text:p>27.6683504211</text:p>
          </table:table-cell>
          <table:table-cell table:number-columns-repeated="3"/>
          <table:table-cell office:value-type="float" office:value="167.223350797" calcext:value-type="float">
            <text:p>167.223350797</text:p>
          </table:table-cell>
          <table:table-cell office:value-type="float" office:value="27.6683504211" calcext:value-type="float">
            <text:p>27.6683504211</text:p>
          </table:table-cell>
          <table:table-cell table:number-columns-repeated="2"/>
          <table:table-cell office:value-type="float" office:value="45.613186466" calcext:value-type="float">
            <text:p>45.613186466</text:p>
          </table:table-cell>
          <table:table-cell office:value-type="float" office:value="0" calcext:value-type="float">
            <text:p>0</text:p>
          </table:table-cell>
          <table:table-cell office:value-type="float" office:value="27.4354646774" calcext:value-type="float">
            <text:p>27.4354646774</text:p>
          </table:table-cell>
          <table:table-cell office:value-type="float" office:value="18.1651787096" calcext:value-type="float">
            <text:p>18.16517870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.8516337007" calcext:value-type="float">
            <text:p>37.8516337007</text:p>
          </table:table-cell>
          <table:table-cell office:value-type="float" office:value="17.4131837928" calcext:value-type="float">
            <text:p>17.4131837928</text:p>
          </table:table-cell>
          <table:table-cell table:number-columns-repeated="3"/>
          <table:table-cell office:value-type="float" office:value="37.8516337007" calcext:value-type="float">
            <text:p>37.8516337007</text:p>
          </table:table-cell>
          <table:table-cell office:value-type="float" office:value="17.4131837928" calcext:value-type="float">
            <text:p>17.4131837928</text:p>
          </table:table-cell>
          <table:table-cell table:number-columns-repeated="2"/>
          <table:table-cell office:value-type="float" office:value="26.9869346772" calcext:value-type="float">
            <text:p>26.9869346772</text:p>
          </table:table-cell>
          <table:table-cell office:value-type="float" office:value="2.04324349497" calcext:value-type="float">
            <text:p>2.043243495</text:p>
          </table:table-cell>
          <table:table-cell office:value-type="float" office:value="12.3826210128" calcext:value-type="float">
            <text:p>12.3826210128</text:p>
          </table:table-cell>
          <table:table-cell office:value-type="float" office:value="12.3457298209" calcext:value-type="float">
            <text:p>12.3457298209</text:p>
          </table:table-cell>
          <table:table-cell office:value-type="float" office:value="0.182869311668" calcext:value-type="float">
            <text:p>0.18286931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.0823937119" calcext:value-type="float">
            <text:p>45.0823937119</text:p>
          </table:table-cell>
          <table:table-cell office:value-type="float" office:value="25.8779385992" calcext:value-type="float">
            <text:p>25.8779385992</text:p>
          </table:table-cell>
          <table:table-cell table:number-columns-repeated="3"/>
          <table:table-cell office:value-type="float" office:value="45.0823937119" calcext:value-type="float">
            <text:p>45.0823937119</text:p>
          </table:table-cell>
          <table:table-cell office:value-type="float" office:value="25.8779385992" calcext:value-type="float">
            <text:p>25.8779385992</text:p>
          </table:table-cell>
          <table:table-cell table:number-columns-repeated="2"/>
          <table:table-cell office:value-type="float" office:value="27.1764388551" calcext:value-type="float">
            <text:p>27.1764388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10331049" calcext:value-type="float">
            <text:p>27.010331049</text:p>
          </table:table-cell>
          <table:table-cell office:value-type="float" office:value="0.165979865875" calcext:value-type="float">
            <text:p>0.16597986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.6278815565" calcext:value-type="float">
            <text:p>45.6278815565</text:p>
          </table:table-cell>
          <table:table-cell office:value-type="float" office:value="27.4304057673" calcext:value-type="float">
            <text:p>27.4304057673</text:p>
          </table:table-cell>
          <table:table-cell table:number-columns-repeated="3"/>
          <table:table-cell office:value-type="float" office:value="45.6278815565" calcext:value-type="float">
            <text:p>45.6278815565</text:p>
          </table:table-cell>
          <table:table-cell office:value-type="float" office:value="27.4304057673" calcext:value-type="float">
            <text:p>27.43040576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.989321804" calcext:value-type="float">
            <text:p>26.989321804</text:p>
          </table:table-cell>
          <table:table-cell office:value-type="float" office:value="6.69399577518" calcext:value-type="float">
            <text:p>6.6939957752</text:p>
          </table:table-cell>
          <table:table-cell table:style-name="ce5"/>
          <table:table-cell table:number-columns-repeated="2"/>
          <table:table-cell office:value-type="float" office:value="26.989321804" calcext:value-type="float">
            <text:p>26.989321804</text:p>
          </table:table-cell>
          <table:table-cell office:value-type="float" office:value="6.69399577518" calcext:value-type="float">
            <text:p>6.6939957752</text:p>
          </table:table-cell>
          <table:table-cell table:number-columns-repeated="2"/>
          <table:table-cell office:value-type="float" office:value="1103.46483163" calcext:value-type="float">
            <text:p>1103.46483163</text:p>
          </table:table-cell>
          <table:table-cell office:value-type="float" office:value="114.554146778" calcext:value-type="float">
            <text:p>114.554146778</text:p>
          </table:table-cell>
          <table:table-cell office:value-type="float" office:value="284.264510151" calcext:value-type="float">
            <text:p>284.264510151</text:p>
          </table:table-cell>
          <table:table-cell office:value-type="float" office:value="445.893146413" calcext:value-type="float">
            <text:p>445.893146413</text:p>
          </table:table-cell>
          <table:table-cell office:value-type="float" office:value="158.186518302" calcext:value-type="float">
            <text:p>158.1865183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042662827" calcext:value-type="float">
            <text:p>27.2042662827</text:p>
          </table:table-cell>
          <table:table-cell table:style-name="ce5" office:value-type="float" office:value="1.11022302463E-016" calcext:value-type="float">
            <text:p>1.11E-16</text:p>
          </table:table-cell>
          <table:table-cell table:number-columns-repeated="3"/>
          <table:table-cell office:value-type="float" office:value="27.2042662827" calcext:value-type="float">
            <text:p>27.2042662827</text:p>
          </table:table-cell>
          <table:table-cell table:style-name="ce5" office:value-type="float" office:value="1.11022302463E-016" calcext:value-type="float">
            <text:p>1.11E-16</text:p>
          </table:table-cell>
          <table:table-cell table:number-columns-repeated="2"/>
          <table:table-cell office:value-type="float" office:value="1034.54593848" calcext:value-type="float">
            <text:p>1034.54593848</text:p>
          </table:table-cell>
          <table:table-cell office:value-type="float" office:value="156.440432735" calcext:value-type="float">
            <text:p>156.440432735</text:p>
          </table:table-cell>
          <table:table-cell office:value-type="float" office:value="294.06488204" calcext:value-type="float">
            <text:p>294.06488204</text:p>
          </table:table-cell>
          <table:table-cell office:value-type="float" office:value="405.675518115" calcext:value-type="float">
            <text:p>405.675518115</text:p>
          </table:table-cell>
          <table:table-cell office:value-type="float" office:value="110.624855152" calcext:value-type="float">
            <text:p>110.62485515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513.06710636" calcext:value-type="float">
            <text:p>2513.06710636</text:p>
          </table:table-cell>
          <table:table-cell office:value-type="float" office:value="193.912577255" calcext:value-type="float">
            <text:p>193.912577255</text:p>
          </table:table-cell>
          <table:table-cell office:value-type="float" office:value="249.108336555" calcext:value-type="float">
            <text:p>249.108336555</text:p>
          </table:table-cell>
          <table:table-cell office:value-type="float" office:value="1887.93197589" calcext:value-type="float">
            <text:p>1887.93197589</text:p>
          </table:table-cell>
          <table:table-cell office:value-type="float" office:value="111.991774049" calcext:value-type="float">
            <text:p>111.9917740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4.25378674" calcext:value-type="float">
            <text:p>1124.25378674</text:p>
          </table:table-cell>
          <table:table-cell office:value-type="float" office:value="210.162261776" calcext:value-type="float">
            <text:p>210.162261776</text:p>
          </table:table-cell>
          <table:table-cell table:number-columns-repeated="3"/>
          <table:table-cell office:value-type="float" office:value="1124.25378674" calcext:value-type="float">
            <text:p>1124.25378674</text:p>
          </table:table-cell>
          <table:table-cell office:value-type="float" office:value="210.162261776" calcext:value-type="float">
            <text:p>210.162261776</text:p>
          </table:table-cell>
          <table:table-cell table:number-columns-repeated="2"/>
          <table:table-cell office:value-type="float" office:value="1475.55919022" calcext:value-type="float">
            <text:p>1475.55919022</text:p>
          </table:table-cell>
          <table:table-cell office:value-type="float" office:value="177.30796111" calcext:value-type="float">
            <text:p>177.30796111</text:p>
          </table:table-cell>
          <table:table-cell office:value-type="float" office:value="387.578491919" calcext:value-type="float">
            <text:p>387.578491919</text:p>
          </table:table-cell>
          <table:table-cell office:value-type="float" office:value="617.552814039" calcext:value-type="float">
            <text:p>617.552814039</text:p>
          </table:table-cell>
          <table:table-cell office:value-type="float" office:value="173.539479974" calcext:value-type="float">
            <text:p>173.5394799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3.72872978" calcext:value-type="float">
            <text:p>1063.72872978</text:p>
          </table:table-cell>
          <table:table-cell office:value-type="float" office:value="224.096153807" calcext:value-type="float">
            <text:p>224.096153807</text:p>
          </table:table-cell>
          <table:table-cell table:number-columns-repeated="3"/>
          <table:table-cell office:value-type="float" office:value="1063.72872978" calcext:value-type="float">
            <text:p>1063.72872978</text:p>
          </table:table-cell>
          <table:table-cell office:value-type="float" office:value="224.096153807" calcext:value-type="float">
            <text:p>224.096153807</text:p>
          </table:table-cell>
          <table:table-cell table:number-columns-repeated="2"/>
          <table:table-cell office:value-type="float" office:value="705.72873124" calcext:value-type="float">
            <text:p>705.7287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.960694356" calcext:value-type="float">
            <text:p>668.960694356</text:p>
          </table:table-cell>
          <table:table-cell office:value-type="float" office:value="36.2602770834" calcext:value-type="float">
            <text:p>36.26027708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05.9000318" calcext:value-type="float">
            <text:p>1905.9000318</text:p>
          </table:table-cell>
          <table:table-cell office:value-type="float" office:value="331.175958062" calcext:value-type="float">
            <text:p>331.175958062</text:p>
          </table:table-cell>
          <table:table-cell table:number-columns-repeated="3"/>
          <table:table-cell office:value-type="float" office:value="1905.9000318" calcext:value-type="float">
            <text:p>1905.9000318</text:p>
          </table:table-cell>
          <table:table-cell office:value-type="float" office:value="331.175958062" calcext:value-type="float">
            <text:p>331.175958062</text:p>
          </table:table-cell>
          <table:table-cell table:number-columns-repeated="2"/>
          <table:table-cell office:value-type="float" office:value="2881.30813773" calcext:value-type="float">
            <text:p>2881.3081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0.61534074" calcext:value-type="float">
            <text:p>2850.61534074</text:p>
          </table:table-cell>
          <table:table-cell office:value-type="float" office:value="30.3357429857" calcext:value-type="float">
            <text:p>30.33574298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32.18874122" calcext:value-type="float">
            <text:p>2532.18874122</text:p>
          </table:table-cell>
          <table:table-cell office:value-type="float" office:value="182.804366409" calcext:value-type="float">
            <text:p>182.804366409</text:p>
          </table:table-cell>
          <table:table-cell table:number-columns-repeated="3"/>
          <table:table-cell office:value-type="float" office:value="2532.18874122" calcext:value-type="float">
            <text:p>2532.18874122</text:p>
          </table:table-cell>
          <table:table-cell office:value-type="float" office:value="182.804366409" calcext:value-type="float">
            <text:p>182.804366409</text:p>
          </table:table-cell>
          <table:table-cell table:number-columns-repeated="2"/>
          <table:table-cell office:value-type="float" office:value="2687.31603904" calcext:value-type="float">
            <text:p>2687.3160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.5960796" calcext:value-type="float">
            <text:p>2654.5960796</text:p>
          </table:table-cell>
          <table:table-cell office:value-type="float" office:value="32.184856945" calcext:value-type="float">
            <text:p>32.1848569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94.45823894" calcext:value-type="float">
            <text:p>1494.45823894</text:p>
          </table:table-cell>
          <table:table-cell office:value-type="float" office:value="239.69028689" calcext:value-type="float">
            <text:p>239.69028689</text:p>
          </table:table-cell>
          <table:table-cell table:number-columns-repeated="3"/>
          <table:table-cell office:value-type="float" office:value="1494.45823894" calcext:value-type="float">
            <text:p>1494.45823894</text:p>
          </table:table-cell>
          <table:table-cell office:value-type="float" office:value="239.69028689" calcext:value-type="float">
            <text:p>239.69028689</text:p>
          </table:table-cell>
          <table:table-cell table:number-columns-repeated="2"/>
          <table:table-cell office:value-type="float" office:value="4839.31631987" calcext:value-type="float">
            <text:p>4839.31631987</text:p>
          </table:table-cell>
          <table:table-cell office:value-type="float" office:value="0" calcext:value-type="float">
            <text:p>0</text:p>
          </table:table-cell>
          <table:table-cell office:value-type="float" office:value="534.606252111" calcext:value-type="float">
            <text:p>534.606252111</text:p>
          </table:table-cell>
          <table:table-cell office:value-type="float" office:value="4283.36944218" calcext:value-type="float">
            <text:p>4283.369442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9.230328842" calcext:value-type="float">
            <text:p>769.230328842</text:p>
          </table:table-cell>
          <table:table-cell office:value-type="float" office:value="0.186781311035" calcext:value-type="float">
            <text:p>0.186781311</text:p>
          </table:table-cell>
          <table:table-cell table:number-columns-repeated="3"/>
          <table:table-cell office:value-type="float" office:value="769.230328842" calcext:value-type="float">
            <text:p>769.230328842</text:p>
          </table:table-cell>
          <table:table-cell office:value-type="float" office:value="0.186781311035" calcext:value-type="float">
            <text:p>0.186781311</text:p>
          </table:table-cell>
          <table:table-cell table:number-columns-repeated="2"/>
          <table:table-cell office:value-type="float" office:value="1431.19442592" calcext:value-type="float">
            <text:p>1431.19442592</text:p>
          </table:table-cell>
          <table:table-cell office:value-type="float" office:value="0" calcext:value-type="float">
            <text:p>0</text:p>
          </table:table-cell>
          <table:table-cell office:value-type="float" office:value="379.191196812" calcext:value-type="float">
            <text:p>379.191196812</text:p>
          </table:table-cell>
          <table:table-cell office:value-type="float" office:value="1021.72893384" calcext:value-type="float">
            <text:p>1021.7289338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6.15712465" calcext:value-type="float">
            <text:p>2906.15712465</text:p>
          </table:table-cell>
          <table:table-cell office:value-type="float" office:value="0.268225097656" calcext:value-type="float">
            <text:p>0.2682250977</text:p>
          </table:table-cell>
          <table:table-cell table:number-columns-repeated="3"/>
          <table:table-cell office:value-type="float" office:value="2906.15712465" calcext:value-type="float">
            <text:p>2906.15712465</text:p>
          </table:table-cell>
          <table:table-cell office:value-type="float" office:value="0.268225097656" calcext:value-type="float">
            <text:p>0.2682250977</text:p>
          </table:table-cell>
          <table:table-cell table:number-columns-repeated="2"/>
          <table:table-cell office:value-type="float" office:value="1203.24639075" calcext:value-type="float">
            <text:p>1203.24639075</text:p>
          </table:table-cell>
          <table:table-cell office:value-type="float" office:value="0" calcext:value-type="float">
            <text:p>0</text:p>
          </table:table-cell>
          <table:table-cell office:value-type="float" office:value="364.628097389" calcext:value-type="float">
            <text:p>364.628097389</text:p>
          </table:table-cell>
          <table:table-cell office:value-type="float" office:value="827.036567706" calcext:value-type="float">
            <text:p>827.0365677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87.94773866" calcext:value-type="float">
            <text:p>2687.94773866</text:p>
          </table:table-cell>
          <table:table-cell office:value-type="float" office:value="0.190214157104" calcext:value-type="float">
            <text:p>0.1902141571</text:p>
          </table:table-cell>
          <table:table-cell table:number-columns-repeated="3"/>
          <table:table-cell office:value-type="float" office:value="2687.94773866" calcext:value-type="float">
            <text:p>2687.94773866</text:p>
          </table:table-cell>
          <table:table-cell office:value-type="float" office:value="0.190214157104" calcext:value-type="float">
            <text:p>0.1902141571</text:p>
          </table:table-cell>
          <table:table-cell table:number-columns-repeated="2"/>
          <table:table-cell office:value-type="float" office:value="1351.77933524" calcext:value-type="float">
            <text:p>1351.77933524</text:p>
          </table:table-cell>
          <table:table-cell office:value-type="float" office:value="0" calcext:value-type="float">
            <text:p>0</text:p>
          </table:table-cell>
          <table:table-cell office:value-type="float" office:value="369.200673791" calcext:value-type="float">
            <text:p>369.200673791</text:p>
          </table:table-cell>
          <table:table-cell office:value-type="float" office:value="974.494899217" calcext:value-type="float">
            <text:p>974.4948992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66.57307975" calcext:value-type="float">
            <text:p>4866.57307975</text:p>
          </table:table-cell>
          <table:table-cell office:value-type="float" office:value="532.958670862" calcext:value-type="float">
            <text:p>532.958670862</text:p>
          </table:table-cell>
          <table:table-cell table:number-columns-repeated="3"/>
          <table:table-cell office:value-type="float" office:value="4866.57307975" calcext:value-type="float">
            <text:p>4866.57307975</text:p>
          </table:table-cell>
          <table:table-cell office:value-type="float" office:value="532.958670862" calcext:value-type="float">
            <text:p>532.958670862</text:p>
          </table:table-cell>
          <table:table-cell table:number-columns-repeated="2"/>
          <table:table-cell office:value-type="float" office:value="918.442931825" calcext:value-type="float">
            <text:p>918.442931825</text:p>
          </table:table-cell>
          <table:table-cell office:value-type="float" office:value="66.9460283345" calcext:value-type="float">
            <text:p>66.9460283345</text:p>
          </table:table-cell>
          <table:table-cell office:value-type="float" office:value="214.86457202" calcext:value-type="float">
            <text:p>214.86457202</text:p>
          </table:table-cell>
          <table:table-cell office:value-type="float" office:value="531.543754415" calcext:value-type="float">
            <text:p>531.543754415</text:p>
          </table:table-cell>
          <table:table-cell office:value-type="float" office:value="41.6386517675" calcext:value-type="float">
            <text:p>41.63865176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78.81944619" calcext:value-type="float">
            <text:p>1478.81944619</text:p>
          </table:table-cell>
          <table:table-cell office:value-type="float" office:value="377.046065057" calcext:value-type="float">
            <text:p>377.046065057</text:p>
          </table:table-cell>
          <table:table-cell table:number-columns-repeated="3"/>
          <table:table-cell office:value-type="float" office:value="1478.81944619" calcext:value-type="float">
            <text:p>1478.81944619</text:p>
          </table:table-cell>
          <table:table-cell office:value-type="float" office:value="377.046065057" calcext:value-type="float">
            <text:p>377.046065057</text:p>
          </table:table-cell>
          <table:table-cell table:number-columns-repeated="2"/>
          <table:table-cell office:value-type="float" office:value="1184.85016428" calcext:value-type="float">
            <text:p>1184.85016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.69302526" calcext:value-type="float">
            <text:p>1152.69302526</text:p>
          </table:table-cell>
          <table:table-cell office:value-type="float" office:value="31.9435857579" calcext:value-type="float">
            <text:p>31.94358575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4.74206866" calcext:value-type="float">
            <text:p>1214.74206866</text:p>
          </table:table-cell>
          <table:table-cell office:value-type="float" office:value="363.77863365" calcext:value-type="float">
            <text:p>363.77863365</text:p>
          </table:table-cell>
          <table:table-cell table:number-columns-repeated="3"/>
          <table:table-cell office:value-type="float" office:value="1214.74206866" calcext:value-type="float">
            <text:p>1214.74206866</text:p>
          </table:table-cell>
          <table:table-cell office:value-type="float" office:value="363.77863365" calcext:value-type="float">
            <text:p>363.778633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8.02615612" calcext:value-type="float">
            <text:p>1388.02615612</text:p>
          </table:table-cell>
          <table:table-cell office:value-type="float" office:value="368.730623209" calcext:value-type="float">
            <text:p>368.730623209</text:p>
          </table:table-cell>
          <table:table-cell table:number-columns-repeated="3"/>
          <table:table-cell office:value-type="float" office:value="1388.02615612" calcext:value-type="float">
            <text:p>1388.02615612</text:p>
          </table:table-cell>
          <table:table-cell office:value-type="float" office:value="368.730623209" calcext:value-type="float">
            <text:p>368.7306232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4.12318794" calcext:value-type="float">
            <text:p>934.12318794</text:p>
          </table:table-cell>
          <table:table-cell office:value-type="float" office:value="159.272566089" calcext:value-type="float">
            <text:p>159.272566089</text:p>
          </table:table-cell>
          <table:table-cell table:number-columns-repeated="3"/>
          <table:table-cell office:value-type="float" office:value="934.12318794" calcext:value-type="float">
            <text:p>934.12318794</text:p>
          </table:table-cell>
          <table:table-cell office:value-type="float" office:value="159.272566089" calcext:value-type="float">
            <text:p>159.2725660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4.14587705" calcext:value-type="float">
            <text:p>1204.14587705</text:p>
          </table:table-cell>
          <table:table-cell office:value-type="float" office:value="0.107378959656" calcext:value-type="float">
            <text:p>0.1073789597</text:p>
          </table:table-cell>
          <table:table-cell table:number-columns-repeated="3"/>
          <table:table-cell office:value-type="float" office:value="1204.14587705" calcext:value-type="float">
            <text:p>1204.14587705</text:p>
          </table:table-cell>
          <table:table-cell office:value-type="float" office:value="0.107378959656" calcext:value-type="float">
            <text:p>0.107378959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10:16:53.430839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9:05:21.740981024</meta:creation-date>
    <dc:date>2018-04-16T13:20:49.877398648</dc:date>
    <meta:editing-duration>PT6H39M49S</meta:editing-duration>
    <meta:editing-cycles>16</meta:editing-cycles>
    <meta:generator>LibreOffice/5.1.6.2$Linux_X86_64 LibreOffice_project/10m0$Build-2</meta:generator>
    <meta:document-statistic meta:table-count="2" meta:cell-count="1222" meta:object-count="0"/>
  </office:meta>
</office:document-meta>
</file>
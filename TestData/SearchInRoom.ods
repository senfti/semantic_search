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6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ne_room_sear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8"/>
          <table:table-cell office:value-type="string" calcext:value-type="string">
            <text:p>Lab Bowl behind coffe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one_room_search.B6]-[one_room_search.C6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one_room_search.F6]-[one_room_search.G6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one_room_search.K6]-[one_room_search.L6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one_room_search.O6]-[one_room_search.P6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one_room_search.T6]-[one_room_search.U6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one_room_search.X6]-[one_room_search.Y6]" office:value-type="float" office:value="386.9775207047" calcext:value-type="float">
            <text:p>386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775.153986692" calcext:value-type="float">
            <text:p>775.15</text:p>
          </table:table-cell>
          <table:table-cell table:style-name="ce2" office:value-type="float" office:value="517.624473572" calcext:value-type="float">
            <text:p>517.62</text:p>
          </table:table-cell>
          <table:table-cell table:style-name="ce2" table:formula="of:=[one_room_search.AC6]-[one_room_search.AD6]" office:value-type="float" office:value="257.52951312" calcext:value-type="float">
            <text:p>257.53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369.1473012" calcext:value-type="float">
            <text:p>1369.1473012</text:p>
          </table:table-cell>
          <table:table-cell office:value-type="float" office:value="462.209053516" calcext:value-type="float">
            <text:p>462.209053516</text:p>
          </table:table-cell>
          <table:table-cell table:style-name="ce2" table:formula="of:=[one_room_search.AG6]-[one_room_search.AH6]" office:value-type="float" office:value="906.938247684" calcext:value-type="float">
            <text:p>906.94</text:p>
          </table:table-cell>
          <table:table-cell office:value-type="float" office:value="10" calcext:value-type="float">
            <text:p>10</text:p>
          </table:table-cell>
          <table:table-cell office:value-type="float" office:value="329.841547966" calcext:value-type="float">
            <text:p>329.841547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one_room_search.B7]-[one_room_search.C7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one_room_search.F7]-[one_room_search.G7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one_room_search.K7]-[one_room_search.L7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one_room_search.O7]-[one_room_search.P7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one_room_search.T7]-[one_room_search.U7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one_room_search.X7]-[one_room_search.Y7]" office:value-type="float" office:value="777.9848461153" calcext:value-type="float">
            <text:p>777.9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756.762353897" calcext:value-type="float">
            <text:p>756.76</text:p>
          </table:table-cell>
          <table:table-cell table:style-name="ce2" office:value-type="float" office:value="630.955423832" calcext:value-type="float">
            <text:p>630.96</text:p>
          </table:table-cell>
          <table:table-cell table:style-name="ce2" table:formula="of:=[one_room_search.AC7]-[one_room_search.AD7]" office:value-type="float" office:value="125.806930065" calcext:value-type="float">
            <text:p>125.81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346.85583234" calcext:value-type="float">
            <text:p>1346.85583234</text:p>
          </table:table-cell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2801.13865042" calcext:value-type="float">
            <text:p>2801.13865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one_room_search.B8]-[one_room_search.C8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one_room_search.F8]-[one_room_search.G8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one_room_search.K8]-[one_room_search.L8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one_room_search.O8]-[one_room_search.P8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one_room_search.T8]-[one_room_search.U8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one_room_search.X8]-[one_room_search.Y8]" office:value-type="float" office:value="431.0477626321" calcext:value-type="float">
            <text:p>431.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878.112246037" calcext:value-type="float">
            <text:p>878.11</text:p>
          </table:table-cell>
          <table:table-cell table:style-name="ce2" office:value-type="float" office:value="695.710998058" calcext:value-type="float">
            <text:p>695.71</text:p>
          </table:table-cell>
          <table:table-cell table:style-name="ce2" table:formula="of:=[one_room_search.AC8]-[one_room_search.AD8]" office:value-type="float" office:value="182.401247979" calcext:value-type="float">
            <text:p>182.40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one_room_search.B9]-[one_room_search.C9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one_room_search.F9]-[one_room_search.G9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one_room_search.K9]-[one_room_search.L9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one_room_search.O9]-[one_room_search.P9]" office:value-type="float" office:value="260.9093768594" calcext:value-type="float">
            <text:p>260.91</text:p>
          </table:table-cell>
          <table:table-cell table:number-columns-repeated="2"/>
          <table:table-cell table:style-name="ce2" office:value-type="float" office:value="476.477777958" calcext:value-type="float">
            <text:p>476.48</text:p>
          </table:table-cell>
          <table:table-cell table:style-name="ce2" office:value-type="float" office:value="111.048654556" calcext:value-type="float">
            <text:p>111.05</text:p>
          </table:table-cell>
          <table:table-cell table:style-name="ce2" table:formula="of:=[one_room_search.T9]-[one_room_search.U9]" office:value-type="float" office:value="365.429123402" calcext:value-type="float">
            <text:p>365.43</text:p>
          </table:table-cell>
          <table:table-cell table:style-name="ce2"/>
          <table:table-cell table:style-name="ce2" office:value-type="float" office:value="353.760957718" calcext:value-type="float">
            <text:p>353.76</text:p>
          </table:table-cell>
          <table:table-cell table:style-name="ce2" office:value-type="float" office:value="88.6263048649" calcext:value-type="float">
            <text:p>88.63</text:p>
          </table:table-cell>
          <table:table-cell table:style-name="ce2" table:formula="of:=[one_room_search.X9]-[one_room_search.Y9]" office:value-type="float" office:value="265.1346528531" calcext:value-type="float">
            <text:p>265.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829.159554958" calcext:value-type="float">
            <text:p>829.16</text:p>
          </table:table-cell>
          <table:table-cell table:style-name="ce2" office:value-type="float" office:value="581.421534777" calcext:value-type="float">
            <text:p>581.42</text:p>
          </table:table-cell>
          <table:table-cell table:style-name="ce2" table:formula="of:=[one_room_search.AC9]-[one_room_search.AD9]" office:value-type="float" office:value="247.738020181" calcext:value-type="float">
            <text:p>247.74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one_room_search.B10]-[one_room_search.C10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one_room_search.F10]-[one_room_search.G10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72.68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one_room_search.K10]-[one_room_search.L10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one_room_search.O10]-[one_room_search.P10]" office:value-type="float" office:value="92.756589651" calcext:value-type="float">
            <text:p>92.76</text:p>
          </table:table-cell>
          <table:table-cell table:number-columns-repeated="2"/>
          <table:table-cell table:style-name="ce2" office:value-type="float" office:value="362.75027585" calcext:value-type="float">
            <text:p>362.75</text:p>
          </table:table-cell>
          <table:table-cell table:style-name="ce2" office:value-type="float" office:value="97.4348564148" calcext:value-type="float">
            <text:p>97.43</text:p>
          </table:table-cell>
          <table:table-cell table:style-name="ce2" table:formula="of:=[one_room_search.T10]-[one_room_search.U10]" office:value-type="float" office:value="265.3154194352" calcext:value-type="float">
            <text:p>265.32</text:p>
          </table:table-cell>
          <table:table-cell table:style-name="ce2"/>
          <table:table-cell table:style-name="ce2" office:value-type="float" office:value="939.669893742" calcext:value-type="float">
            <text:p>939.67</text:p>
          </table:table-cell>
          <table:table-cell table:style-name="ce2" office:value-type="float" office:value="225.052073002" calcext:value-type="float">
            <text:p>225.05</text:p>
          </table:table-cell>
          <table:table-cell table:style-name="ce2" table:formula="of:=[one_room_search.X10]-[one_room_search.Y10]" office:value-type="float" office:value="714.61782074" calcext:value-type="float">
            <text:p>714.62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523.604285717" calcext:value-type="float">
            <text:p>523.60</text:p>
          </table:table-cell>
          <table:table-cell table:style-name="ce2" office:value-type="float" office:value="415.035742998" calcext:value-type="float">
            <text:p>415.04</text:p>
          </table:table-cell>
          <table:table-cell table:style-name="ce2" table:formula="of:=[one_room_search.AC10]-[one_room_search.AD10]" office:value-type="float" office:value="108.568542719" calcext:value-type="float">
            <text:p>108.57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6:.B10])" office:value-type="float" office:value="266.1628932" calcext:value-type="float">
            <text:p>266.16</text:p>
          </table:table-cell>
          <table:table-cell table:style-name="ce3" table:formula="of:=AVERAGE([one_room_search.C6:.C10])" office:value-type="float" office:value="92.48210701946" calcext:value-type="float">
            <text:p>92.48</text:p>
          </table:table-cell>
          <table:table-cell table:style-name="ce3" table:formula="of:=AVERAGE([one_room_search.D6:.D10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one_room_search.F6:.F10])" office:value-type="float" office:value="531.0130234718" calcext:value-type="float">
            <text:p>531.01</text:p>
          </table:table-cell>
          <table:table-cell table:style-name="ce3" table:formula="of:=AVERAGE([one_room_search.G6:.G10])" office:value-type="float" office:value="77.51694526672" calcext:value-type="float">
            <text:p>77.52</text:p>
          </table:table-cell>
          <table:table-cell table:style-name="ce3" table:formula="of:=AVERAGE([one_room_search.H6:.H10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one_room_search.K6:.K10])" office:value-type="float" office:value="162.7547261716" calcext:value-type="float">
            <text:p>162.75</text:p>
          </table:table-cell>
          <table:table-cell table:style-name="ce3" table:formula="of:=AVERAGE([one_room_search.L6:.L10])" office:value-type="float" office:value="70.26406755448" calcext:value-type="float">
            <text:p>70.26</text:p>
          </table:table-cell>
          <table:table-cell table:style-name="ce3" table:formula="of:=AVERAGE([one_room_search.M6:.M10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one_room_search.O6:.O10])" office:value-type="float" office:value="355.7123970986" calcext:value-type="float">
            <text:p>355.71</text:p>
          </table:table-cell>
          <table:table-cell table:style-name="ce3" table:formula="of:=AVERAGE([one_room_search.P6:.P10])" office:value-type="float" office:value="92.7626702309" calcext:value-type="float">
            <text:p>92.76</text:p>
          </table:table-cell>
          <table:table-cell table:style-name="ce3" table:formula="of:=AVERAGE([one_room_search.Q6:.Q10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one_room_search.T6:.T10])" office:value-type="float" office:value="462.870468521" calcext:value-type="float">
            <text:p>462.87</text:p>
          </table:table-cell>
          <table:table-cell table:style-name="ce3" table:formula="of:=AVERAGE([one_room_search.U6:.U10])" office:value-type="float" office:value="111.87942962642" calcext:value-type="float">
            <text:p>111.88</text:p>
          </table:table-cell>
          <table:table-cell table:style-name="ce3" table:formula="of:=AVERAGE([one_room_search.V6:.V10])" office:value-type="float" office:value="350.99103889458" calcext:value-type="float">
            <text:p>350.99</text:p>
          </table:table-cell>
          <table:table-cell table:style-name="ce3"/>
          <table:table-cell table:style-name="ce3" table:formula="of:=AVERAGE([one_room_search.X6:.X10])" office:value-type="float" office:value="625.440422249" calcext:value-type="float">
            <text:p>625.44</text:p>
          </table:table-cell>
          <table:table-cell table:style-name="ce3" table:formula="of:=AVERAGE([one_room_search.Y6:.Y10])" office:value-type="float" office:value="110.28790163996" calcext:value-type="float">
            <text:p>110.29</text:p>
          </table:table-cell>
          <table:table-cell table:style-name="ce3" table:formula="of:=AVERAGE([one_room_search.Z6:.Z10])" office:value-type="float" office:value="515.15252060904" calcext:value-type="float">
            <text:p>515.1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1132.64575911" calcext:value-type="float">
            <text:p>1132.65</text:p>
          </table:table-cell>
          <table:table-cell table:style-name="ce2" office:value-type="float" office:value="677.184596539" calcext:value-type="float">
            <text:p>677.18</text:p>
          </table:table-cell>
          <table:table-cell table:style-name="ce2" table:formula="of:=[one_room_search.AC11]-[one_room_search.AD11]" office:value-type="float" office:value="455.461162571" calcext:value-type="float">
            <text:p>455.46</text:p>
          </table:table-cell>
          <table:table-cell table:number-columns-repeated="8"/>
        </table:table-row>
        <table:table-row table:style-name="ro1">
          <table:table-cell table:number-columns-repeated="28"/>
          <table:table-cell table:style-name="ce3" table:formula="of:=AVERAGE([one_room_search.AC6:.AC11])" office:value-type="float" office:value="815.906364401833" calcext:value-type="float">
            <text:p>815.91</text:p>
          </table:table-cell>
          <table:table-cell table:style-name="ce3" table:formula="of:=AVERAGE([one_room_search.AD6:.AD11])" office:value-type="float" office:value="586.322128296" calcext:value-type="float">
            <text:p>586.32</text:p>
          </table:table-cell>
          <table:table-cell table:style-name="ce3" table:formula="of:=AVERAGE([one_room_search.AE6:.AE11])" office:value-type="float" office:value="229.584236105833" calcext:value-type="float">
            <text:p>229.58</text:p>
          </table:table-cell>
          <table:table-cell table:style-name="ce3"/>
          <table:table-cell table:style-name="ce3" table:formula="of:=AVERAGE([one_room_search.AG6:.AG11])" office:value-type="float" office:value="1358.00156677" calcext:value-type="float">
            <text:p>1358.00</text:p>
          </table:table-cell>
          <table:table-cell table:style-name="ce3" table:formula="of:=AVERAGE([one_room_search.AH6:.AH11])" office:value-type="float" office:value="462.209053516" calcext:value-type="float">
            <text:p>462.21</text:p>
          </table:table-cell>
          <table:table-cell table:style-name="ce3" table:formula="of:=AVERAGE([one_room_search.AI6:.AI11])" office:value-type="float" office:value="906.938247684" calcext:value-type="float">
            <text:p>906.94</text:p>
          </table:table-cell>
          <table:table-cell table:style-name="ce3"/>
          <table:table-cell table:style-name="ce3" table:formula="of:=AVERAGE([one_room_search.AK6:.AK11])" office:value-type="float" office:value="1565.490099193" calcext:value-type="float">
            <text:p>1565.49</text:p>
          </table:table-cell>
          <table:table-cell table:style-name="ce3" table:formula="of:=AVERAGE([one_room_search.AL6:.AL11])" office:value-type="float" office:value="0" calcext:value-type="float">
            <text:p>0.00</text:p>
          </table:table-cell>
          <table:table-cell/>
        </table:table-row>
        <table:table-row table:style-name="ro1" table:number-rows-repeated="3">
          <table:table-cell table:number-columns-repeated="39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8"/>
          <table:table-cell office:value-type="string" calcext:value-type="string">
            <text:p>Lab Bowl behind coffee, Pat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one_room_search.B19]-[one_room_search.C19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one_room_search.F19]-[one_room_search.G19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one_room_search.B20]-[one_room_search.C20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one_room_search.F20]-[one_room_search.G20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one_room_search.K20]-[one_room_search.L20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one_room_search.O20]-[one_room_search.P20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one_room_search.T20]-[one_room_search.U20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one_room_search.X20]-[one_room_search.Y20]" office:value-type="float" office:value="17.70475456906" calcext:value-type="float">
            <text:p>17.70</text:p>
          </table:table-cell>
          <table:table-cell table:number-columns-repeated="2"/>
          <table:table-cell table:style-name="ce2" office:value-type="float" office:value="79.2745684928" calcext:value-type="float">
            <text:p>79.27</text:p>
          </table:table-cell>
          <table:table-cell table:style-name="ce2" office:value-type="float" office:value="61.5163436149" calcext:value-type="float">
            <text:p>61.52</text:p>
          </table:table-cell>
          <table:table-cell table:style-name="ce2" table:formula="of:=[one_room_search.AC20]-[one_room_search.AD20]" office:value-type="float" office:value="17.7582248779" calcext:value-type="float">
            <text:p>17.76</text:p>
          </table:table-cell>
          <table:table-cell table:style-name="ce2"/>
          <table:table-cell table:style-name="ce2" office:value-type="float" office:value="117.122576147" calcext:value-type="float">
            <text:p>117.12</text:p>
          </table:table-cell>
          <table:table-cell table:style-name="ce2" office:value-type="float" office:value="69.090763672" calcext:value-type="float">
            <text:p>69.09</text:p>
          </table:table-cell>
          <table:table-cell table:style-name="ce2" office:value-type="float" office:value="117.122576147" calcext:value-type="float">
            <text:p>117.12</text:p>
          </table:table-cell>
          <table:table-cell/>
          <table:table-cell office:value-type="float" office:value="17.3335773261" calcext:value-type="float">
            <text:p>17.3335773261</text:p>
          </table:table-cell>
          <table:table-cell office:value-type="float" office:value="0.00377220869121" calcext:value-type="float">
            <text:p>0.0037722087</text:p>
          </table:table-cell>
          <table:table-cell/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one_room_search.B21]-[one_room_search.C21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one_room_search.F21]-[one_room_search.G21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one_room_search.K21]-[one_room_search.L21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one_room_search.O21]-[one_room_search.P21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one_room_search.T21]-[one_room_search.U21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one_room_search.X21]-[one_room_search.Y21]" office:value-type="float" office:value="32.78935188559" calcext:value-type="float">
            <text:p>32.79</text:p>
          </table:table-cell>
          <table:table-cell table:number-columns-repeated="2"/>
          <table:table-cell table:style-name="ce2" office:value-type="float" office:value="71.3682009098" calcext:value-type="float">
            <text:p>71.37</text:p>
          </table:table-cell>
          <table:table-cell table:style-name="ce2" office:value-type="float" office:value="68.053510202" calcext:value-type="float">
            <text:p>68.05</text:p>
          </table:table-cell>
          <table:table-cell table:style-name="ce2" table:formula="of:=[one_room_search.AC21]-[one_room_search.AD21]" office:value-type="float" office:value="3.3146907078" calcext:value-type="float">
            <text:p>3.31</text:p>
          </table:table-cell>
          <table:table-cell table:style-name="ce2"/>
          <table:table-cell office:value-type="float" office:value="58.5913538282" calcext:value-type="float">
            <text:p>58.5913538282</text:p>
          </table:table-cell>
          <table:table-cell/>
          <table:table-cell table:style-name="ce2"/>
          <table:table-cell/>
          <table:table-cell office:value-type="float" office:value="192.123849311" calcext:value-type="float">
            <text:p>192.123849311</text:p>
          </table:table-cell>
          <table:table-cell office:value-type="float" office:value="0.00378299271483" calcext:value-type="float">
            <text:p>0.0037829927</text:p>
          </table:table-cell>
          <table:table-cell/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one_room_search.B22]-[one_room_search.C22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one_room_search.F22]-[one_room_search.G22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one_room_search.K22]-[one_room_search.L22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one_room_search.O22]-[one_room_search.P22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one_room_search.T22]-[one_room_search.U22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one_room_search.X22]-[one_room_search.Y22]" office:value-type="float" office:value="20.66444638677" calcext:value-type="float">
            <text:p>20.66</text:p>
          </table:table-cell>
          <table:table-cell table:number-columns-repeated="2"/>
          <table:table-cell table:style-name="ce2" office:value-type="float" office:value="71.822349065" calcext:value-type="float">
            <text:p>71.82</text:p>
          </table:table-cell>
          <table:table-cell table:style-name="ce2" office:value-type="float" office:value="64.7764525557" calcext:value-type="float">
            <text:p>64.78</text:p>
          </table:table-cell>
          <table:table-cell table:style-name="ce2" table:formula="of:=[one_room_search.AC22]-[one_room_search.AD22]" office:value-type="float" office:value="7.04589650929999" calcext:value-type="float">
            <text:p>7.0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one_room_search.B23]-[one_room_search.C23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one_room_search.F23]-[one_room_search.G23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one_room_search.K23]-[one_room_search.L23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one_room_search.O23]-[one_room_search.P23]" office:value-type="float" office:value="9.56161175529" calcext:value-type="float">
            <text:p>9.56</text:p>
          </table:table-cell>
          <table:table-cell table:number-columns-repeated="2"/>
          <table:table-cell table:style-name="ce2" office:value-type="float" office:value="26.7939738166" calcext:value-type="float">
            <text:p>26.79</text:p>
          </table:table-cell>
          <table:table-cell table:style-name="ce2" office:value-type="float" office:value="6.87104768793" calcext:value-type="float">
            <text:p>6.87</text:p>
          </table:table-cell>
          <table:table-cell table:style-name="ce2" table:formula="of:=[one_room_search.T23]-[one_room_search.U23]" office:value-type="float" office:value="19.92292612867" calcext:value-type="float">
            <text:p>19.92</text:p>
          </table:table-cell>
          <table:table-cell table:style-name="ce2"/>
          <table:table-cell table:style-name="ce2" office:value-type="float" office:value="20.8873423727" calcext:value-type="float">
            <text:p>20.89</text:p>
          </table:table-cell>
          <table:table-cell table:style-name="ce2" office:value-type="float" office:value="8.72368303756" calcext:value-type="float">
            <text:p>8.72</text:p>
          </table:table-cell>
          <table:table-cell table:style-name="ce2" table:formula="of:=[one_room_search.X23]-[one_room_search.Y23]" office:value-type="float" office:value="12.16365933514" calcext:value-type="float">
            <text:p>12.16</text:p>
          </table:table-cell>
          <table:table-cell table:number-columns-repeated="2"/>
          <table:table-cell table:style-name="ce2" office:value-type="float" office:value="88.0483343628" calcext:value-type="float">
            <text:p>88.05</text:p>
          </table:table-cell>
          <table:table-cell table:style-name="ce2" office:value-type="float" office:value="70.6873616836" calcext:value-type="float">
            <text:p>70.69</text:p>
          </table:table-cell>
          <table:table-cell table:style-name="ce2" table:formula="of:=[one_room_search.AC23]-[one_room_search.AD23]" office:value-type="float" office:value="17.3609726792" calcext:value-type="float">
            <text:p>17.36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19:.B23])" office:value-type="float" office:value="12.631193204152" calcext:value-type="float">
            <text:p>12.63</text:p>
          </table:table-cell>
          <table:table-cell table:style-name="ce3" table:formula="of:=AVERAGE([one_room_search.C19:.C23])" office:value-type="float" office:value="6.688329878136" calcext:value-type="float">
            <text:p>6.69</text:p>
          </table:table-cell>
          <table:table-cell table:style-name="ce3" table:formula="of:=AVERAGE([one_room_search.D19:.D23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one_room_search.F19:.F23])" office:value-type="float" office:value="30.06314736566" calcext:value-type="float">
            <text:p>30.06</text:p>
          </table:table-cell>
          <table:table-cell table:style-name="ce3" table:formula="of:=AVERAGE([one_room_search.G19:.G23])" office:value-type="float" office:value="6.443737162808" calcext:value-type="float">
            <text:p>6.44</text:p>
          </table:table-cell>
          <table:table-cell table:style-name="ce3" table:formula="of:=AVERAGE([one_room_search.H19:.H23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one_room_search.K24]-[one_room_search.L24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one_room_search.O24]-[one_room_search.P24]" office:value-type="float" office:value="4.24138456088" calcext:value-type="float">
            <text:p>4.24</text:p>
          </table:table-cell>
          <table:table-cell table:number-columns-repeated="2"/>
          <table:table-cell table:style-name="ce2" office:value-type="float" office:value="14.8839112498" calcext:value-type="float">
            <text:p>14.88</text:p>
          </table:table-cell>
          <table:table-cell table:style-name="ce2" office:value-type="float" office:value="6.40722926927" calcext:value-type="float">
            <text:p>6.41</text:p>
          </table:table-cell>
          <table:table-cell table:style-name="ce2" table:formula="of:=[one_room_search.T24]-[one_room_search.U24]" office:value-type="float" office:value="8.47668198053" calcext:value-type="float">
            <text:p>8.48</text:p>
          </table:table-cell>
          <table:table-cell table:style-name="ce2"/>
          <table:table-cell table:style-name="ce2" office:value-type="float" office:value="47.5531648585" calcext:value-type="float">
            <text:p>47.55</text:p>
          </table:table-cell>
          <table:table-cell table:style-name="ce2" office:value-type="float" office:value="8.05721107133" calcext:value-type="float">
            <text:p>8.06</text:p>
          </table:table-cell>
          <table:table-cell table:style-name="ce2" table:formula="of:=[one_room_search.X24]-[one_room_search.Y24]" office:value-type="float" office:value="39.49595378717" calcext:value-type="float">
            <text:p>39.50</text:p>
          </table:table-cell>
          <table:table-cell table:number-columns-repeated="2"/>
          <table:table-cell table:style-name="ce2" office:value-type="float" office:value="60.3420370807" calcext:value-type="float">
            <text:p>60.34</text:p>
          </table:table-cell>
          <table:table-cell table:style-name="ce2" office:value-type="float" office:value="58.0404612151" calcext:value-type="float">
            <text:p>58.04</text:p>
          </table:table-cell>
          <table:table-cell table:style-name="ce2" table:formula="of:=[one_room_search.AC24]-[one_room_search.AD24]" office:value-type="float" office:value="2.3015758656" calcext:value-type="float">
            <text:p>2.30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10"/>
          <table:table-cell table:style-name="ce3" table:formula="of:=AVERAGE([one_room_search.K20:.K24])" office:value-type="float" office:value="9.842314383104" calcext:value-type="float">
            <text:p>9.84</text:p>
          </table:table-cell>
          <table:table-cell table:style-name="ce3" table:formula="of:=AVERAGE([one_room_search.L20:.L24])" office:value-type="float" office:value="5.607873944398" calcext:value-type="float">
            <text:p>5.61</text:p>
          </table:table-cell>
          <table:table-cell table:style-name="ce3" table:formula="of:=AVERAGE([one_room_search.M20:.M24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one_room_search.O20:.O24])" office:value-type="float" office:value="17.70493316406" calcext:value-type="float">
            <text:p>17.70</text:p>
          </table:table-cell>
          <table:table-cell table:style-name="ce3" table:formula="of:=AVERAGE([one_room_search.P20:.P24])" office:value-type="float" office:value="7.105698399186" calcext:value-type="float">
            <text:p>7.11</text:p>
          </table:table-cell>
          <table:table-cell table:style-name="ce3" table:formula="of:=AVERAGE([one_room_search.Q20:.Q24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one_room_search.T20:.T24])" office:value-type="float" office:value="21.30219896922" calcext:value-type="float">
            <text:p>21.30</text:p>
          </table:table-cell>
          <table:table-cell table:style-name="ce3" table:formula="of:=AVERAGE([one_room_search.U20:.U24])" office:value-type="float" office:value="5.96523769251" calcext:value-type="float">
            <text:p>5.97</text:p>
          </table:table-cell>
          <table:table-cell table:style-name="ce3" table:formula="of:=AVERAGE([one_room_search.V20:.V24])" office:value-type="float" office:value="15.33696127671" calcext:value-type="float">
            <text:p>15.34</text:p>
          </table:table-cell>
          <table:table-cell table:style-name="ce3"/>
          <table:table-cell table:style-name="ce3" table:formula="of:=AVERAGE([one_room_search.X20:.X24])" office:value-type="float" office:value="31.66064155238" calcext:value-type="float">
            <text:p>31.66</text:p>
          </table:table-cell>
          <table:table-cell table:style-name="ce3" table:formula="of:=AVERAGE([one_room_search.Y20:.Y24])" office:value-type="float" office:value="7.097008359634" calcext:value-type="float">
            <text:p>7.10</text:p>
          </table:table-cell>
          <table:table-cell table:style-name="ce3" table:formula="of:=AVERAGE([one_room_search.Z20:.Z24])" office:value-type="float" office:value="24.563633192746" calcext:value-type="float">
            <text:p>24.56</text:p>
          </table:table-cell>
          <table:table-cell table:number-columns-repeated="2"/>
          <table:table-cell table:style-name="ce2" office:value-type="float" office:value="118.189193689" calcext:value-type="float">
            <text:p>118.19</text:p>
          </table:table-cell>
          <table:table-cell table:style-name="ce2" office:value-type="float" office:value="86.9246536191" calcext:value-type="float">
            <text:p>86.92</text:p>
          </table:table-cell>
          <table:table-cell table:style-name="ce2" table:formula="of:=[one_room_search.AC25]-[one_room_search.AD25]" office:value-type="float" office:value="31.2645400699" calcext:value-type="float">
            <text:p>31.26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8"/>
          <table:table-cell table:style-name="ce3" table:formula="of:=AVERAGE([one_room_search.AC20:.AC26])" office:value-type="float" office:value="81.5074472666833" calcext:value-type="float">
            <text:p>81.51</text:p>
          </table:table-cell>
          <table:table-cell table:style-name="ce3" table:formula="of:=AVERAGE([one_room_search.AD20:.AD26])" office:value-type="float" office:value="68.3331304817333" calcext:value-type="float">
            <text:p>68.33</text:p>
          </table:table-cell>
          <table:table-cell table:style-name="ce3" table:formula="of:=AVERAGE([one_room_search.AE20:.AE26])" office:value-type="float" office:value="13.17431678495" calcext:value-type="float">
            <text:p>13.17</text:p>
          </table:table-cell>
          <table:table-cell table:style-name="ce3"/>
          <table:table-cell table:style-name="ce3" table:formula="of:=AVERAGE([one_room_search.AG20:.AG26])" office:value-type="float" office:value="87.8569649876" calcext:value-type="float">
            <text:p>87.86</text:p>
          </table:table-cell>
          <table:table-cell table:style-name="ce3" table:formula="of:=AVERAGE([one_room_search.AH20:.AH26])" office:value-type="float" office:value="69.090763672" calcext:value-type="float">
            <text:p>69.09</text:p>
          </table:table-cell>
          <table:table-cell table:style-name="ce3" table:formula="of:=AVERAGE([one_room_search.AI20:.AI26])" office:value-type="float" office:value="117.122576147" calcext:value-type="float">
            <text:p>117.12</text:p>
          </table:table-cell>
          <table:table-cell table:style-name="ce3"/>
          <table:table-cell table:style-name="ce3" table:formula="of:=AVERAGE([one_room_search.AK20:.AK26])" office:value-type="float" office:value="104.72871331855" calcext:value-type="float">
            <text:p>104.73</text:p>
          </table:table-cell>
          <table:table-cell table:style-name="ce3" table:formula="of:=AVERAGE([one_room_search.AL20:.AL26])" office:value-type="float" office:value="0.00377760070302" calcext:value-type="float">
            <text:p>0.00</text:p>
          </table:table-cell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8"/>
          <table:table-cell office:value-type="string" calcext:value-type="string">
            <text:p>Lab Bowl behind coffee, Angle Pat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one_room_search.B33]-[one_room_search.C33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one_room_search.F33]-[one_room_search.G33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one_room_search.B34]-[one_room_search.C34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one_room_search.F34]-[one_room_search.G34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one_room_search.K34]-[one_room_search.L34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one_room_search.O34]-[one_room_search.P34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one_room_search.T34]-[one_room_search.U34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one_room_search.X34]-[one_room_search.Y34]" office:value-type="float" office:value="1079.731609335" calcext:value-type="float">
            <text:p>1079.73</text:p>
          </table:table-cell>
          <table:table-cell table:number-columns-repeated="2"/>
          <table:table-cell table:style-name="ce2" office:value-type="float" office:value="2595.69361728" calcext:value-type="float">
            <text:p>2595.69</text:p>
          </table:table-cell>
          <table:table-cell table:style-name="ce2" office:value-type="float" office:value="1598.38720981" calcext:value-type="float">
            <text:p>1598.39</text:p>
          </table:table-cell>
          <table:table-cell table:style-name="ce2" table:formula="of:=[one_room_search.AC34]-[one_room_search.AD34]" office:value-type="float" office:value="997.30640747" calcext:value-type="float">
            <text:p>997.31</text:p>
          </table:table-cell>
          <table:table-cell table:style-name="ce2"/>
          <table:table-cell table:style-name="ce2" office:value-type="float" office:value="3899.49101991" calcext:value-type="float">
            <text:p>3899.49</text:p>
          </table:table-cell>
          <table:table-cell table:style-name="ce2" office:value-type="float" office:value="1374.67794718" calcext:value-type="float">
            <text:p>1374.68</text:p>
          </table:table-cell>
          <table:table-cell table:style-name="ce2" table:formula="of:=[one_room_search.AG34]-[one_room_search.AH34]" office:value-type="float" office:value="2524.81307273" calcext:value-type="float">
            <text:p>2524.81</text:p>
          </table:table-cell>
          <table:table-cell/>
          <table:table-cell office:value-type="float" office:value="1042.72459808" calcext:value-type="float">
            <text:p>1042.72459808</text:p>
          </table:table-cell>
          <table:table-cell office:value-type="float" office:value="0.076699256897" calcext:value-type="float">
            <text:p>0.0766992569</text:p>
          </table:table-cell>
          <table:table-cell/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one_room_search.B35]-[one_room_search.C35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one_room_search.F35]-[one_room_search.G35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one_room_search.K35]-[one_room_search.L35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one_room_search.O35]-[one_room_search.P35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one_room_search.T35]-[one_room_search.U35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one_room_search.X35]-[one_room_search.Y35]" office:value-type="float" office:value="2542.972255697" calcext:value-type="float">
            <text:p>2542.97</text:p>
          </table:table-cell>
          <table:table-cell table:number-columns-repeated="2"/>
          <table:table-cell table:style-name="ce2" office:value-type="float" office:value="2185.56660621" calcext:value-type="float">
            <text:p>2185.57</text:p>
          </table:table-cell>
          <table:table-cell table:style-name="ce2" office:value-type="float" office:value="1862.55699681" calcext:value-type="float">
            <text:p>1862.56</text:p>
          </table:table-cell>
          <table:table-cell table:style-name="ce2" table:formula="of:=[one_room_search.AC35]-[one_room_search.AD35]" office:value-type="float" office:value="323.0096094" calcext:value-type="float">
            <text:p>323.01</text:p>
          </table:table-cell>
          <table:table-cell table:style-name="ce2"/>
          <table:table-cell office:value-type="float" office:value="3667.37866088" calcext:value-type="float">
            <text:p>3667.37866088</text:p>
          </table:table-cell>
          <table:table-cell/>
          <table:table-cell table:style-name="ce2"/>
          <table:table-cell/>
          <table:table-cell office:value-type="float" office:value="7576.89887285" calcext:value-type="float">
            <text:p>7576.89887285</text:p>
          </table:table-cell>
          <table:table-cell office:value-type="float" office:value="0.0411039352417" calcext:value-type="float">
            <text:p>0.0411039352</text:p>
          </table:table-cell>
          <table:table-cell/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one_room_search.B36]-[one_room_search.C36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one_room_search.F36]-[one_room_search.G36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one_room_search.K36]-[one_room_search.L36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one_room_search.O36]-[one_room_search.P36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one_room_search.T36]-[one_room_search.U36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one_room_search.X36]-[one_room_search.Y36]" office:value-type="float" office:value="1270.159429345" calcext:value-type="float">
            <text:p>1270.16</text:p>
          </table:table-cell>
          <table:table-cell table:number-columns-repeated="2"/>
          <table:table-cell table:style-name="ce2" office:value-type="float" office:value="2349.50173796" calcext:value-type="float">
            <text:p>2349.50</text:p>
          </table:table-cell>
          <table:table-cell table:style-name="ce2" office:value-type="float" office:value="1863.35007103" calcext:value-type="float">
            <text:p>1863.35</text:p>
          </table:table-cell>
          <table:table-cell table:style-name="ce2" table:formula="of:=[one_room_search.AC36]-[one_room_search.AD36]" office:value-type="float" office:value="486.15166693" calcext:value-type="float">
            <text:p>486.1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one_room_search.B37]-[one_room_search.C37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one_room_search.F37]-[one_room_search.G37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one_room_search.K37]-[one_room_search.L37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one_room_search.O37]-[one_room_search.P37]" office:value-type="float" office:value="870.999925932" calcext:value-type="float">
            <text:p>871.00</text:p>
          </table:table-cell>
          <table:table-cell table:number-columns-repeated="2"/>
          <table:table-cell table:style-name="ce2" office:value-type="float" office:value="1617.31623447" calcext:value-type="float">
            <text:p>1617.32</text:p>
          </table:table-cell>
          <table:table-cell table:style-name="ce2" office:value-type="float" office:value="403.612606896" calcext:value-type="float">
            <text:p>403.61</text:p>
          </table:table-cell>
          <table:table-cell table:style-name="ce2" table:formula="of:=[one_room_search.T37]-[one_room_search.U37]" office:value-type="float" office:value="1213.703627574" calcext:value-type="float">
            <text:p>1213.70</text:p>
          </table:table-cell>
          <table:table-cell table:style-name="ce2"/>
          <table:table-cell table:style-name="ce2" office:value-type="float" office:value="1574.52187125" calcext:value-type="float">
            <text:p>1574.52</text:p>
          </table:table-cell>
          <table:table-cell table:style-name="ce2" office:value-type="float" office:value="236.013391043" calcext:value-type="float">
            <text:p>236.01</text:p>
          </table:table-cell>
          <table:table-cell table:style-name="ce2" table:formula="of:=[one_room_search.X37]-[one_room_search.Y37]" office:value-type="float" office:value="1338.508480207" calcext:value-type="float">
            <text:p>1338.51</text:p>
          </table:table-cell>
          <table:table-cell table:number-columns-repeated="2"/>
          <table:table-cell table:style-name="ce2" office:value-type="float" office:value="2624.20713555" calcext:value-type="float">
            <text:p>2624.21</text:p>
          </table:table-cell>
          <table:table-cell table:style-name="ce2" office:value-type="float" office:value="1778.02891209" calcext:value-type="float">
            <text:p>1778.03</text:p>
          </table:table-cell>
          <table:table-cell table:style-name="ce2" table:formula="of:=[one_room_search.AC37]-[one_room_search.AD37]" office:value-type="float" office:value="846.17822346" calcext:value-type="float">
            <text:p>846.18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33:.B37])" office:value-type="float" office:value="804.819669646" calcext:value-type="float">
            <text:p>804.82</text:p>
          </table:table-cell>
          <table:table-cell table:style-name="ce3" table:formula="of:=AVERAGE([one_room_search.C33:.C37])" office:value-type="float" office:value="216.8935924764" calcext:value-type="float">
            <text:p>216.89</text:p>
          </table:table-cell>
          <table:table-cell table:style-name="ce3" table:formula="of:=AVERAGE([one_room_search.D33:.D37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one_room_search.F33:.F37])" office:value-type="float" office:value="1683.2901992464" calcext:value-type="float">
            <text:p>1683.29</text:p>
          </table:table-cell>
          <table:table-cell table:style-name="ce3" table:formula="of:=AVERAGE([one_room_search.G33:.G37])" office:value-type="float" office:value="213.13011296" calcext:value-type="float">
            <text:p>213.13</text:p>
          </table:table-cell>
          <table:table-cell table:style-name="ce3" table:formula="of:=AVERAGE([one_room_search.H33:.H37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one_room_search.K38]-[one_room_search.L38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one_room_search.O38]-[one_room_search.P38]" office:value-type="float" office:value="306.892856033" calcext:value-type="float">
            <text:p>306.89</text:p>
          </table:table-cell>
          <table:table-cell table:number-columns-repeated="2"/>
          <table:table-cell table:style-name="ce2" office:value-type="float" office:value="1344.7031704" calcext:value-type="float">
            <text:p>1344.70</text:p>
          </table:table-cell>
          <table:table-cell table:style-name="ce2" office:value-type="float" office:value="335.905373652" calcext:value-type="float">
            <text:p>335.91</text:p>
          </table:table-cell>
          <table:table-cell table:style-name="ce2" table:formula="of:=[one_room_search.T38]-[one_room_search.U38]" office:value-type="float" office:value="1008.797796748" calcext:value-type="float">
            <text:p>1008.80</text:p>
          </table:table-cell>
          <table:table-cell table:style-name="ce2"/>
          <table:table-cell table:style-name="ce2" office:value-type="float" office:value="2918.24296467" calcext:value-type="float">
            <text:p>2918.24</text:p>
          </table:table-cell>
          <table:table-cell table:style-name="ce2" office:value-type="float" office:value="702.021439957" calcext:value-type="float">
            <text:p>702.02</text:p>
          </table:table-cell>
          <table:table-cell table:style-name="ce2" table:formula="of:=[one_room_search.X38]-[one_room_search.Y38]" office:value-type="float" office:value="2216.221524713" calcext:value-type="float">
            <text:p>2216.22</text:p>
          </table:table-cell>
          <table:table-cell table:number-columns-repeated="2"/>
          <table:table-cell table:style-name="ce2" office:value-type="float" office:value="1445.07840828" calcext:value-type="float">
            <text:p>1445.08</text:p>
          </table:table-cell>
          <table:table-cell table:style-name="ce2" office:value-type="float" office:value="1206.6285478" calcext:value-type="float">
            <text:p>1206.63</text:p>
          </table:table-cell>
          <table:table-cell table:style-name="ce2" table:formula="of:=[one_room_search.AC38]-[one_room_search.AD38]" office:value-type="float" office:value="238.44986048" calcext:value-type="float">
            <text:p>238.4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10"/>
          <table:table-cell table:style-name="ce3" table:formula="of:=AVERAGE([one_room_search.K34:.K38])" office:value-type="float" office:value="523.4375653602" calcext:value-type="float">
            <text:p>523.44</text:p>
          </table:table-cell>
          <table:table-cell table:style-name="ce3" table:formula="of:=AVERAGE([one_room_search.L34:.L38])" office:value-type="float" office:value="198.2779334126" calcext:value-type="float">
            <text:p>198.28</text:p>
          </table:table-cell>
          <table:table-cell table:style-name="ce3" table:formula="of:=AVERAGE([one_room_search.M34:.M38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one_room_search.O34:.O38])" office:value-type="float" office:value="1162.2458922056" calcext:value-type="float">
            <text:p>1162.25</text:p>
          </table:table-cell>
          <table:table-cell table:style-name="ce3" table:formula="of:=AVERAGE([one_room_search.P34:.P38])" office:value-type="float" office:value="253.6992279616" calcext:value-type="float">
            <text:p>253.70</text:p>
          </table:table-cell>
          <table:table-cell table:style-name="ce3" table:formula="of:=AVERAGE([one_room_search.Q34:.Q38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one_room_search.T34:.T38])" office:value-type="float" office:value="1433.72661952" calcext:value-type="float">
            <text:p>1433.73</text:p>
          </table:table-cell>
          <table:table-cell table:style-name="ce3" table:formula="of:=AVERAGE([one_room_search.U34:.U38])" office:value-type="float" office:value="309.7210470026" calcext:value-type="float">
            <text:p>309.72</text:p>
          </table:table-cell>
          <table:table-cell table:style-name="ce3" table:formula="of:=AVERAGE([one_room_search.V34:.V38])" office:value-type="float" office:value="1124.0055725174" calcext:value-type="float">
            <text:p>1124.01</text:p>
          </table:table-cell>
          <table:table-cell table:style-name="ce3"/>
          <table:table-cell table:style-name="ce3" table:formula="of:=AVERAGE([one_room_search.X34:.X38])" office:value-type="float" office:value="2007.57658462" calcext:value-type="float">
            <text:p>2007.58</text:p>
          </table:table-cell>
          <table:table-cell table:style-name="ce3" table:formula="of:=AVERAGE([one_room_search.Y34:.Y38])" office:value-type="float" office:value="318.0579247606" calcext:value-type="float">
            <text:p>318.06</text:p>
          </table:table-cell>
          <table:table-cell table:style-name="ce3" table:formula="of:=AVERAGE([one_room_search.Z34:.Z38])" office:value-type="float" office:value="1689.5186598594" calcext:value-type="float">
            <text:p>1689.52</text:p>
          </table:table-cell>
          <table:table-cell table:number-columns-repeated="2"/>
          <table:table-cell table:style-name="ce2" office:value-type="float" office:value="3398.89393615" calcext:value-type="float">
            <text:p>3398.89</text:p>
          </table:table-cell>
          <table:table-cell table:style-name="ce2" office:value-type="float" office:value="1906.28652865" calcext:value-type="float">
            <text:p>1906.29</text:p>
          </table:table-cell>
          <table:table-cell table:style-name="ce2" table:formula="of:=[one_room_search.AC39]-[one_room_search.AD39]" office:value-type="float" office:value="1492.6074075" calcext:value-type="float">
            <text:p>1492.61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28"/>
          <table:table-cell table:style-name="ce3" table:formula="of:=AVERAGE([one_room_search.AC34:.AC39])" office:value-type="float" office:value="2433.156906905" calcext:value-type="float">
            <text:p>2433.16</text:p>
          </table:table-cell>
          <table:table-cell table:style-name="ce3" table:formula="of:=AVERAGE([one_room_search.AD34:.AD39])" office:value-type="float" office:value="1702.53971103167" calcext:value-type="float">
            <text:p>1702.54</text:p>
          </table:table-cell>
          <table:table-cell table:style-name="ce3" table:formula="of:=AVERAGE([one_room_search.AE34:.AE39])" office:value-type="float" office:value="730.617195873333" calcext:value-type="float">
            <text:p>730.62</text:p>
          </table:table-cell>
          <table:table-cell table:style-name="ce3"/>
          <table:table-cell table:style-name="ce3" table:formula="of:=AVERAGE([one_room_search.AG34:.AG39])" office:value-type="float" office:value="3783.434840395" calcext:value-type="float">
            <text:p>3783.43</text:p>
          </table:table-cell>
          <table:table-cell table:style-name="ce3" table:formula="of:=AVERAGE([one_room_search.AH34:.AH39])" office:value-type="float" office:value="1374.67794718" calcext:value-type="float">
            <text:p>1374.68</text:p>
          </table:table-cell>
          <table:table-cell table:style-name="ce3" table:formula="of:=AVERAGE([one_room_search.AI34:.AI39])" office:value-type="float" office:value="2524.81307273" calcext:value-type="float">
            <text:p>2524.81</text:p>
          </table:table-cell>
          <table:table-cell table:style-name="ce3"/>
          <table:table-cell table:style-name="ce3" table:formula="of:=AVERAGE([one_room_search.AK34:.AK39])" office:value-type="float" office:value="4309.811735465" calcext:value-type="float">
            <text:p>4309.81</text:p>
          </table:table-cell>
          <table:table-cell table:style-name="ce3" table:formula="of:=AVERAGE([one_room_search.AL34:.AL39])" office:value-type="float" office:value="0.05890159606935" calcext:value-type="float">
            <text:p>0.06</text:p>
          </table:table-cell>
          <table:table-cell/>
        </table:table-row>
        <table:table-row table:style-name="ro1" table:number-rows-repeated="13">
          <table:table-cell table:number-columns-repeated="39"/>
        </table:table-row>
        <table:table-row table:style-name="ro1">
          <table:table-cell office:value-type="string" calcext:value-type="string">
            <text:p>Runs: 34</text:p>
          </table:table-cell>
          <table:table-cell office:value-type="string" calcext:value-type="string">
            <text:p>Success: 28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Errors: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wrong object found (2x remote, 1x spoon)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avigation error (1x dwa invalid trajectory)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object not found (1x remote, 1x spoon), both times bad light</text:p>
          </table:table-cell>
          <table:table-cell table:number-columns-repeated="38"/>
        </table:table-row>
      </table:table>
      <table:table table:name="full_search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 table:style-name="ce2"/>
          <table:table-cell table:style-name="ce2" office:value-type="string" calcext:value-type="string">
            <text:p>r30</text:p>
          </table:table-cell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7</text:p>
          </table:table-cell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 table:style-name="ce2"/>
          <table:table-cell table:style-name="ce2" office:value-type="string" calcext:value-type="string">
            <text:p>r31</text:p>
          </table:table-cell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8</text:p>
          </table:table-cell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style-name="ce2"/>
          <table:table-cell table:style-name="ce2" office:value-type="string" calcext:value-type="string">
            <text:p>r33</text:p>
          </table:table-cell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9</text:p>
          </table:table-cell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style-name="ce2"/>
          <table:table-cell table:style-name="ce2" office:value-type="string" calcext:value-type="string">
            <text:p>s34</text:p>
          </table:table-cell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s37</text:p>
          </table:table-cell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6:.B11])" office:value-type="float" office:value="477.4006521105" calcext:value-type="float">
            <text:p>477.40</text:p>
          </table:table-cell>
          <table:table-cell table:style-name="ce3" table:formula="of:=AVERAGE([full_search.C6:.C11])" office:value-type="float" office:value="48.103659331775" calcext:value-type="float">
            <text:p>48.10</text:p>
          </table:table-cell>
          <table:table-cell table:style-name="ce3" table:formula="of:=AVERAGE([full_search.D6:.D11])" office:value-type="float" office:value="98.6340516805" calcext:value-type="float">
            <text:p>98.63</text:p>
          </table:table-cell>
          <table:table-cell table:style-name="ce3" table:formula="of:=AVERAGE([full_search.E6:.E11])" office:value-type="float" office:value="238.037516892225" calcext:value-type="float">
            <text:p>238.04</text:p>
          </table:table-cell>
          <table:table-cell table:style-name="ce3" table:formula="of:=AVERAGE([full_search.F6:.F11])" office:value-type="float" office:value="58.054815948" calcext:value-type="float">
            <text:p>58.05</text:p>
          </table:table-cell>
          <table:table-cell table:style-name="ce3" table:number-columns-repeated="2"/>
          <table:table-cell table:style-name="ce3" table:formula="of:=AVERAGE([full_search.I6:.I11])" office:value-type="float" office:value="816.7761052835" calcext:value-type="float">
            <text:p>816.78</text:p>
          </table:table-cell>
          <table:table-cell table:style-name="ce3" table:formula="of:=AVERAGE([full_search.J6:.J11])" office:value-type="float" office:value="0" calcext:value-type="float">
            <text:p>0.00</text:p>
          </table:table-cell>
          <table:table-cell table:style-name="ce3" table:formula="of:=AVERAGE([full_search.K6:.K11])" office:value-type="float" office:value="148.21776258975" calcext:value-type="float">
            <text:p>148.22</text:p>
          </table:table-cell>
          <table:table-cell table:style-name="ce3" table:formula="of:=AVERAGE([full_search.L6:.L11])" office:value-type="float" office:value="661.45677447325" calcext:value-type="float">
            <text:p>661.46</text:p>
          </table:table-cell>
          <table:table-cell table:style-name="ce3" table:formula="of:=AVERAGE([full_search.M6:.M11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6:.P11])" office:value-type="float" office:value="712.67798781275" calcext:value-type="float">
            <text:p>712.68</text:p>
          </table:table-cell>
          <table:table-cell table:style-name="ce3" table:formula="of:=AVERAGE([full_search.Q6:.Q11])" office:value-type="float" office:value="0" calcext:value-type="float">
            <text:p>0.00</text:p>
          </table:table-cell>
          <table:table-cell table:style-name="ce3" table:formula="of:=AVERAGE([full_search.R6:.R11])" office:value-type="float" office:value="0" calcext:value-type="float">
            <text:p>0.00</text:p>
          </table:table-cell>
          <table:table-cell table:style-name="ce3" table:formula="of:=AVERAGE([full_search.S6:.S11])" office:value-type="float" office:value="687.404300153" calcext:value-type="float">
            <text:p>687.40</text:p>
          </table:table-cell>
          <table:table-cell table:style-name="ce3" table:formula="of:=AVERAGE([full_search.T6:.T11])" office:value-type="float" office:value="20.64981538055" calcext:value-type="float">
            <text:p>20.6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ath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style-name="ce2"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</table:table-row>
        <table:table-row table:style-name="ro1">
          <table:table-cell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style-name="ce2"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</table:table-row>
        <table:table-row table:style-name="ro1">
          <table:table-cell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style-name="ce2"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</table:table-row>
        <table:table-row table:style-name="ro1">
          <table:table-cell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style-name="ce2"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18:.B23])" office:value-type="float" office:value="31.9540054508" calcext:value-type="float">
            <text:p>31.95</text:p>
          </table:table-cell>
          <table:table-cell table:style-name="ce3" table:formula="of:=AVERAGE([full_search.C18:.C23])" office:value-type="float" office:value="4.044343021185" calcext:value-type="float">
            <text:p>4.04</text:p>
          </table:table-cell>
          <table:table-cell table:style-name="ce3" table:formula="of:=AVERAGE([full_search.D18:.D23])" office:value-type="float" office:value="13.42357154415" calcext:value-type="float">
            <text:p>13.42</text:p>
          </table:table-cell>
          <table:table-cell table:style-name="ce3" table:formula="of:=AVERAGE([full_search.E18:.E23])" office:value-type="float" office:value="13.7687477763" calcext:value-type="float">
            <text:p>13.77</text:p>
          </table:table-cell>
          <table:table-cell table:style-name="ce3" table:formula="of:=AVERAGE([full_search.F18:.F23])" office:value-type="float" office:value="0.62465538396325" calcext:value-type="float">
            <text:p>0.62</text:p>
          </table:table-cell>
          <table:table-cell table:style-name="ce3" table:number-columns-repeated="2"/>
          <table:table-cell table:style-name="ce3" table:formula="of:=AVERAGE([full_search.I18:.I23])" office:value-type="float" office:value="73.905014677225" calcext:value-type="float">
            <text:p>73.91</text:p>
          </table:table-cell>
          <table:table-cell table:style-name="ce3" table:formula="of:=AVERAGE([full_search.J18:.J23])" office:value-type="float" office:value="0" calcext:value-type="float">
            <text:p>0.00</text:p>
          </table:table-cell>
          <table:table-cell table:style-name="ce3" table:formula="of:=AVERAGE([full_search.K18:.K23])" office:value-type="float" office:value="24.649012835525" calcext:value-type="float">
            <text:p>24.65</text:p>
          </table:table-cell>
          <table:table-cell table:style-name="ce3" table:formula="of:=AVERAGE([full_search.L18:.L23])" office:value-type="float" office:value="49.227161161725" calcext:value-type="float">
            <text:p>49.23</text:p>
          </table:table-cell>
          <table:table-cell table:style-name="ce3" table:formula="of:=AVERAGE([full_search.M18:.M23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18:.P23])" office:value-type="float" office:value="44.4345632374" calcext:value-type="float">
            <text:p>44.43</text:p>
          </table:table-cell>
          <table:table-cell table:style-name="ce3" table:formula="of:=AVERAGE([full_search.Q18:.Q23])" office:value-type="float" office:value="0" calcext:value-type="float">
            <text:p>0.00</text:p>
          </table:table-cell>
          <table:table-cell table:style-name="ce3" table:formula="of:=AVERAGE([full_search.R18:.R23])" office:value-type="float" office:value="0" calcext:value-type="float">
            <text:p>0.00</text:p>
          </table:table-cell>
          <table:table-cell table:style-name="ce3" table:formula="of:=AVERAGE([full_search.S18:.S23])" office:value-type="float" office:value="44.145905487775" calcext:value-type="float">
            <text:p>44.15</text:p>
          </table:table-cell>
          <table:table-cell table:style-name="ce3" table:formula="of:=AVERAGE([full_search.T18:.T23])" office:value-type="float" office:value="0.25300636388325" calcext:value-type="float">
            <text:p>0.2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path turn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style-name="ce2"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</table:table-row>
        <table:table-row table:style-name="ro1">
          <table:table-cell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style-name="ce2"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</table:table-row>
        <table:table-row table:style-name="ro1">
          <table:table-cell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style-name="ce2"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</table:table-row>
        <table:table-row table:style-name="ro1">
          <table:table-cell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style-name="ce2"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31:.B36])" office:value-type="float" office:value="1531.6592666725" calcext:value-type="float">
            <text:p>1531.66</text:p>
          </table:table-cell>
          <table:table-cell table:style-name="ce3" table:formula="of:=AVERAGE([full_search.C31:.C36])" office:value-type="float" office:value="160.5537794695" calcext:value-type="float">
            <text:p>160.55</text:p>
          </table:table-cell>
          <table:table-cell table:style-name="ce3" table:formula="of:=AVERAGE([full_search.D31:.D36])" office:value-type="float" office:value="303.75405516625" calcext:value-type="float">
            <text:p>303.75</text:p>
          </table:table-cell>
          <table:table-cell table:style-name="ce3" table:formula="of:=AVERAGE([full_search.E31:.E36])" office:value-type="float" office:value="839.26336361425" calcext:value-type="float">
            <text:p>839.26</text:p>
          </table:table-cell>
          <table:table-cell table:style-name="ce3" table:formula="of:=AVERAGE([full_search.F31:.F36])" office:value-type="float" office:value="138.58565686925" calcext:value-type="float">
            <text:p>138.59</text:p>
          </table:table-cell>
          <table:table-cell table:style-name="ce3" table:number-columns-repeated="2"/>
          <table:table-cell table:style-name="ce3" table:formula="of:=AVERAGE([full_search.I31:.I36])" office:value-type="float" office:value="2206.384117945" calcext:value-type="float">
            <text:p>2206.38</text:p>
          </table:table-cell>
          <table:table-cell table:style-name="ce3" table:formula="of:=AVERAGE([full_search.J31:.J36])" office:value-type="float" office:value="0" calcext:value-type="float">
            <text:p>0.00</text:p>
          </table:table-cell>
          <table:table-cell table:style-name="ce3" table:formula="of:=AVERAGE([full_search.K31:.K36])" office:value-type="float" office:value="411.90655502575" calcext:value-type="float">
            <text:p>411.91</text:p>
          </table:table-cell>
          <table:table-cell table:style-name="ce3" table:formula="of:=AVERAGE([full_search.L31:.L36])" office:value-type="float" office:value="1776.65746073575" calcext:value-type="float">
            <text:p>1776.66</text:p>
          </table:table-cell>
          <table:table-cell table:style-name="ce3" table:formula="of:=AVERAGE([full_search.M31:.M36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31:.P36])" office:value-type="float" office:value="1864.8007680725" calcext:value-type="float">
            <text:p>1864.80</text:p>
          </table:table-cell>
          <table:table-cell table:style-name="ce3" table:formula="of:=AVERAGE([full_search.Q31:.Q36])" office:value-type="float" office:value="0" calcext:value-type="float">
            <text:p>0.00</text:p>
          </table:table-cell>
          <table:table-cell table:style-name="ce3" table:formula="of:=AVERAGE([full_search.R31:.R36])" office:value-type="float" office:value="0" calcext:value-type="float">
            <text:p>0.00</text:p>
          </table:table-cell>
          <table:table-cell table:style-name="ce3" table:formula="of:=AVERAGE([full_search.S31:.S36])" office:value-type="float" office:value="1831.716284989" calcext:value-type="float">
            <text:p>1831.72</text:p>
          </table:table-cell>
          <table:table-cell table:style-name="ce3" table:formula="of:=AVERAGE([full_search.T31:.T36])" office:value-type="float" office:value="32.681115693" calcext:value-type="float">
            <text:p>32.68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0"/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4.542884588" calcext:value-type="float">
            <text:p>344.542884588</text:p>
          </table:table-cell>
          <table:table-cell office:value-type="float" office:value="60.7036013603" calcext:value-type="float">
            <text:p>60.70360136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344.542884588" calcext:value-type="float">
            <text:p>344.542884588</text:p>
          </table:table-cell>
          <table:table-cell office:value-type="float" office:value="60.7036013603" calcext:value-type="float">
            <text:p>60.7036013603</text:p>
          </table:table-cell>
          <table:table-cell table:number-columns-repeated="2"/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.645720959" calcext:value-type="float">
            <text:p>349.645720959</text:p>
          </table:table-cell>
          <table:table-cell office:value-type="float" office:value="95.6703898907" calcext:value-type="float">
            <text:p>95.67038989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349.645720959" calcext:value-type="float">
            <text:p>349.645720959</text:p>
          </table:table-cell>
          <table:table-cell office:value-type="float" office:value="95.6703898907" calcext:value-type="float">
            <text:p>95.6703898907</text:p>
          </table:table-cell>
          <table:table-cell table:number-columns-repeated="2"/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4.482316732" calcext:value-type="float">
            <text:p>534.482316732</text:p>
          </table:table-cell>
          <table:table-cell office:value-type="float" office:value="120.082190275" calcext:value-type="float">
            <text:p>120.0821902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534.482316732" calcext:value-type="float">
            <text:p>534.482316732</text:p>
          </table:table-cell>
          <table:table-cell office:value-type="float" office:value="120.082190275" calcext:value-type="float">
            <text:p>120.082190275</text:p>
          </table:table-cell>
          <table:table-cell table:number-columns-repeated="2"/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4.850021839" calcext:value-type="float">
            <text:p>814.850021839</text:p>
          </table:table-cell>
          <table:table-cell office:value-type="float" office:value="73.9639773369" calcext:value-type="float">
            <text:p>73.9639773369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814.850021839" calcext:value-type="float">
            <text:p>814.850021839</text:p>
          </table:table-cell>
          <table:table-cell office:value-type="float" office:value="73.9639773369" calcext:value-type="float">
            <text:p>73.9639773369</text:p>
          </table:table-cell>
          <table:table-cell table:number-columns-repeated="2"/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.563981056" calcext:value-type="float">
            <text:p>400.563981056</text:p>
          </table:table-cell>
          <table:table-cell office:value-type="float" office:value="71.5709733963" calcext:value-type="float">
            <text:p>71.5709733963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400.563981056" calcext:value-type="float">
            <text:p>400.563981056</text:p>
          </table:table-cell>
          <table:table-cell office:value-type="float" office:value="71.5709733963" calcext:value-type="float">
            <text:p>71.5709733963</text:p>
          </table:table-cell>
          <table:table-cell table:number-columns-repeated="2"/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4.995448828" calcext:value-type="float">
            <text:p>274.995448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274.995448828" calcext:value-type="float">
            <text:p>274.9954488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7.47635078" calcext:value-type="float">
            <text:p>1077.47635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1077.47635078" calcext:value-type="float">
            <text:p>1077.47635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8.39850521" calcext:value-type="float">
            <text:p>1058.39850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1058.39850521" calcext:value-type="float">
            <text:p>1058.3985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82.61613607" calcext:value-type="float">
            <text:p>1882.61613607</text:p>
          </table:table-cell>
          <table:table-cell office:value-type="float" office:value="162.610586405" calcext:value-type="float">
            <text:p>162.610586405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162.610586405" calcext:value-type="float">
            <text:p>162.610586405</text:p>
          </table:table-cell>
          <table:table-cell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7.676231384" calcext:value-type="float">
            <text:p>447.676231384</text:p>
          </table:table-cell>
          <table:table-cell office:value-type="float" office:value="121.424663544" calcext:value-type="float">
            <text:p>121.424663544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121.424663544" calcext:value-type="float">
            <text:p>121.424663544</text:p>
          </table:table-cell>
          <table:table-cell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5.280315399" calcext:value-type="float">
            <text:p>425.280315399</text:p>
          </table:table-cell>
          <table:table-cell office:value-type="float" office:value="148.419117451" calcext:value-type="float">
            <text:p>148.419117451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148.419117451" calcext:value-type="float">
            <text:p>148.419117451</text:p>
          </table:table-cell>
          <table:table-cell table:number-columns-repeated="2"/>
          <table:table-cell office:value-type="float" office:value="345.791271925" calcext:value-type="float">
            <text:p>345.791271925</text:p>
          </table:table-cell>
          <table:table-cell office:value-type="float" office:value="25.4040248394" calcext:value-type="float">
            <text:p>25.4040248394</text:p>
          </table:table-cell>
          <table:table-cell office:value-type="float" office:value="77.6624419689" calcext:value-type="float">
            <text:p>77.6624419689</text:p>
          </table:table-cell>
          <table:table-cell office:value-type="float" office:value="193.471235037" calcext:value-type="float">
            <text:p>193.471235037</text:p>
          </table:table-cell>
          <table:table-cell office:value-type="float" office:value="20.6006660461" calcext:value-type="float">
            <text:p>20.6006660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1.531738281" calcext:value-type="float">
            <text:p>511.531738281</text:p>
          </table:table-cell>
          <table:table-cell office:value-type="float" office:value="160.416682959" calcext:value-type="float">
            <text:p>160.4166829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160.416682959" calcext:value-type="float">
            <text:p>160.416682959</text:p>
          </table:table-cell>
          <table:table-cell table:number-columns-repeated="2"/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5.791271925" calcext:value-type="float">
            <text:p>345.791271925</text:p>
          </table:table-cell>
          <table:table-cell office:value-type="float" office:value="53.2389509678" calcext:value-type="float">
            <text:p>53.2389509678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345.791271925" calcext:value-type="float">
            <text:p>345.791271925</text:p>
          </table:table-cell>
          <table:table-cell office:value-type="float" office:value="53.2389509678" calcext:value-type="float">
            <text:p>53.23895096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.841646433" calcext:value-type="float">
            <text:p>439.841646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float" office:value="439.841646433" calcext:value-type="float">
            <text:p>439.841646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506971866" calcext:value-type="float">
            <text:p>28.3506971866</text:p>
          </table:table-cell>
          <table:table-cell office:value-type="float" office:value="4.84827177498" calcext:value-type="float">
            <text:p>4.848271775</text:p>
          </table:table-cell>
          <table:table-cell table:number-columns-repeated="3"/>
          <table:table-cell office:value-type="float" office:value="28.3506971866" calcext:value-type="float">
            <text:p>28.3506971866</text:p>
          </table:table-cell>
          <table:table-cell office:value-type="float" office:value="4.84827177498" calcext:value-type="float">
            <text:p>4.848271775</text:p>
          </table:table-cell>
          <table:table-cell table:number-columns-repeated="2"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90652648" calcext:value-type="float">
            <text:p>26.7990652648</text:p>
          </table:table-cell>
          <table:table-cell office:value-type="float" office:value="7.87058301134" calcext:value-type="float">
            <text:p>7.8705830113</text:p>
          </table:table-cell>
          <table:table-cell table:number-columns-repeated="3"/>
          <table:table-cell office:value-type="float" office:value="26.7990652648" calcext:value-type="float">
            <text:p>26.7990652648</text:p>
          </table:table-cell>
          <table:table-cell office:value-type="float" office:value="7.87058301134" calcext:value-type="float">
            <text:p>7.8705830113</text:p>
          </table:table-cell>
          <table:table-cell table:number-columns-repeated="2"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.4175687229" calcext:value-type="float">
            <text:p>41.4175687229</text:p>
          </table:table-cell>
          <table:table-cell office:value-type="float" office:value="5.40747161315" calcext:value-type="float">
            <text:p>5.4074716132</text:p>
          </table:table-cell>
          <table:table-cell table:number-columns-repeated="3"/>
          <table:table-cell office:value-type="float" office:value="41.4175687229" calcext:value-type="float">
            <text:p>41.4175687229</text:p>
          </table:table-cell>
          <table:table-cell office:value-type="float" office:value="5.40747161315" calcext:value-type="float">
            <text:p>5.4074716132</text:p>
          </table:table-cell>
          <table:table-cell table:number-columns-repeated="2"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.0857242348" calcext:value-type="float">
            <text:p>50.0857242348</text:p>
          </table:table-cell>
          <table:table-cell office:value-type="float" office:value="5.84699553606" calcext:value-type="float">
            <text:p>5.8469955361</text:p>
          </table:table-cell>
          <table:table-cell table:number-columns-repeated="3"/>
          <table:table-cell office:value-type="float" office:value="50.0857242348" calcext:value-type="float">
            <text:p>50.0857242348</text:p>
          </table:table-cell>
          <table:table-cell office:value-type="float" office:value="5.84699553606" calcext:value-type="float">
            <text:p>5.8469955361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6089100616" calcext:value-type="float">
            <text:p>22.6089100616</text:p>
          </table:table-cell>
          <table:table-cell office:value-type="float" office:value="4.60546176606" calcext:value-type="float">
            <text:p>4.6054617661</text:p>
          </table:table-cell>
          <table:table-cell table:number-columns-repeated="3"/>
          <table:table-cell office:value-type="float" office:value="22.6089100616" calcext:value-type="float">
            <text:p>22.6089100616</text:p>
          </table:table-cell>
          <table:table-cell office:value-type="float" office:value="4.60546176606" calcext:value-type="float">
            <text:p>4.6054617661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1238501329" calcext:value-type="float">
            <text:p>16.1238501329</text:p>
          </table:table-cell>
          <table:table-cell office:value-type="float" office:value="0.00937987216969" calcext:value-type="float">
            <text:p>0.0093798722</text:p>
          </table:table-cell>
          <table:table-cell table:number-columns-repeated="3"/>
          <table:table-cell office:value-type="float" office:value="16.1238501329" calcext:value-type="float">
            <text:p>16.1238501329</text:p>
          </table:table-cell>
          <table:table-cell office:value-type="float" office:value="0.00937987216969" calcext:value-type="float">
            <text:p>0.0093798722</text:p>
          </table:table-cell>
          <table:table-cell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.1209280465" calcext:value-type="float">
            <text:p>59.1209280465</text:p>
          </table:table-cell>
          <table:table-cell office:value-type="float" office:value="0.00626192620963" calcext:value-type="float">
            <text:p>0.0062619262</text:p>
          </table:table-cell>
          <table:table-cell table:number-columns-repeated="3"/>
          <table:table-cell office:value-type="float" office:value="59.1209280465" calcext:value-type="float">
            <text:p>59.1209280465</text:p>
          </table:table-cell>
          <table:table-cell office:value-type="float" office:value="0.00626192620963" calcext:value-type="float">
            <text:p>0.0062619262</text:p>
          </table:table-cell>
          <table:table-cell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.5422468656" calcext:value-type="float">
            <text:p>75.5422468656</text:p>
          </table:table-cell>
          <table:table-cell office:value-type="float" office:value="0.011191058844" calcext:value-type="float">
            <text:p>0.0111910588</text:p>
          </table:table-cell>
          <table:table-cell table:number-columns-repeated="3"/>
          <table:table-cell office:value-type="float" office:value="75.5422468656" calcext:value-type="float">
            <text:p>75.5422468656</text:p>
          </table:table-cell>
          <table:table-cell office:value-type="float" office:value="0.011191058844" calcext:value-type="float">
            <text:p>0.0111910588</text:p>
          </table:table-cell>
          <table:table-cell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7.223350797" calcext:value-type="float">
            <text:p>167.223350797</text:p>
          </table:table-cell>
          <table:table-cell office:value-type="float" office:value="27.6683504211" calcext:value-type="float">
            <text:p>27.6683504211</text:p>
          </table:table-cell>
          <table:table-cell table:number-columns-repeated="3"/>
          <table:table-cell office:value-type="float" office:value="167.223350797" calcext:value-type="float">
            <text:p>167.223350797</text:p>
          </table:table-cell>
          <table:table-cell office:value-type="float" office:value="27.6683504211" calcext:value-type="float">
            <text:p>27.6683504211</text:p>
          </table:table-cell>
          <table:table-cell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.8516337007" calcext:value-type="float">
            <text:p>37.8516337007</text:p>
          </table:table-cell>
          <table:table-cell office:value-type="float" office:value="17.4131837928" calcext:value-type="float">
            <text:p>17.4131837928</text:p>
          </table:table-cell>
          <table:table-cell table:number-columns-repeated="3"/>
          <table:table-cell office:value-type="float" office:value="37.8516337007" calcext:value-type="float">
            <text:p>37.8516337007</text:p>
          </table:table-cell>
          <table:table-cell office:value-type="float" office:value="17.4131837928" calcext:value-type="float">
            <text:p>17.4131837928</text:p>
          </table:table-cell>
          <table:table-cell table:number-columns-repeated="2"/>
          <table:table-cell office:value-type="float" office:value="26.9869346772" calcext:value-type="float">
            <text:p>26.9869346772</text:p>
          </table:table-cell>
          <table:table-cell office:value-type="float" office:value="2.04324349497" calcext:value-type="float">
            <text:p>2.043243495</text:p>
          </table:table-cell>
          <table:table-cell office:value-type="float" office:value="12.3826210128" calcext:value-type="float">
            <text:p>12.3826210128</text:p>
          </table:table-cell>
          <table:table-cell office:value-type="float" office:value="12.3457298209" calcext:value-type="float">
            <text:p>12.3457298209</text:p>
          </table:table-cell>
          <table:table-cell office:value-type="float" office:value="0.182869311668" calcext:value-type="float">
            <text:p>0.18286931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.0823937119" calcext:value-type="float">
            <text:p>45.0823937119</text:p>
          </table:table-cell>
          <table:table-cell office:value-type="float" office:value="25.8779385992" calcext:value-type="float">
            <text:p>25.8779385992</text:p>
          </table:table-cell>
          <table:table-cell table:number-columns-repeated="3"/>
          <table:table-cell office:value-type="float" office:value="45.0823937119" calcext:value-type="float">
            <text:p>45.0823937119</text:p>
          </table:table-cell>
          <table:table-cell office:value-type="float" office:value="25.8779385992" calcext:value-type="float">
            <text:p>25.8779385992</text:p>
          </table:table-cell>
          <table:table-cell table:number-columns-repeated="2"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.6278815565" calcext:value-type="float">
            <text:p>45.6278815565</text:p>
          </table:table-cell>
          <table:table-cell office:value-type="float" office:value="27.4304057673" calcext:value-type="float">
            <text:p>27.4304057673</text:p>
          </table:table-cell>
          <table:table-cell table:number-columns-repeated="3"/>
          <table:table-cell office:value-type="float" office:value="45.6278815565" calcext:value-type="float">
            <text:p>45.6278815565</text:p>
          </table:table-cell>
          <table:table-cell office:value-type="float" office:value="27.4304057673" calcext:value-type="float">
            <text:p>27.43040576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989321804" calcext:value-type="float">
            <text:p>26.989321804</text:p>
          </table:table-cell>
          <table:table-cell office:value-type="float" office:value="6.69399577518" calcext:value-type="float">
            <text:p>6.6939957752</text:p>
          </table:table-cell>
          <table:table-cell table:style-name="ce5"/>
          <table:table-cell table:number-columns-repeated="2"/>
          <table:table-cell office:value-type="float" office:value="26.989321804" calcext:value-type="float">
            <text:p>26.989321804</text:p>
          </table:table-cell>
          <table:table-cell office:value-type="float" office:value="6.69399577518" calcext:value-type="float">
            <text:p>6.6939957752</text:p>
          </table:table-cell>
          <table:table-cell table:number-columns-repeated="2"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042662827" calcext:value-type="float">
            <text:p>27.2042662827</text:p>
          </table:table-cell>
          <table:table-cell table:style-name="ce5" office:value-type="float" office:value="1.11022302463E-016" calcext:value-type="float">
            <text:p>1.11E-16</text:p>
          </table:table-cell>
          <table:table-cell table:number-columns-repeated="3"/>
          <table:table-cell office:value-type="float" office:value="27.2042662827" calcext:value-type="float">
            <text:p>27.2042662827</text:p>
          </table:table-cell>
          <table:table-cell table:style-name="ce5" office:value-type="float" office:value="1.11022302463E-016" calcext:value-type="float">
            <text:p>1.11E-16</text:p>
          </table:table-cell>
          <table:table-cell table:number-columns-repeated="2"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4.25378674" calcext:value-type="float">
            <text:p>1124.25378674</text:p>
          </table:table-cell>
          <table:table-cell office:value-type="float" office:value="210.162261776" calcext:value-type="float">
            <text:p>210.162261776</text:p>
          </table:table-cell>
          <table:table-cell table:number-columns-repeated="3"/>
          <table:table-cell office:value-type="float" office:value="1124.25378674" calcext:value-type="float">
            <text:p>1124.25378674</text:p>
          </table:table-cell>
          <table:table-cell office:value-type="float" office:value="210.162261776" calcext:value-type="float">
            <text:p>210.162261776</text:p>
          </table:table-cell>
          <table:table-cell table:number-columns-repeated="2"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3.72872978" calcext:value-type="float">
            <text:p>1063.72872978</text:p>
          </table:table-cell>
          <table:table-cell office:value-type="float" office:value="224.096153807" calcext:value-type="float">
            <text:p>224.096153807</text:p>
          </table:table-cell>
          <table:table-cell table:number-columns-repeated="3"/>
          <table:table-cell office:value-type="float" office:value="1063.72872978" calcext:value-type="float">
            <text:p>1063.72872978</text:p>
          </table:table-cell>
          <table:table-cell office:value-type="float" office:value="224.096153807" calcext:value-type="float">
            <text:p>224.096153807</text:p>
          </table:table-cell>
          <table:table-cell table:number-columns-repeated="2"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5.9000318" calcext:value-type="float">
            <text:p>1905.9000318</text:p>
          </table:table-cell>
          <table:table-cell office:value-type="float" office:value="331.175958062" calcext:value-type="float">
            <text:p>331.175958062</text:p>
          </table:table-cell>
          <table:table-cell table:number-columns-repeated="3"/>
          <table:table-cell office:value-type="float" office:value="1905.9000318" calcext:value-type="float">
            <text:p>1905.9000318</text:p>
          </table:table-cell>
          <table:table-cell office:value-type="float" office:value="331.175958062" calcext:value-type="float">
            <text:p>331.175958062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32.18874122" calcext:value-type="float">
            <text:p>2532.18874122</text:p>
          </table:table-cell>
          <table:table-cell office:value-type="float" office:value="182.804366409" calcext:value-type="float">
            <text:p>182.804366409</text:p>
          </table:table-cell>
          <table:table-cell table:number-columns-repeated="3"/>
          <table:table-cell office:value-type="float" office:value="2532.18874122" calcext:value-type="float">
            <text:p>2532.18874122</text:p>
          </table:table-cell>
          <table:table-cell office:value-type="float" office:value="182.804366409" calcext:value-type="float">
            <text:p>182.804366409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94.45823894" calcext:value-type="float">
            <text:p>1494.45823894</text:p>
          </table:table-cell>
          <table:table-cell office:value-type="float" office:value="239.69028689" calcext:value-type="float">
            <text:p>239.69028689</text:p>
          </table:table-cell>
          <table:table-cell table:number-columns-repeated="3"/>
          <table:table-cell office:value-type="float" office:value="1494.45823894" calcext:value-type="float">
            <text:p>1494.45823894</text:p>
          </table:table-cell>
          <table:table-cell office:value-type="float" office:value="239.69028689" calcext:value-type="float">
            <text:p>239.69028689</text:p>
          </table:table-cell>
          <table:table-cell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9.230328842" calcext:value-type="float">
            <text:p>769.230328842</text:p>
          </table:table-cell>
          <table:table-cell office:value-type="float" office:value="0.186781311035" calcext:value-type="float">
            <text:p>0.186781311</text:p>
          </table:table-cell>
          <table:table-cell table:number-columns-repeated="3"/>
          <table:table-cell office:value-type="float" office:value="769.230328842" calcext:value-type="float">
            <text:p>769.230328842</text:p>
          </table:table-cell>
          <table:table-cell office:value-type="float" office:value="0.186781311035" calcext:value-type="float">
            <text:p>0.186781311</text:p>
          </table:table-cell>
          <table:table-cell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6.15712465" calcext:value-type="float">
            <text:p>2906.15712465</text:p>
          </table:table-cell>
          <table:table-cell office:value-type="float" office:value="0.268225097656" calcext:value-type="float">
            <text:p>0.2682250977</text:p>
          </table:table-cell>
          <table:table-cell table:number-columns-repeated="3"/>
          <table:table-cell office:value-type="float" office:value="2906.15712465" calcext:value-type="float">
            <text:p>2906.15712465</text:p>
          </table:table-cell>
          <table:table-cell office:value-type="float" office:value="0.268225097656" calcext:value-type="float">
            <text:p>0.2682250977</text:p>
          </table:table-cell>
          <table:table-cell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87.94773866" calcext:value-type="float">
            <text:p>2687.94773866</text:p>
          </table:table-cell>
          <table:table-cell office:value-type="float" office:value="0.190214157104" calcext:value-type="float">
            <text:p>0.1902141571</text:p>
          </table:table-cell>
          <table:table-cell table:number-columns-repeated="3"/>
          <table:table-cell office:value-type="float" office:value="2687.94773866" calcext:value-type="float">
            <text:p>2687.94773866</text:p>
          </table:table-cell>
          <table:table-cell office:value-type="float" office:value="0.190214157104" calcext:value-type="float">
            <text:p>0.1902141571</text:p>
          </table:table-cell>
          <table:table-cell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66.57307975" calcext:value-type="float">
            <text:p>4866.57307975</text:p>
          </table:table-cell>
          <table:table-cell office:value-type="float" office:value="532.958670862" calcext:value-type="float">
            <text:p>532.958670862</text:p>
          </table:table-cell>
          <table:table-cell table:number-columns-repeated="3"/>
          <table:table-cell office:value-type="float" office:value="4866.57307975" calcext:value-type="float">
            <text:p>4866.57307975</text:p>
          </table:table-cell>
          <table:table-cell office:value-type="float" office:value="532.958670862" calcext:value-type="float">
            <text:p>532.958670862</text:p>
          </table:table-cell>
          <table:table-cell table:number-columns-repeated="2"/>
          <table:table-cell office:value-type="float" office:value="918.442931825" calcext:value-type="float">
            <text:p>918.442931825</text:p>
          </table:table-cell>
          <table:table-cell office:value-type="float" office:value="66.9460283345" calcext:value-type="float">
            <text:p>66.9460283345</text:p>
          </table:table-cell>
          <table:table-cell office:value-type="float" office:value="214.86457202" calcext:value-type="float">
            <text:p>214.86457202</text:p>
          </table:table-cell>
          <table:table-cell office:value-type="float" office:value="531.543754415" calcext:value-type="float">
            <text:p>531.543754415</text:p>
          </table:table-cell>
          <table:table-cell office:value-type="float" office:value="41.6386517675" calcext:value-type="float">
            <text:p>41.6386517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8.81944619" calcext:value-type="float">
            <text:p>1478.81944619</text:p>
          </table:table-cell>
          <table:table-cell office:value-type="float" office:value="377.046065057" calcext:value-type="float">
            <text:p>377.046065057</text:p>
          </table:table-cell>
          <table:table-cell table:number-columns-repeated="3"/>
          <table:table-cell office:value-type="float" office:value="1478.81944619" calcext:value-type="float">
            <text:p>1478.81944619</text:p>
          </table:table-cell>
          <table:table-cell office:value-type="float" office:value="377.046065057" calcext:value-type="float">
            <text:p>377.046065057</text:p>
          </table:table-cell>
          <table:table-cell table:number-columns-repeated="2"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4.74206866" calcext:value-type="float">
            <text:p>1214.74206866</text:p>
          </table:table-cell>
          <table:table-cell office:value-type="float" office:value="363.77863365" calcext:value-type="float">
            <text:p>363.77863365</text:p>
          </table:table-cell>
          <table:table-cell table:number-columns-repeated="3"/>
          <table:table-cell office:value-type="float" office:value="1214.74206866" calcext:value-type="float">
            <text:p>1214.74206866</text:p>
          </table:table-cell>
          <table:table-cell office:value-type="float" office:value="363.77863365" calcext:value-type="float">
            <text:p>363.778633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8.02615612" calcext:value-type="float">
            <text:p>1388.02615612</text:p>
          </table:table-cell>
          <table:table-cell office:value-type="float" office:value="368.730623209" calcext:value-type="float">
            <text:p>368.730623209</text:p>
          </table:table-cell>
          <table:table-cell table:number-columns-repeated="3"/>
          <table:table-cell office:value-type="float" office:value="1388.02615612" calcext:value-type="float">
            <text:p>1388.02615612</text:p>
          </table:table-cell>
          <table:table-cell office:value-type="float" office:value="368.730623209" calcext:value-type="float">
            <text:p>368.7306232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.12318794" calcext:value-type="float">
            <text:p>934.12318794</text:p>
          </table:table-cell>
          <table:table-cell office:value-type="float" office:value="159.272566089" calcext:value-type="float">
            <text:p>159.272566089</text:p>
          </table:table-cell>
          <table:table-cell table:number-columns-repeated="3"/>
          <table:table-cell office:value-type="float" office:value="934.12318794" calcext:value-type="float">
            <text:p>934.12318794</text:p>
          </table:table-cell>
          <table:table-cell office:value-type="float" office:value="159.272566089" calcext:value-type="float">
            <text:p>159.2725660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.14587705" calcext:value-type="float">
            <text:p>1204.14587705</text:p>
          </table:table-cell>
          <table:table-cell office:value-type="float" office:value="0.107378959656" calcext:value-type="float">
            <text:p>0.1073789597</text:p>
          </table:table-cell>
          <table:table-cell table:number-columns-repeated="3"/>
          <table:table-cell office:value-type="float" office:value="1204.14587705" calcext:value-type="float">
            <text:p>1204.14587705</text:p>
          </table:table-cell>
          <table:table-cell office:value-type="float" office:value="0.107378959656" calcext:value-type="float">
            <text:p>0.1073789597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full time</text:p>
          </table:table-cell>
          <table:table-cell office:value-type="string" calcext:value-type="string">
            <text:p>knif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spoon</text:p>
          </table:table-cell>
          <table:table-cell table:number-columns-repeated="5"/>
          <table:table-cell office:value-type="float" office:value="516.495254517" calcext:value-type="float">
            <text:p>516.495254517</text:p>
          </table:table-cell>
          <table:table-cell office:value-type="float" office:value="69.2024929523" calcext:value-type="float">
            <text:p>69.2024929523</text:p>
          </table:table-cell>
          <table:table-cell office:value-type="float" office:value="97.4307560921" calcext:value-type="float">
            <text:p>97.4307560921</text:p>
          </table:table-cell>
          <table:table-cell office:value-type="float" office:value="264.752379179" calcext:value-type="float">
            <text:p>264.752379179</text:p>
          </table:table-cell>
          <table:table-cell office:value-type="float" office:value="49.2109041214" calcext:value-type="float">
            <text:p>49.2109041214</text:p>
          </table:table-cell>
          <table:table-cell table:formula="of:=SUM([.R1:.U1])" office:value-type="float" office:value="480.5965323448" calcext:value-type="float">
            <text:p>480.5965323448</text:p>
          </table:table-cell>
          <table:table-cell table:formula="of:=[.Q1]-[.V1]" office:value-type="float" office:value="35.8987221722" calcext:value-type="float">
            <text:p>35.8987221722</text:p>
          </table:table-cell>
        </table:table-row>
        <table:table-row table:style-name="ro1">
          <table:table-cell/>
          <table:table-cell office:value-type="float" office:value="516.495254517" calcext:value-type="float">
            <text:p>516.495254517</text:p>
          </table:table-cell>
          <table:table-cell office:value-type="float" office:value="625.824002028" calcext:value-type="float">
            <text:p>625.824002028</text:p>
          </table:table-cell>
          <table:table-cell/>
          <table:table-cell office:value-type="float" office:value="586.39697957" calcext:value-type="float">
            <text:p>586.39697957</text:p>
          </table:table-cell>
          <table:table-cell office:value-type="float" office:value="237.52876091" calcext:value-type="float">
            <text:p>237.52876091</text:p>
          </table:table-cell>
          <table:table-cell/>
          <table:table-cell office:value-type="float" office:value="1064.04291821" calcext:value-type="float">
            <text:p>1064.04291821</text:p>
          </table:table-cell>
          <table:table-cell office:value-type="float" office:value="377.531872988" calcext:value-type="float">
            <text:p>377.531872988</text:p>
          </table:table-cell>
          <table:table-cell/>
          <table:table-cell office:value-type="float" office:value="425.651885033" calcext:value-type="float">
            <text:p>425.651885033</text:p>
          </table:table-cell>
          <table:table-cell office:value-type="float" office:value="907.174832344" calcext:value-type="float">
            <text:p>907.174832344</text:p>
          </table:table-cell>
          <table:table-cell table:number-columns-repeated="4"/>
          <table:table-cell office:value-type="float" office:value="336.533113003" calcext:value-type="float">
            <text:p>336.533113003</text:p>
          </table:table-cell>
          <table:table-cell office:value-type="float" office:value="47.6073701382" calcext:value-type="float">
            <text:p>47.6073701382</text:p>
          </table:table-cell>
          <table:table-cell office:value-type="float" office:value="80.4347472191" calcext:value-type="float">
            <text:p>80.4347472191</text:p>
          </table:table-cell>
          <table:table-cell office:value-type="float" office:value="117.481196165" calcext:value-type="float">
            <text:p>117.481196165</text:p>
          </table:table-cell>
          <table:table-cell office:value-type="float" office:value="49.0072188377" calcext:value-type="float">
            <text:p>49.0072188377</text:p>
          </table:table-cell>
          <table:table-cell table:formula="of:=SUM([.R2:.U2])" office:value-type="float" office:value="294.53053236" calcext:value-type="float">
            <text:p>294.53053236</text:p>
          </table:table-cell>
          <table:table-cell table:formula="of:=[.Q2]-[.V2]" office:value-type="float" office:value="42.002580643" calcext:value-type="float">
            <text:p>42.002580643</text:p>
          </table:table-cell>
        </table:table-row>
        <table:table-row table:style-name="ro1">
          <table:table-cell/>
          <table:table-cell office:value-type="float" office:value="336.533113003" calcext:value-type="float">
            <text:p>336.533113003</text:p>
          </table:table-cell>
          <table:table-cell office:value-type="float" office:value="1104.07050705" calcext:value-type="float">
            <text:p>1104.07050705</text:p>
          </table:table-cell>
          <table:table-cell/>
          <table:table-cell office:value-type="float" office:value="557.669190645" calcext:value-type="float">
            <text:p>557.669190645</text:p>
          </table:table-cell>
          <table:table-cell office:value-type="float" office:value="347.940049648" calcext:value-type="float">
            <text:p>347.940049648</text:p>
          </table:table-cell>
          <table:table-cell/>
          <table:table-cell office:value-type="float" office:value="1005.03980589" calcext:value-type="float">
            <text:p>1005.03980589</text:p>
          </table:table-cell>
          <table:table-cell office:value-type="float" office:value="401.248581171" calcext:value-type="float">
            <text:p>401.248581171</text:p>
          </table:table-cell>
          <table:table-cell/>
          <table:table-cell office:value-type="float" office:value="375.731173277" calcext:value-type="float">
            <text:p>375.731173277</text:p>
          </table:table-cell>
          <table:table-cell office:value-type="float" office:value="1195.6233592" calcext:value-type="float">
            <text:p>1195.6233592</text:p>
          </table:table-cell>
          <table:table-cell table:number-columns-repeated="4"/>
          <table:table-cell office:value-type="float" office:value="647.728137016" calcext:value-type="float">
            <text:p>647.728137016</text:p>
          </table:table-cell>
          <table:table-cell office:value-type="float" office:value="45.6020560265" calcext:value-type="float">
            <text:p>45.6020560265</text:p>
          </table:table-cell>
          <table:table-cell office:value-type="float" office:value="100.250902414" calcext:value-type="float">
            <text:p>100.250902414</text:p>
          </table:table-cell>
          <table:table-cell office:value-type="float" office:value="417.454008579" calcext:value-type="float">
            <text:p>417.454008579</text:p>
          </table:table-cell>
          <table:table-cell office:value-type="float" office:value="49.0086941719" calcext:value-type="float">
            <text:p>49.0086941719</text:p>
          </table:table-cell>
          <table:table-cell table:formula="of:=SUM([.R3:.U3])" office:value-type="float" office:value="612.3156611914" calcext:value-type="float">
            <text:p>612.3156611914</text:p>
          </table:table-cell>
          <table:table-cell table:formula="of:=[.Q3]-[.V3]" office:value-type="float" office:value="35.4124758246" calcext:value-type="float">
            <text:p>35.4124758246</text:p>
          </table:table-cell>
        </table:table-row>
        <table:table-row table:style-name="ro1">
          <table:table-cell/>
          <table:table-cell office:value-type="float" office:value="647.728137016" calcext:value-type="float">
            <text:p>647.728137016</text:p>
          </table:table-cell>
          <table:table-cell office:value-type="float" office:value="965.284539938" calcext:value-type="float">
            <text:p>965.284539938</text:p>
          </table:table-cell>
          <table:table-cell/>
          <table:table-cell office:value-type="float" office:value="214.022490501" calcext:value-type="float">
            <text:p>214.022490501</text:p>
          </table:table-cell>
          <table:table-cell office:value-type="float" office:value="822.017215014" calcext:value-type="float">
            <text:p>822.017215014</text:p>
          </table:table-cell>
          <table:table-cell/>
          <table:table-cell office:value-type="float" office:value="797.52255702" calcext:value-type="float">
            <text:p>797.52255702</text:p>
          </table:table-cell>
          <table:table-cell office:value-type="float" office:value="407.269691706" calcext:value-type="float">
            <text:p>407.269691706</text:p>
          </table:table-cell>
          <table:table-cell/>
          <table:table-cell office:value-type="float" office:value="421.198181391" calcext:value-type="float">
            <text:p>421.198181391</text:p>
          </table:table-cell>
          <table:table-cell office:value-type="float" office:value="1166.11824775" calcext:value-type="float">
            <text:p>1166.11824775</text:p>
          </table:table-cell>
          <table:table-cell table:number-columns-repeated="9"/>
          <table:table-cell table:formula="of:=SUM([.R4:.U4])" office:value-type="float" office:value="0" calcext:value-type="float">
            <text:p>0</text:p>
          </table:table-cell>
          <table:table-cell table:formula="of:=[.Q4]-[.V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4])" office:value-type="float" office:value="500.252168178667" calcext:value-type="float">
            <text:p>500.2521681787</text:p>
          </table:table-cell>
          <table:table-cell table:formula="of:=AVERAGE([.C2:.C4])" office:value-type="float" office:value="898.393016338667" calcext:value-type="float">
            <text:p>898.3930163387</text:p>
          </table:table-cell>
          <table:table-cell/>
          <table:table-cell table:formula="of:=AVERAGE([.E2:.E4])" office:value-type="float" office:value="452.696220238667" calcext:value-type="float">
            <text:p>452.6962202387</text:p>
          </table:table-cell>
          <table:table-cell table:formula="of:=AVERAGE([.F2:.F4])" office:value-type="float" office:value="469.162008524" calcext:value-type="float">
            <text:p>469.162008524</text:p>
          </table:table-cell>
          <table:table-cell/>
          <table:table-cell table:formula="of:=AVERAGE([.H2:.H4])" office:value-type="float" office:value="955.535093706667" calcext:value-type="float">
            <text:p>955.5350937067</text:p>
          </table:table-cell>
          <table:table-cell table:formula="of:=AVERAGE([.I2:.I4])" office:value-type="float" office:value="395.350048621667" calcext:value-type="float">
            <text:p>395.3500486217</text:p>
          </table:table-cell>
          <table:table-cell/>
          <table:table-cell table:formula="of:=AVERAGE([.K2:.K4])" office:value-type="float" office:value="407.527079900333" calcext:value-type="float">
            <text:p>407.5270799003</text:p>
          </table:table-cell>
          <table:table-cell table:formula="of:=AVERAGE([.L2:.L4])" office:value-type="float" office:value="1089.638813098" calcext:value-type="float">
            <text:p>1089.638813098</text:p>
          </table:table-cell>
          <table:table-cell table:number-columns-repeated="4"/>
          <table:table-cell office:value-type="float" office:value="625.824002028" calcext:value-type="float">
            <text:p>625.824002028</text:p>
          </table:table-cell>
          <table:table-cell office:value-type="float" office:value="0" calcext:value-type="float">
            <text:p>0</text:p>
          </table:table-cell>
          <table:table-cell office:value-type="float" office:value="272.203800917" calcext:value-type="float">
            <text:p>272.203800917</text:p>
          </table:table-cell>
          <table:table-cell office:value-type="float" office:value="348.737712622" calcext:value-type="float">
            <text:p>348.737712622</text:p>
          </table:table-cell>
          <table:table-cell office:value-type="float" office:value="0" calcext:value-type="float">
            <text:p>0</text:p>
          </table:table-cell>
          <table:table-cell table:formula="of:=SUM([.R5:.U5])" office:value-type="float" office:value="620.941513539" calcext:value-type="float">
            <text:p>620.941513539</text:p>
          </table:table-cell>
          <table:table-cell table:formula="of:=[.Q5]-[.V5]" office:value-type="float" office:value="4.88248848900003" calcext:value-type="float">
            <text:p>4.882488489</text:p>
          </table:table-cell>
        </table:table-row>
        <table:table-row table:style-name="ro1">
          <table:table-cell table:number-columns-repeated="16"/>
          <table:table-cell office:value-type="float" office:value="1104.07050705" calcext:value-type="float">
            <text:p>1104.07050705</text:p>
          </table:table-cell>
          <table:table-cell office:value-type="float" office:value="0" calcext:value-type="float">
            <text:p>0</text:p>
          </table:table-cell>
          <table:table-cell office:value-type="float" office:value="248.205072403" calcext:value-type="float">
            <text:p>248.205072403</text:p>
          </table:table-cell>
          <table:table-cell office:value-type="float" office:value="832.850031614" calcext:value-type="float">
            <text:p>832.850031614</text:p>
          </table:table-cell>
          <table:table-cell office:value-type="float" office:value="13.7998716831" calcext:value-type="float">
            <text:p>13.7998716831</text:p>
          </table:table-cell>
          <table:table-cell table:formula="of:=SUM([.R6:.U6])" office:value-type="float" office:value="1094.8549757001" calcext:value-type="float">
            <text:p>1094.8549757001</text:p>
          </table:table-cell>
          <table:table-cell table:formula="of:=[.Q6]-[.V6]" office:value-type="float" office:value="9.21553134989995" calcext:value-type="float">
            <text:p>9.2155313499</text:p>
          </table:table-cell>
        </table:table-row>
        <table:table-row table:style-name="ro1">
          <table:table-cell/>
          <table:table-cell office:value-type="float" office:value="363.419975042" calcext:value-type="float">
            <text:p>363.419975042</text:p>
          </table:table-cell>
          <table:table-cell office:value-type="float" office:value="560.430487633" calcext:value-type="float">
            <text:p>560.430487633</text:p>
          </table:table-cell>
          <table:table-cell/>
          <table:table-cell office:value-type="float" office:value="160.917860985" calcext:value-type="float">
            <text:p>160.917860985</text:p>
          </table:table-cell>
          <table:table-cell office:value-type="float" office:value="469.709306717" calcext:value-type="float">
            <text:p>469.709306717</text:p>
          </table:table-cell>
          <table:table-cell/>
          <table:table-cell office:value-type="float" office:value="272.776754856" calcext:value-type="float">
            <text:p>272.776754856</text:p>
          </table:table-cell>
          <table:table-cell office:value-type="float" office:value="375.380629778" calcext:value-type="float">
            <text:p>375.380629778</text:p>
          </table:table-cell>
          <table:table-cell/>
          <table:table-cell office:value-type="float" office:value="249.180204391" calcext:value-type="float">
            <text:p>249.180204391</text:p>
          </table:table-cell>
          <table:table-cell office:value-type="float" office:value="507.140073061" calcext:value-type="float">
            <text:p>507.140073061</text:p>
          </table:table-cell>
          <table:table-cell table:number-columns-repeated="4"/>
          <table:table-cell office:value-type="float" office:value="965.284539938" calcext:value-type="float">
            <text:p>965.284539938</text:p>
          </table:table-cell>
          <table:table-cell office:value-type="float" office:value="0" calcext:value-type="float">
            <text:p>0</text:p>
          </table:table-cell>
          <table:table-cell office:value-type="float" office:value="207.222267389" calcext:value-type="float">
            <text:p>207.222267389</text:p>
          </table:table-cell>
          <table:table-cell office:value-type="float" office:value="734.741466999" calcext:value-type="float">
            <text:p>734.741466999</text:p>
          </table:table-cell>
          <table:table-cell office:value-type="float" office:value="13.7997117043" calcext:value-type="float">
            <text:p>13.7997117043</text:p>
          </table:table-cell>
          <table:table-cell table:formula="of:=SUM([.R7:.U7])" office:value-type="float" office:value="955.7634460923" calcext:value-type="float">
            <text:p>955.7634460923</text:p>
          </table:table-cell>
          <table:table-cell table:formula="of:=[.Q7]-[.V7]" office:value-type="float" office:value="9.52109384570008" calcext:value-type="float">
            <text:p>9.5210938457</text:p>
          </table:table-cell>
        </table:table-row>
        <table:table-row table:style-name="ro1">
          <table:table-cell/>
          <table:table-cell office:value-type="float" office:value="343.370894432" calcext:value-type="float">
            <text:p>343.370894432</text:p>
          </table:table-cell>
          <table:table-cell office:value-type="float" office:value="714.455590963" calcext:value-type="float">
            <text:p>714.455590963</text:p>
          </table:table-cell>
          <table:table-cell/>
          <table:table-cell office:value-type="float" office:value="187.370641708" calcext:value-type="float">
            <text:p>187.370641708</text:p>
          </table:table-cell>
          <table:table-cell office:value-type="float" office:value="526.516577721" calcext:value-type="float">
            <text:p>526.516577721</text:p>
          </table:table-cell>
          <table:table-cell/>
          <table:table-cell office:value-type="float" office:value="318.844054461" calcext:value-type="float">
            <text:p>318.844054461</text:p>
          </table:table-cell>
          <table:table-cell office:value-type="float" office:value="270.339924097" calcext:value-type="float">
            <text:p>270.339924097</text:p>
          </table:table-cell>
          <table:table-cell/>
          <table:table-cell office:value-type="float" office:value="309.314040422" calcext:value-type="float">
            <text:p>309.314040422</text:p>
          </table:table-cell>
          <table:table-cell office:value-type="float" office:value="1575.40179873" calcext:value-type="float">
            <text:p>1575.40179873</text:p>
          </table:table-cell>
          <table:table-cell table:number-columns-repeated="9"/>
          <table:table-cell table:formula="of:=SUM([.R8:.U8])" office:value-type="float" office:value="0" calcext:value-type="float">
            <text:p>0</text:p>
          </table:table-cell>
          <table:table-cell table:formula="of:=[.Q8]-[.V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6.228244305" calcext:value-type="float">
            <text:p>326.228244305</text:p>
          </table:table-cell>
          <table:table-cell office:value-type="float" office:value="549.300167322" calcext:value-type="float">
            <text:p>549.300167322</text:p>
          </table:table-cell>
          <table:table-cell/>
          <table:table-cell office:value-type="float" office:value="147.564922333" calcext:value-type="float">
            <text:p>147.564922333</text:p>
          </table:table-cell>
          <table:table-cell office:value-type="float" office:value="570.25410533" calcext:value-type="float">
            <text:p>570.25410533</text:p>
          </table:table-cell>
          <table:table-cell/>
          <table:table-cell office:value-type="float" office:value="1044.20853162" calcext:value-type="float">
            <text:p>1044.20853162</text:p>
          </table:table-cell>
          <table:table-cell office:value-type="float" office:value="852.066253185" calcext:value-type="float">
            <text:p>852.066253185</text:p>
          </table:table-cell>
          <table:table-cell/>
          <table:table-cell office:value-type="float" office:value="684.093839407" calcext:value-type="float">
            <text:p>684.093839407</text:p>
          </table:table-cell>
          <table:table-cell office:value-type="float" office:value="490.799696922" calcext:value-type="float">
            <text:p>490.799696922</text:p>
          </table:table-cell>
          <table:table-cell table:number-columns-repeated="4"/>
          <table:table-cell office:value-type="float" office:value="363.419975042" calcext:value-type="float">
            <text:p>363.419975042</text:p>
          </table:table-cell>
          <table:table-cell office:value-type="float" office:value="52.8015367985" calcext:value-type="float">
            <text:p>52.8015367985</text:p>
          </table:table-cell>
          <table:table-cell office:value-type="float" office:value="83.835706234" calcext:value-type="float">
            <text:p>83.835706234</text:p>
          </table:table-cell>
          <table:table-cell office:value-type="float" office:value="167.442205429" calcext:value-type="float">
            <text:p>167.442205429</text:p>
          </table:table-cell>
          <table:table-cell office:value-type="float" office:value="34.9984695911" calcext:value-type="float">
            <text:p>34.9984695911</text:p>
          </table:table-cell>
          <table:table-cell table:formula="of:=SUM([.R9:.U9])" office:value-type="float" office:value="339.0779180526" calcext:value-type="float">
            <text:p>339.0779180526</text:p>
          </table:table-cell>
          <table:table-cell table:formula="of:=[.Q9]-[.V9]" office:value-type="float" office:value="24.3420569894" calcext:value-type="float">
            <text:p>24.3420569894</text:p>
          </table:table-cell>
        </table:table-row>
        <table:table-row table:style-name="ro1">
          <table:table-cell/>
          <table:table-cell table:formula="of:=AVERAGE([.B7:.B9])" office:value-type="float" office:value="344.339704593" calcext:value-type="float">
            <text:p>344.339704593</text:p>
          </table:table-cell>
          <table:table-cell table:formula="of:=AVERAGE([.C7:.C9])" office:value-type="float" office:value="608.062081972667" calcext:value-type="float">
            <text:p>608.0620819727</text:p>
          </table:table-cell>
          <table:table-cell/>
          <table:table-cell table:formula="of:=AVERAGE([.E7:.E9])" office:value-type="float" office:value="165.284475008667" calcext:value-type="float">
            <text:p>165.2844750087</text:p>
          </table:table-cell>
          <table:table-cell table:formula="of:=AVERAGE([.F7:.F9])" office:value-type="float" office:value="522.159996589333" calcext:value-type="float">
            <text:p>522.1599965893</text:p>
          </table:table-cell>
          <table:table-cell/>
          <table:table-cell table:formula="of:=AVERAGE([.H7:.H9])" office:value-type="float" office:value="545.276446979" calcext:value-type="float">
            <text:p>545.276446979</text:p>
          </table:table-cell>
          <table:table-cell table:formula="of:=AVERAGE([.I7:.I9])" office:value-type="float" office:value="499.26226902" calcext:value-type="float">
            <text:p>499.26226902</text:p>
          </table:table-cell>
          <table:table-cell/>
          <table:table-cell table:formula="of:=AVERAGE([.K7:.K9])" office:value-type="float" office:value="414.196028073333" calcext:value-type="float">
            <text:p>414.1960280733</text:p>
          </table:table-cell>
          <table:table-cell table:formula="of:=AVERAGE([.L7:.L9])" office:value-type="float" office:value="857.780522904333" calcext:value-type="float">
            <text:p>857.7805229043</text:p>
          </table:table-cell>
          <table:table-cell/>
          <table:table-cell table:formula="of:=[.B5]+[.E5]+[.H5]+[.K5]+[.B10]+[.E10]+[.H10]+[.K10]" office:value-type="float" office:value="3785.10721667833" calcext:value-type="float">
            <text:p>3785.1072166783</text:p>
          </table:table-cell>
          <table:table-cell table:formula="of:=[.C5]+[.F5]+[.I5]+[.L5]+[.C10]+[.F10]+[.I10]+[.L10]" office:value-type="float" office:value="5339.80875706867" calcext:value-type="float">
            <text:p>5339.8087570687</text:p>
          </table:table-cell>
          <table:table-cell/>
          <table:table-cell office:value-type="float" office:value="343.370894432" calcext:value-type="float">
            <text:p>343.370894432</text:p>
          </table:table-cell>
          <table:table-cell office:value-type="float" office:value="44.001247406" calcext:value-type="float">
            <text:p>44.001247406</text:p>
          </table:table-cell>
          <table:table-cell office:value-type="float" office:value="114.021559954" calcext:value-type="float">
            <text:p>114.021559954</text:p>
          </table:table-cell>
          <table:table-cell office:value-type="float" office:value="101.268881321" calcext:value-type="float">
            <text:p>101.268881321</text:p>
          </table:table-cell>
          <table:table-cell office:value-type="float" office:value="48.8040270805" calcext:value-type="float">
            <text:p>48.8040270805</text:p>
          </table:table-cell>
          <table:table-cell table:formula="of:=SUM([.R10:.U10])" office:value-type="float" office:value="308.0957157615" calcext:value-type="float">
            <text:p>308.0957157615</text:p>
          </table:table-cell>
          <table:table-cell table:formula="of:=[.Q10]-[.V10]" office:value-type="float" office:value="35.2751786705" calcext:value-type="float">
            <text:p>35.2751786705</text:p>
          </table:table-cell>
        </table:table-row>
        <table:table-row table:style-name="ro1">
          <table:table-cell table:number-columns-repeated="13"/>
          <table:table-cell table:formula="of:=[.N10]/8" office:value-type="float" office:value="473.138402084792" calcext:value-type="float">
            <text:p>473.1384020848</text:p>
          </table:table-cell>
          <table:table-cell table:formula="of:=[.O10]/8" office:value-type="float" office:value="667.476094633583" calcext:value-type="float">
            <text:p>667.4760946336</text:p>
          </table:table-cell>
          <table:table-cell/>
          <table:table-cell office:value-type="float" office:value="326.228244305" calcext:value-type="float">
            <text:p>326.228244305</text:p>
          </table:table-cell>
          <table:table-cell office:value-type="float" office:value="39.2062599659" calcext:value-type="float">
            <text:p>39.2062599659</text:p>
          </table:table-cell>
          <table:table-cell office:value-type="float" office:value="88.6364400387" calcext:value-type="float">
            <text:p>88.6364400387</text:p>
          </table:table-cell>
          <table:table-cell office:value-type="float" office:value="110.630130291" calcext:value-type="float">
            <text:p>110.630130291</text:p>
          </table:table-cell>
          <table:table-cell office:value-type="float" office:value="48.6012034416" calcext:value-type="float">
            <text:p>48.6012034416</text:p>
          </table:table-cell>
          <table:table-cell table:formula="of:=SUM([.R11:.U11])" office:value-type="float" office:value="287.0740337372" calcext:value-type="float">
            <text:p>287.0740337372</text:p>
          </table:table-cell>
          <table:table-cell table:formula="of:=[.Q11]-[.V11]" office:value-type="float" office:value="39.1542105678" calcext:value-type="float">
            <text:p>39.1542105678</text:p>
          </table:table-cell>
        </table:table-row>
        <table:table-row table:style-name="ro1">
          <table:table-cell table:number-columns-repeated="21"/>
          <table:table-cell table:formula="of:=SUM([.R12:.U12])" office:value-type="float" office:value="0" calcext:value-type="float">
            <text:p>0</text:p>
          </table:table-cell>
          <table:table-cell table:formula="of:=[.Q12]-[.V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 path</text:p>
          </table:table-cell>
          <table:table-cell office:value-type="string" calcext:value-type="string">
            <text:p>knif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spoon</text:p>
          </table:table-cell>
          <table:table-cell table:number-columns-repeated="5"/>
          <table:table-cell office:value-type="float" office:value="560.430487633" calcext:value-type="float">
            <text:p>560.430487633</text:p>
          </table:table-cell>
          <table:table-cell office:value-type="float" office:value="0" calcext:value-type="float">
            <text:p>0</text:p>
          </table:table-cell>
          <table:table-cell office:value-type="float" office:value="163.611917496" calcext:value-type="float">
            <text:p>163.611917496</text:p>
          </table:table-cell>
          <table:table-cell office:value-type="float" office:value="373.269337177" calcext:value-type="float">
            <text:p>373.269337177</text:p>
          </table:table-cell>
          <table:table-cell office:value-type="float" office:value="13.3996376991" calcext:value-type="float">
            <text:p>13.3996376991</text:p>
          </table:table-cell>
          <table:table-cell table:formula="of:=SUM([.R13:.U13])" office:value-type="float" office:value="550.2808923721" calcext:value-type="float">
            <text:p>550.2808923721</text:p>
          </table:table-cell>
          <table:table-cell table:formula="of:=[.Q13]-[.V13]" office:value-type="float" office:value="10.1495952609" calcext:value-type="float">
            <text:p>10.1495952609</text:p>
          </table:table-cell>
        </table:table-row>
        <table:table-row table:style-name="ro1">
          <table:table-cell/>
          <table:table-cell office:value-type="float" office:value="36.0462990646" calcext:value-type="float">
            <text:p>36.0462990646</text:p>
          </table:table-cell>
          <table:table-cell office:value-type="float" office:value="40.8781241112" calcext:value-type="float">
            <text:p>40.8781241112</text:p>
          </table:table-cell>
          <table:table-cell/>
          <table:table-cell office:value-type="float" office:value="41.4675332412" calcext:value-type="float">
            <text:p>41.4675332412</text:p>
          </table:table-cell>
          <table:table-cell office:value-type="float" office:value="26.701472545" calcext:value-type="float">
            <text:p>26.701472545</text:p>
          </table:table-cell>
          <table:table-cell/>
          <table:table-cell office:value-type="float" office:value="57.4493553078" calcext:value-type="float">
            <text:p>57.4493553078</text:p>
          </table:table-cell>
          <table:table-cell office:value-type="float" office:value="41.4574407677" calcext:value-type="float">
            <text:p>41.4574407677</text:p>
          </table:table-cell>
          <table:table-cell/>
          <table:table-cell office:value-type="float" office:value="26.9133916064" calcext:value-type="float">
            <text:p>26.9133916064</text:p>
          </table:table-cell>
          <table:table-cell office:value-type="float" office:value="72.6905881441" calcext:value-type="float">
            <text:p>72.6905881441</text:p>
          </table:table-cell>
          <table:table-cell table:number-columns-repeated="4"/>
          <table:table-cell office:value-type="float" office:value="714.455590963" calcext:value-type="float">
            <text:p>714.455590963</text:p>
          </table:table-cell>
          <table:table-cell office:value-type="float" office:value="0" calcext:value-type="float">
            <text:p>0</text:p>
          </table:table-cell>
          <table:table-cell office:value-type="float" office:value="152.613781929" calcext:value-type="float">
            <text:p>152.613781929</text:p>
          </table:table-cell>
          <table:table-cell office:value-type="float" office:value="537.884394646" calcext:value-type="float">
            <text:p>537.884394646</text:p>
          </table:table-cell>
          <table:table-cell office:value-type="float" office:value="14.0002295971" calcext:value-type="float">
            <text:p>14.0002295971</text:p>
          </table:table-cell>
          <table:table-cell table:formula="of:=SUM([.R14:.U14])" office:value-type="float" office:value="704.4984061721" calcext:value-type="float">
            <text:p>704.4984061721</text:p>
          </table:table-cell>
          <table:table-cell table:formula="of:=[.Q14]-[.V14]" office:value-type="float" office:value="9.95718479089999" calcext:value-type="float">
            <text:p>9.9571847909</text:p>
          </table:table-cell>
        </table:table-row>
        <table:table-row table:style-name="ro1">
          <table:table-cell/>
          <table:table-cell office:value-type="float" office:value="25.8572677796" calcext:value-type="float">
            <text:p>25.8572677796</text:p>
          </table:table-cell>
          <table:table-cell office:value-type="float" office:value="80.5366968831" calcext:value-type="float">
            <text:p>80.5366968831</text:p>
          </table:table-cell>
          <table:table-cell/>
          <table:table-cell office:value-type="float" office:value="36.9404929352" calcext:value-type="float">
            <text:p>36.9404929352</text:p>
          </table:table-cell>
          <table:table-cell office:value-type="float" office:value="40.309551522" calcext:value-type="float">
            <text:p>40.309551522</text:p>
          </table:table-cell>
          <table:table-cell/>
          <table:table-cell office:value-type="float" office:value="57.3581313606" calcext:value-type="float">
            <text:p>57.3581313606</text:p>
          </table:table-cell>
          <table:table-cell office:value-type="float" office:value="37.6911393151" calcext:value-type="float">
            <text:p>37.6911393151</text:p>
          </table:table-cell>
          <table:table-cell/>
          <table:table-cell office:value-type="float" office:value="27.0155457101" calcext:value-type="float">
            <text:p>27.0155457101</text:p>
          </table:table-cell>
          <table:table-cell office:value-type="float" office:value="92.6424107254" calcext:value-type="float">
            <text:p>92.6424107254</text:p>
          </table:table-cell>
          <table:table-cell table:number-columns-repeated="4"/>
          <table:table-cell office:value-type="float" office:value="549.300167322" calcext:value-type="float">
            <text:p>549.300167322</text:p>
          </table:table-cell>
          <table:table-cell office:value-type="float" office:value="0" calcext:value-type="float">
            <text:p>0</text:p>
          </table:table-cell>
          <table:table-cell office:value-type="float" office:value="106.012635469" calcext:value-type="float">
            <text:p>106.012635469</text:p>
          </table:table-cell>
          <table:table-cell office:value-type="float" office:value="438.047911167" calcext:value-type="float">
            <text:p>438.047911167</text:p>
          </table:table-cell>
          <table:table-cell office:value-type="float" office:value="0" calcext:value-type="float">
            <text:p>0</text:p>
          </table:table-cell>
          <table:table-cell table:formula="of:=SUM([.R15:.U15])" office:value-type="float" office:value="544.060546636" calcext:value-type="float">
            <text:p>544.060546636</text:p>
          </table:table-cell>
          <table:table-cell table:formula="of:=[.Q15]-[.V15]" office:value-type="float" office:value="5.23962068599997" calcext:value-type="float">
            <text:p>5.239620686</text:p>
          </table:table-cell>
        </table:table-row>
        <table:table-row table:style-name="ro1">
          <table:table-cell/>
          <table:table-cell office:value-type="float" office:value="46.3369659858" calcext:value-type="float">
            <text:p>46.3369659858</text:p>
          </table:table-cell>
          <table:table-cell office:value-type="float" office:value="79.1306245474" calcext:value-type="float">
            <text:p>79.1306245474</text:p>
          </table:table-cell>
          <table:table-cell/>
          <table:table-cell office:value-type="float" office:value="14.2131096213" calcext:value-type="float">
            <text:p>14.2131096213</text:p>
          </table:table-cell>
          <table:table-cell office:value-type="float" office:value="73.0273204978" calcext:value-type="float">
            <text:p>73.0273204978</text:p>
          </table:table-cell>
          <table:table-cell/>
          <table:table-cell office:value-type="float" office:value="53.6199090129" calcext:value-type="float">
            <text:p>53.6199090129</text:p>
          </table:table-cell>
          <table:table-cell office:value-type="float" office:value="25.7423691633" calcext:value-type="float">
            <text:p>25.7423691633</text:p>
          </table:table-cell>
          <table:table-cell/>
          <table:table-cell office:value-type="float" office:value="28.4238806649" calcext:value-type="float">
            <text:p>28.4238806649</text:p>
          </table:table-cell>
          <table:table-cell office:value-type="float" office:value="77.7918243583" calcext:value-type="float">
            <text:p>77.7918243583</text:p>
          </table:table-cell>
          <table:table-cell table:number-columns-repeated="9"/>
          <table:table-cell table:formula="of:=SUM([.R16:.U16])" office:value-type="float" office:value="0" calcext:value-type="float">
            <text:p>0</text:p>
          </table:table-cell>
          <table:table-cell table:formula="of:=[.Q16]-[.V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14:.B16])" office:value-type="float" office:value="36.08017761" calcext:value-type="float">
            <text:p>36.08017761</text:p>
          </table:table-cell>
          <table:table-cell table:formula="of:=AVERAGE([.C14:.C16])" office:value-type="float" office:value="66.8484818472333" calcext:value-type="float">
            <text:p>66.8484818472</text:p>
          </table:table-cell>
          <table:table-cell/>
          <table:table-cell table:formula="of:=AVERAGE([.E14:.E16])" office:value-type="float" office:value="30.8737119325667" calcext:value-type="float">
            <text:p>30.8737119326</text:p>
          </table:table-cell>
          <table:table-cell table:formula="of:=AVERAGE([.F14:.F16])" office:value-type="float" office:value="46.6794481882667" calcext:value-type="float">
            <text:p>46.6794481883</text:p>
          </table:table-cell>
          <table:table-cell/>
          <table:table-cell table:formula="of:=AVERAGE([.H14:.H16])" office:value-type="float" office:value="56.1424652271" calcext:value-type="float">
            <text:p>56.1424652271</text:p>
          </table:table-cell>
          <table:table-cell table:formula="of:=AVERAGE([.I14:.I16])" office:value-type="float" office:value="34.9636497487" calcext:value-type="float">
            <text:p>34.9636497487</text:p>
          </table:table-cell>
          <table:table-cell/>
          <table:table-cell table:formula="of:=AVERAGE([.K14:.K16])" office:value-type="float" office:value="27.4509393271333" calcext:value-type="float">
            <text:p>27.4509393271</text:p>
          </table:table-cell>
          <table:table-cell table:formula="of:=AVERAGE([.L14:.L16])" office:value-type="float" office:value="81.0416077426" calcext:value-type="float">
            <text:p>81.0416077426</text:p>
          </table:table-cell>
          <table:table-cell table:number-columns-repeated="4"/>
          <table:table-cell office:value-type="float" office:value="586.39697957" calcext:value-type="float">
            <text:p>586.39697957</text:p>
          </table:table-cell>
          <table:table-cell office:value-type="float" office:value="47.8033869267" calcext:value-type="float">
            <text:p>47.8033869267</text:p>
          </table:table-cell>
          <table:table-cell office:value-type="float" office:value="130.857721567" calcext:value-type="float">
            <text:p>130.857721567</text:p>
          </table:table-cell>
          <table:table-cell office:value-type="float" office:value="314.180993557" calcext:value-type="float">
            <text:p>314.180993557</text:p>
          </table:table-cell>
          <table:table-cell office:value-type="float" office:value="50.2079801559" calcext:value-type="float">
            <text:p>50.2079801559</text:p>
          </table:table-cell>
          <table:table-cell table:formula="of:=SUM([.R17:.U17])" office:value-type="float" office:value="543.0500822066" calcext:value-type="float">
            <text:p>543.0500822066</text:p>
          </table:table-cell>
          <table:table-cell table:formula="of:=[.Q17]-[.V17]" office:value-type="float" office:value="43.3468973634" calcext:value-type="float">
            <text:p>43.3468973634</text:p>
          </table:table-cell>
        </table:table-row>
        <table:table-row table:style-name="ro1">
          <table:table-cell table:number-columns-repeated="16"/>
          <table:table-cell office:value-type="float" office:value="557.669190645" calcext:value-type="float">
            <text:p>557.669190645</text:p>
          </table:table-cell>
          <table:table-cell office:value-type="float" office:value="42.0016641617" calcext:value-type="float">
            <text:p>42.0016641617</text:p>
          </table:table-cell>
          <table:table-cell office:value-type="float" office:value="134.855480194" calcext:value-type="float">
            <text:p>134.855480194</text:p>
          </table:table-cell>
          <table:table-cell office:value-type="float" office:value="287.130555391" calcext:value-type="float">
            <text:p>287.130555391</text:p>
          </table:table-cell>
          <table:table-cell office:value-type="float" office:value="49.9978399277" calcext:value-type="float">
            <text:p>49.9978399277</text:p>
          </table:table-cell>
          <table:table-cell table:formula="of:=SUM([.R18:.U18])" office:value-type="float" office:value="513.9855396744" calcext:value-type="float">
            <text:p>513.9855396744</text:p>
          </table:table-cell>
          <table:table-cell table:formula="of:=[.Q18]-[.V18]" office:value-type="float" office:value="43.6836509706" calcext:value-type="float">
            <text:p>43.6836509706</text:p>
          </table:table-cell>
        </table:table-row>
        <table:table-row table:style-name="ro1">
          <table:table-cell/>
          <table:table-cell office:value-type="float" office:value="27.5183771793" calcext:value-type="float">
            <text:p>27.5183771793</text:p>
          </table:table-cell>
          <table:table-cell office:value-type="float" office:value="37.3345921959" calcext:value-type="float">
            <text:p>37.3345921959</text:p>
          </table:table-cell>
          <table:table-cell/>
          <table:table-cell office:value-type="float" office:value="13.040464752" calcext:value-type="float">
            <text:p>13.040464752</text:p>
          </table:table-cell>
          <table:table-cell office:value-type="float" office:value="41.5151499647" calcext:value-type="float">
            <text:p>41.5151499647</text:p>
          </table:table-cell>
          <table:table-cell/>
          <table:table-cell office:value-type="float" office:value="25.5068880058" calcext:value-type="float">
            <text:p>25.5068880058</text:p>
          </table:table-cell>
          <table:table-cell office:value-type="float" office:value="29.4670281238" calcext:value-type="float">
            <text:p>29.4670281238</text:p>
          </table:table-cell>
          <table:table-cell/>
          <table:table-cell office:value-type="float" office:value="21.0112640972" calcext:value-type="float">
            <text:p>21.0112640972</text:p>
          </table:table-cell>
          <table:table-cell office:value-type="float" office:value="38.0714534023" calcext:value-type="float">
            <text:p>38.0714534023</text:p>
          </table:table-cell>
          <table:table-cell table:number-columns-repeated="4"/>
          <table:table-cell office:value-type="float" office:value="214.022490501" calcext:value-type="float">
            <text:p>214.022490501</text:p>
          </table:table-cell>
          <table:table-cell office:value-type="float" office:value="11.7997977734" calcext:value-type="float">
            <text:p>11.7997977734</text:p>
          </table:table-cell>
          <table:table-cell office:value-type="float" office:value="100.648177147" calcext:value-type="float">
            <text:p>100.648177147</text:p>
          </table:table-cell>
          <table:table-cell office:value-type="float" office:value="42.708439827" calcext:value-type="float">
            <text:p>42.708439827</text:p>
          </table:table-cell>
          <table:table-cell office:value-type="float" office:value="31.2075736523" calcext:value-type="float">
            <text:p>31.2075736523</text:p>
          </table:table-cell>
          <table:table-cell table:formula="of:=SUM([.R19:.U19])" office:value-type="float" office:value="186.3639883997" calcext:value-type="float">
            <text:p>186.3639883997</text:p>
          </table:table-cell>
          <table:table-cell table:formula="of:=[.Q19]-[.V19]" office:value-type="float" office:value="27.6585021013" calcext:value-type="float">
            <text:p>27.6585021013</text:p>
          </table:table-cell>
        </table:table-row>
        <table:table-row table:style-name="ro1">
          <table:table-cell/>
          <table:table-cell office:value-type="float" office:value="24.5872973823" calcext:value-type="float">
            <text:p>24.5872973823</text:p>
          </table:table-cell>
          <table:table-cell office:value-type="float" office:value="39.2489845791" calcext:value-type="float">
            <text:p>39.2489845791</text:p>
          </table:table-cell>
          <table:table-cell/>
          <table:table-cell office:value-type="float" office:value="12.58182994" calcext:value-type="float">
            <text:p>12.58182994</text:p>
          </table:table-cell>
          <table:table-cell office:value-type="float" office:value="42.9570909759" calcext:value-type="float">
            <text:p>42.9570909759</text:p>
          </table:table-cell>
          <table:table-cell/>
          <table:table-cell office:value-type="float" office:value="30.6138860794" calcext:value-type="float">
            <text:p>30.6138860794</text:p>
          </table:table-cell>
          <table:table-cell office:value-type="float" office:value="32.0744035115" calcext:value-type="float">
            <text:p>32.0744035115</text:p>
          </table:table-cell>
          <table:table-cell/>
          <table:table-cell office:value-type="float" office:value="21.8385310971" calcext:value-type="float">
            <text:p>21.8385310971</text:p>
          </table:table-cell>
          <table:table-cell office:value-type="float" office:value="123.801759514" calcext:value-type="float">
            <text:p>123.801759514</text:p>
          </table:table-cell>
          <table:table-cell table:number-columns-repeated="9"/>
          <table:table-cell table:formula="of:=SUM([.R20:.U20])" office:value-type="float" office:value="0" calcext:value-type="float">
            <text:p>0</text:p>
          </table:table-cell>
          <table:table-cell table:formula="of:=[.Q20]-[.V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.6953694644" calcext:value-type="float">
            <text:p>25.6953694644</text:p>
          </table:table-cell>
          <table:table-cell office:value-type="float" office:value="38.9003483464" calcext:value-type="float">
            <text:p>38.9003483464</text:p>
          </table:table-cell>
          <table:table-cell/>
          <table:table-cell office:value-type="float" office:value="12.0977915009" calcext:value-type="float">
            <text:p>12.0977915009</text:p>
          </table:table-cell>
          <table:table-cell office:value-type="float" office:value="48.9559413629" calcext:value-type="float">
            <text:p>48.9559413629</text:p>
          </table:table-cell>
          <table:table-cell/>
          <table:table-cell office:value-type="float" office:value="67.2832363072" calcext:value-type="float">
            <text:p>67.2832363072</text:p>
          </table:table-cell>
          <table:table-cell office:value-type="float" office:value="45.7013694978" calcext:value-type="float">
            <text:p>45.7013694978</text:p>
          </table:table-cell>
          <table:table-cell/>
          <table:table-cell office:value-type="float" office:value="54.6950444656" calcext:value-type="float">
            <text:p>54.6950444656</text:p>
          </table:table-cell>
          <table:table-cell office:value-type="float" office:value="36.1845726206" calcext:value-type="float">
            <text:p>36.1845726206</text:p>
          </table:table-cell>
          <table:table-cell table:number-columns-repeated="4"/>
          <table:table-cell office:value-type="float" office:value="237.52876091" calcext:value-type="float">
            <text:p>237.52876091</text:p>
          </table:table-cell>
          <table:table-cell office:value-type="float" office:value="0" calcext:value-type="float">
            <text:p>0</text:p>
          </table:table-cell>
          <table:table-cell office:value-type="float" office:value="173.603579283" calcext:value-type="float">
            <text:p>173.603579283</text:p>
          </table:table-cell>
          <table:table-cell office:value-type="float" office:value="39.6848020554" calcext:value-type="float">
            <text:p>39.6848020554</text:p>
          </table:table-cell>
          <table:table-cell office:value-type="float" office:value="14.0001158714" calcext:value-type="float">
            <text:p>14.0001158714</text:p>
          </table:table-cell>
          <table:table-cell table:formula="of:=SUM([.R21:.U21])" office:value-type="float" office:value="227.2884972098" calcext:value-type="float">
            <text:p>227.2884972098</text:p>
          </table:table-cell>
          <table:table-cell table:formula="of:=[.Q21]-[.V21]" office:value-type="float" office:value="10.2402637002" calcext:value-type="float">
            <text:p>10.2402637002</text:p>
          </table:table-cell>
        </table:table-row>
        <table:table-row table:style-name="ro1">
          <table:table-cell/>
          <table:table-cell table:formula="of:=AVERAGE([.B19:.B21])" office:value-type="float" office:value="25.933681342" calcext:value-type="float">
            <text:p>25.933681342</text:p>
          </table:table-cell>
          <table:table-cell table:formula="of:=AVERAGE([.C19:.C21])" office:value-type="float" office:value="38.4946417071333" calcext:value-type="float">
            <text:p>38.4946417071</text:p>
          </table:table-cell>
          <table:table-cell/>
          <table:table-cell table:formula="of:=AVERAGE([.E19:.E21])" office:value-type="float" office:value="12.5733620643" calcext:value-type="float">
            <text:p>12.5733620643</text:p>
          </table:table-cell>
          <table:table-cell table:formula="of:=AVERAGE([.F19:.F21])" office:value-type="float" office:value="44.4760607678333" calcext:value-type="float">
            <text:p>44.4760607678</text:p>
          </table:table-cell>
          <table:table-cell/>
          <table:table-cell table:formula="of:=AVERAGE([.H19:.H21])" office:value-type="float" office:value="41.1346701308" calcext:value-type="float">
            <text:p>41.1346701308</text:p>
          </table:table-cell>
          <table:table-cell table:formula="of:=AVERAGE([.I19:.I21])" office:value-type="float" office:value="35.7476003777" calcext:value-type="float">
            <text:p>35.7476003777</text:p>
          </table:table-cell>
          <table:table-cell/>
          <table:table-cell table:formula="of:=AVERAGE([.K19:.K21])" office:value-type="float" office:value="32.5149465533" calcext:value-type="float">
            <text:p>32.5149465533</text:p>
          </table:table-cell>
          <table:table-cell table:formula="of:=AVERAGE([.L19:.L21])" office:value-type="float" office:value="66.0192618456333" calcext:value-type="float">
            <text:p>66.0192618456</text:p>
          </table:table-cell>
          <table:table-cell/>
          <table:table-cell table:formula="of:=[.B17]+[.E17]+[.H17]+[.K17]+[.B22]+[.E22]+[.H22]+[.K22]" office:value-type="float" office:value="262.7039541872" calcext:value-type="float">
            <text:p>262.7039541872</text:p>
          </table:table-cell>
          <table:table-cell table:formula="of:=[.C17]+[.F17]+[.I17]+[.L17]+[.C22]+[.F22]+[.I22]+[.L22]" office:value-type="float" office:value="414.2707522251" calcext:value-type="float">
            <text:p>414.2707522251</text:p>
          </table:table-cell>
          <table:table-cell/>
          <table:table-cell office:value-type="float" office:value="347.940049648" calcext:value-type="float">
            <text:p>347.940049648</text:p>
          </table:table-cell>
          <table:table-cell office:value-type="float" office:value="0" calcext:value-type="float">
            <text:p>0</text:p>
          </table:table-cell>
          <table:table-cell office:value-type="float" office:value="273.80938983" calcext:value-type="float">
            <text:p>273.80938983</text:p>
          </table:table-cell>
          <table:table-cell office:value-type="float" office:value="51.2817595005" calcext:value-type="float">
            <text:p>51.2817595005</text:p>
          </table:table-cell>
          <table:table-cell office:value-type="float" office:value="13.9993672371" calcext:value-type="float">
            <text:p>13.9993672371</text:p>
          </table:table-cell>
          <table:table-cell table:formula="of:=SUM([.R22:.U22])" office:value-type="float" office:value="339.0905165676" calcext:value-type="float">
            <text:p>339.0905165676</text:p>
          </table:table-cell>
          <table:table-cell table:formula="of:=[.Q22]-[.V22]" office:value-type="float" office:value="8.84953308040002" calcext:value-type="float">
            <text:p>8.8495330804</text:p>
          </table:table-cell>
        </table:table-row>
        <table:table-row table:style-name="ro1">
          <table:table-cell table:number-columns-repeated="13"/>
          <table:table-cell table:formula="of:=[.N22]/8" office:value-type="float" office:value="32.8379942734" calcext:value-type="float">
            <text:p>32.8379942734</text:p>
          </table:table-cell>
          <table:table-cell table:formula="of:=[.O22]/8" office:value-type="float" office:value="51.7838440281375" calcext:value-type="float">
            <text:p>51.7838440281</text:p>
          </table:table-cell>
          <table:table-cell/>
          <table:table-cell office:value-type="float" office:value="822.017215014" calcext:value-type="float">
            <text:p>822.017215014</text:p>
          </table:table-cell>
          <table:table-cell office:value-type="float" office:value="0" calcext:value-type="float">
            <text:p>0</text:p>
          </table:table-cell>
          <table:table-cell office:value-type="float" office:value="170.815874338" calcext:value-type="float">
            <text:p>170.815874338</text:p>
          </table:table-cell>
          <table:table-cell office:value-type="float" office:value="627.647392988" calcext:value-type="float">
            <text:p>627.647392988</text:p>
          </table:table-cell>
          <table:table-cell office:value-type="float" office:value="13.7995917797" calcext:value-type="float">
            <text:p>13.7995917797</text:p>
          </table:table-cell>
          <table:table-cell table:formula="of:=SUM([.R23:.U23])" office:value-type="float" office:value="812.2628591057" calcext:value-type="float">
            <text:p>812.2628591057</text:p>
          </table:table-cell>
          <table:table-cell table:formula="of:=[.Q23]-[.V23]" office:value-type="float" office:value="9.75435590830011" calcext:value-type="float">
            <text:p>9.7543559083</text:p>
          </table:table-cell>
        </table:table-row>
        <table:table-row table:style-name="ro1">
          <table:table-cell table:number-columns-repeated="21"/>
          <table:table-cell table:formula="of:=SUM([.R24:.U24])" office:value-type="float" office:value="0" calcext:value-type="float">
            <text:p>0</text:p>
          </table:table-cell>
          <table:table-cell table:formula="of:=[.Q24]-[.V24]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60.917860985" calcext:value-type="float">
            <text:p>160.917860985</text:p>
          </table:table-cell>
          <table:table-cell office:value-type="float" office:value="21.2007060051" calcext:value-type="float">
            <text:p>21.2007060051</text:p>
          </table:table-cell>
          <table:table-cell office:value-type="float" office:value="37.4159612656" calcext:value-type="float">
            <text:p>37.4159612656</text:p>
          </table:table-cell>
          <table:table-cell office:value-type="float" office:value="51.2512114048" calcext:value-type="float">
            <text:p>51.2512114048</text:p>
          </table:table-cell>
          <table:table-cell office:value-type="float" office:value="31.6020205021" calcext:value-type="float">
            <text:p>31.6020205021</text:p>
          </table:table-cell>
          <table:table-cell table:formula="of:=SUM([.R25:.U25])" office:value-type="float" office:value="141.4698991776" calcext:value-type="float">
            <text:p>141.4698991776</text:p>
          </table:table-cell>
          <table:table-cell table:formula="of:=[.Q25]-[.V25]" office:value-type="float" office:value="19.4479618074" calcext:value-type="float">
            <text:p>19.4479618074</text:p>
          </table:table-cell>
        </table:table-row>
        <table:table-row table:style-name="ro1">
          <table:table-cell table:number-columns-repeated="16"/>
          <table:table-cell office:value-type="float" office:value="187.370641708" calcext:value-type="float">
            <text:p>187.370641708</text:p>
          </table:table-cell>
          <table:table-cell office:value-type="float" office:value="24.0005972385" calcext:value-type="float">
            <text:p>24.0005972385</text:p>
          </table:table-cell>
          <table:table-cell office:value-type="float" office:value="45.6093456745" calcext:value-type="float">
            <text:p>45.6093456745</text:p>
          </table:table-cell>
          <table:table-cell office:value-type="float" office:value="65.7359330654" calcext:value-type="float">
            <text:p>65.7359330654</text:p>
          </table:table-cell>
          <table:table-cell office:value-type="float" office:value="31.602809906" calcext:value-type="float">
            <text:p>31.602809906</text:p>
          </table:table-cell>
          <table:table-cell table:formula="of:=SUM([.R26:.U26])" office:value-type="float" office:value="166.9486858844" calcext:value-type="float">
            <text:p>166.9486858844</text:p>
          </table:table-cell>
          <table:table-cell table:formula="of:=[.Q26]-[.V26]" office:value-type="float" office:value="20.4219558236" calcext:value-type="float">
            <text:p>20.4219558236</text:p>
          </table:table-cell>
        </table:table-row>
        <table:table-row table:style-name="ro1">
          <table:table-cell office:value-type="string" calcext:value-type="string">
            <text:p>search time</text:p>
          </table:table-cell>
          <table:table-cell office:value-type="string" calcext:value-type="string">
            <text:p>knif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spoon</text:p>
          </table:table-cell>
          <table:table-cell table:number-columns-repeated="5"/>
          <table:table-cell office:value-type="float" office:value="147.564922333" calcext:value-type="float">
            <text:p>147.564922333</text:p>
          </table:table-cell>
          <table:table-cell office:value-type="float" office:value="25.2008244991" calcext:value-type="float">
            <text:p>25.2008244991</text:p>
          </table:table-cell>
          <table:table-cell office:value-type="float" office:value="41.8152427673" calcext:value-type="float">
            <text:p>41.8152427673</text:p>
          </table:table-cell>
          <table:table-cell office:value-type="float" office:value="30.0109050274" calcext:value-type="float">
            <text:p>30.0109050274</text:p>
          </table:table-cell>
          <table:table-cell office:value-type="float" office:value="31.5995619297" calcext:value-type="float">
            <text:p>31.5995619297</text:p>
          </table:table-cell>
          <table:table-cell table:formula="of:=SUM([.R27:.U27])" office:value-type="float" office:value="128.6265342235" calcext:value-type="float">
            <text:p>128.6265342235</text:p>
          </table:table-cell>
          <table:table-cell table:formula="of:=[.Q27]-[.V27]" office:value-type="float" office:value="18.9383881095" calcext:value-type="float">
            <text:p>18.9383881095</text:p>
          </table:table-cell>
        </table:table-row>
        <table:table-row table:style-name="ro1">
          <table:table-cell/>
          <table:table-cell office:value-type="float" office:value="264.752379179" calcext:value-type="float">
            <text:p>264.752379179</text:p>
          </table:table-cell>
          <table:table-cell office:value-type="float" office:value="348.737712622" calcext:value-type="float">
            <text:p>348.737712622</text:p>
          </table:table-cell>
          <table:table-cell/>
          <table:table-cell office:value-type="float" office:value="314.180993557" calcext:value-type="float">
            <text:p>314.180993557</text:p>
          </table:table-cell>
          <table:table-cell office:value-type="float" office:value="39.6848020554" calcext:value-type="float">
            <text:p>39.6848020554</text:p>
          </table:table-cell>
          <table:table-cell/>
          <table:table-cell office:value-type="float" office:value="815.343180418" calcext:value-type="float">
            <text:p>815.343180418</text:p>
          </table:table-cell>
          <table:table-cell office:value-type="float" office:value="193.642138004" calcext:value-type="float">
            <text:p>193.642138004</text:p>
          </table:table-cell>
          <table:table-cell/>
          <table:table-cell office:value-type="float" office:value="222.245054007" calcext:value-type="float">
            <text:p>222.245054007</text:p>
          </table:table-cell>
          <table:table-cell office:value-type="float" office:value="693.881315708" calcext:value-type="float">
            <text:p>693.881315708</text:p>
          </table:table-cell>
          <table:table-cell table:number-columns-repeated="9"/>
          <table:table-cell table:formula="of:=SUM([.R28:.U28])" office:value-type="float" office:value="0" calcext:value-type="float">
            <text:p>0</text:p>
          </table:table-cell>
          <table:table-cell table:formula="of:=[.Q28]-[.V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.481196165" calcext:value-type="float">
            <text:p>117.481196165</text:p>
          </table:table-cell>
          <table:table-cell office:value-type="float" office:value="832.850031614" calcext:value-type="float">
            <text:p>832.850031614</text:p>
          </table:table-cell>
          <table:table-cell/>
          <table:table-cell office:value-type="float" office:value="287.130555391" calcext:value-type="float">
            <text:p>287.130555391</text:p>
          </table:table-cell>
          <table:table-cell office:value-type="float" office:value="51.2817595005" calcext:value-type="float">
            <text:p>51.2817595005</text:p>
          </table:table-cell>
          <table:table-cell/>
          <table:table-cell office:value-type="float" office:value="570.614969015" calcext:value-type="float">
            <text:p>570.614969015</text:p>
          </table:table-cell>
          <table:table-cell office:value-type="float" office:value="201.974854231" calcext:value-type="float">
            <text:p>201.974854231</text:p>
          </table:table-cell>
          <table:table-cell/>
          <table:table-cell office:value-type="float" office:value="171.200283289" calcext:value-type="float">
            <text:p>171.200283289</text:p>
          </table:table-cell>
          <table:table-cell office:value-type="float" office:value="888.06388855" calcext:value-type="float">
            <text:p>888.06388855</text:p>
          </table:table-cell>
          <table:table-cell table:number-columns-repeated="4"/>
          <table:table-cell office:value-type="float" office:value="469.709306717" calcext:value-type="float">
            <text:p>469.709306717</text:p>
          </table:table-cell>
          <table:table-cell office:value-type="float" office:value="0" calcext:value-type="float">
            <text:p>0</text:p>
          </table:table-cell>
          <table:table-cell office:value-type="float" office:value="97.8041269779" calcext:value-type="float">
            <text:p>97.8041269779</text:p>
          </table:table-cell>
          <table:table-cell office:value-type="float" office:value="348.341859102" calcext:value-type="float">
            <text:p>348.341859102</text:p>
          </table:table-cell>
          <table:table-cell office:value-type="float" office:value="13.8006618023" calcext:value-type="float">
            <text:p>13.8006618023</text:p>
          </table:table-cell>
          <table:table-cell table:formula="of:=SUM([.R29:.U29])" office:value-type="float" office:value="459.9466478822" calcext:value-type="float">
            <text:p>459.9466478822</text:p>
          </table:table-cell>
          <table:table-cell table:formula="of:=[.Q29]-[.V29]" office:value-type="float" office:value="9.76265883479999" calcext:value-type="float">
            <text:p>9.7626588348</text:p>
          </table:table-cell>
        </table:table-row>
        <table:table-row table:style-name="ro1">
          <table:table-cell/>
          <table:table-cell office:value-type="float" office:value="417.454008579" calcext:value-type="float">
            <text:p>417.454008579</text:p>
          </table:table-cell>
          <table:table-cell office:value-type="float" office:value="734.741466999" calcext:value-type="float">
            <text:p>734.741466999</text:p>
          </table:table-cell>
          <table:table-cell/>
          <table:table-cell office:value-type="float" office:value="42.708439827" calcext:value-type="float">
            <text:p>42.708439827</text:p>
          </table:table-cell>
          <table:table-cell office:value-type="float" office:value="627.647392988" calcext:value-type="float">
            <text:p>627.647392988</text:p>
          </table:table-cell>
          <table:table-cell/>
          <table:table-cell office:value-type="float" office:value="537.716599226" calcext:value-type="float">
            <text:p>537.716599226</text:p>
          </table:table-cell>
          <table:table-cell office:value-type="float" office:value="322.570328474" calcext:value-type="float">
            <text:p>322.570328474</text:p>
          </table:table-cell>
          <table:table-cell/>
          <table:table-cell office:value-type="float" office:value="199.61406827" calcext:value-type="float">
            <text:p>199.61406827</text:p>
          </table:table-cell>
          <table:table-cell office:value-type="float" office:value="651.763880968" calcext:value-type="float">
            <text:p>651.763880968</text:p>
          </table:table-cell>
          <table:table-cell table:number-columns-repeated="4"/>
          <table:table-cell office:value-type="float" office:value="526.516577721" calcext:value-type="float">
            <text:p>526.516577721</text:p>
          </table:table-cell>
          <table:table-cell office:value-type="float" office:value="0" calcext:value-type="float">
            <text:p>0</text:p>
          </table:table-cell>
          <table:table-cell office:value-type="float" office:value="111.814479828" calcext:value-type="float">
            <text:p>111.814479828</text:p>
          </table:table-cell>
          <table:table-cell office:value-type="float" office:value="390.761182308" calcext:value-type="float">
            <text:p>390.761182308</text:p>
          </table:table-cell>
          <table:table-cell office:value-type="float" office:value="13.8002314568" calcext:value-type="float">
            <text:p>13.8002314568</text:p>
          </table:table-cell>
          <table:table-cell table:formula="of:=SUM([.R30:.U30])" office:value-type="float" office:value="516.3758935928" calcext:value-type="float">
            <text:p>516.3758935928</text:p>
          </table:table-cell>
          <table:table-cell table:formula="of:=[.Q30]-[.V30]" office:value-type="float" office:value="10.1406841282" calcext:value-type="float">
            <text:p>10.1406841282</text:p>
          </table:table-cell>
        </table:table-row>
        <table:table-row table:style-name="ro1">
          <table:table-cell/>
          <table:table-cell table:formula="of:=AVERAGE([.B28:.B30])" office:value-type="float" office:value="266.562527974333" calcext:value-type="float">
            <text:p>266.5625279743</text:p>
          </table:table-cell>
          <table:table-cell table:formula="of:=AVERAGE([.C28:.C30])" office:value-type="float" office:value="638.776403745" calcext:value-type="float">
            <text:p>638.776403745</text:p>
          </table:table-cell>
          <table:table-cell/>
          <table:table-cell table:formula="of:=AVERAGE([.E28:.E30])" office:value-type="float" office:value="214.673329591667" calcext:value-type="float">
            <text:p>214.6733295917</text:p>
          </table:table-cell>
          <table:table-cell table:formula="of:=AVERAGE([.F28:.F30])" office:value-type="float" office:value="239.537984847967" calcext:value-type="float">
            <text:p>239.537984848</text:p>
          </table:table-cell>
          <table:table-cell/>
          <table:table-cell table:formula="of:=AVERAGE([.H28:.H30])" office:value-type="float" office:value="641.224916219667" calcext:value-type="float">
            <text:p>641.2249162197</text:p>
          </table:table-cell>
          <table:table-cell table:formula="of:=AVERAGE([.I28:.I30])" office:value-type="float" office:value="239.395773569667" calcext:value-type="float">
            <text:p>239.3957735697</text:p>
          </table:table-cell>
          <table:table-cell/>
          <table:table-cell table:formula="of:=AVERAGE([.K28:.K30])" office:value-type="float" office:value="197.686468522" calcext:value-type="float">
            <text:p>197.686468522</text:p>
          </table:table-cell>
          <table:table-cell table:formula="of:=AVERAGE([.L28:.L30])" office:value-type="float" office:value="744.569695075333" calcext:value-type="float">
            <text:p>744.5696950753</text:p>
          </table:table-cell>
          <table:table-cell table:number-columns-repeated="4"/>
          <table:table-cell office:value-type="float" office:value="570.25410533" calcext:value-type="float">
            <text:p>570.25410533</text:p>
          </table:table-cell>
          <table:table-cell office:value-type="float" office:value="0" calcext:value-type="float">
            <text:p>0</text:p>
          </table:table-cell>
          <table:table-cell office:value-type="float" office:value="154.003828287" calcext:value-type="float">
            <text:p>154.003828287</text:p>
          </table:table-cell>
          <table:table-cell office:value-type="float" office:value="392.603807926" calcext:value-type="float">
            <text:p>392.603807926</text:p>
          </table:table-cell>
          <table:table-cell office:value-type="float" office:value="13.7997117043" calcext:value-type="float">
            <text:p>13.7997117043</text:p>
          </table:table-cell>
          <table:table-cell table:formula="of:=SUM([.R31:.U31])" office:value-type="float" office:value="560.4073479173" calcext:value-type="float">
            <text:p>560.4073479173</text:p>
          </table:table-cell>
          <table:table-cell table:formula="of:=[.Q31]-[.V31]" office:value-type="float" office:value="9.84675741269996" calcext:value-type="float">
            <text:p>9.8467574127</text:p>
          </table:table-cell>
        </table:table-row>
        <table:table-row table:style-name="ro1">
          <table:table-cell table:number-columns-repeated="21"/>
          <table:table-cell table:formula="of:=SUM([.R32:.U32])" office:value-type="float" office:value="0" calcext:value-type="float">
            <text:p>0</text:p>
          </table:table-cell>
          <table:table-cell table:formula="of:=[.Q32]-[.V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7.442205429" calcext:value-type="float">
            <text:p>167.442205429</text:p>
          </table:table-cell>
          <table:table-cell office:value-type="float" office:value="373.269337177" calcext:value-type="float">
            <text:p>373.269337177</text:p>
          </table:table-cell>
          <table:table-cell/>
          <table:table-cell office:value-type="float" office:value="51.2512114048" calcext:value-type="float">
            <text:p>51.2512114048</text:p>
          </table:table-cell>
          <table:table-cell office:value-type="float" office:value="348.341859102" calcext:value-type="float">
            <text:p>348.341859102</text:p>
          </table:table-cell>
          <table:table-cell/>
          <table:table-cell office:value-type="float" office:value="66.8608715534" calcext:value-type="float">
            <text:p>66.8608715534</text:p>
          </table:table-cell>
          <table:table-cell office:value-type="float" office:value="207.968771935" calcext:value-type="float">
            <text:p>207.968771935</text:p>
          </table:table-cell>
          <table:table-cell/>
          <table:table-cell office:value-type="float" office:value="52.0609762669" calcext:value-type="float">
            <text:p>52.0609762669</text:p>
          </table:table-cell>
          <table:table-cell office:value-type="float" office:value="334.093615532" calcext:value-type="float">
            <text:p>334.093615532</text:p>
          </table:table-cell>
          <table:table-cell table:number-columns-repeated="4"/>
          <table:table-cell office:value-type="float" office:value="1064.04291821" calcext:value-type="float">
            <text:p>1064.04291821</text:p>
          </table:table-cell>
          <table:table-cell office:value-type="float" office:value="47.2091929913" calcext:value-type="float">
            <text:p>47.2091929913</text:p>
          </table:table-cell>
          <table:table-cell office:value-type="float" office:value="105.036065817" calcext:value-type="float">
            <text:p>105.036065817</text:p>
          </table:table-cell>
          <table:table-cell office:value-type="float" office:value="815.343180418" calcext:value-type="float">
            <text:p>815.343180418</text:p>
          </table:table-cell>
          <table:table-cell office:value-type="float" office:value="49.5996806622" calcext:value-type="float">
            <text:p>49.5996806622</text:p>
          </table:table-cell>
          <table:table-cell table:formula="of:=SUM([.R33:.U33])" office:value-type="float" office:value="1017.1881198885" calcext:value-type="float">
            <text:p>1017.1881198885</text:p>
          </table:table-cell>
          <table:table-cell table:formula="of:=[.Q33]-[.V33]" office:value-type="float" office:value="46.8547983215" calcext:value-type="float">
            <text:p>46.8547983215</text:p>
          </table:table-cell>
        </table:table-row>
        <table:table-row table:style-name="ro1">
          <table:table-cell/>
          <table:table-cell office:value-type="float" office:value="101.268881321" calcext:value-type="float">
            <text:p>101.268881321</text:p>
          </table:table-cell>
          <table:table-cell office:value-type="float" office:value="537.884394646" calcext:value-type="float">
            <text:p>537.884394646</text:p>
          </table:table-cell>
          <table:table-cell/>
          <table:table-cell office:value-type="float" office:value="65.7359330654" calcext:value-type="float">
            <text:p>65.7359330654</text:p>
          </table:table-cell>
          <table:table-cell office:value-type="float" office:value="390.761182308" calcext:value-type="float">
            <text:p>390.761182308</text:p>
          </table:table-cell>
          <table:table-cell/>
          <table:table-cell office:value-type="float" office:value="68.6179177761" calcext:value-type="float">
            <text:p>68.6179177761</text:p>
          </table:table-cell>
          <table:table-cell office:value-type="float" office:value="130.068916082" calcext:value-type="float">
            <text:p>130.068916082</text:p>
          </table:table-cell>
          <table:table-cell/>
          <table:table-cell office:value-type="float" office:value="135.010353327" calcext:value-type="float">
            <text:p>135.010353327</text:p>
          </table:table-cell>
          <table:table-cell office:value-type="float" office:value="1465.11821365" calcext:value-type="float">
            <text:p>1465.11821365</text:p>
          </table:table-cell>
          <table:table-cell table:number-columns-repeated="4"/>
          <table:table-cell office:value-type="float" office:value="1005.03980589" calcext:value-type="float">
            <text:p>1005.03980589</text:p>
          </table:table-cell>
          <table:table-cell office:value-type="float" office:value="185.432098389" calcext:value-type="float">
            <text:p>185.432098389</text:p>
          </table:table-cell>
          <table:table-cell office:value-type="float" office:value="139.688590765" calcext:value-type="float">
            <text:p>139.688590765</text:p>
          </table:table-cell>
          <table:table-cell office:value-type="float" office:value="570.614969015" calcext:value-type="float">
            <text:p>570.614969015</text:p>
          </table:table-cell>
          <table:table-cell office:value-type="float" office:value="51.0170331001" calcext:value-type="float">
            <text:p>51.0170331001</text:p>
          </table:table-cell>
          <table:table-cell table:formula="of:=SUM([.R34:.U34])" office:value-type="float" office:value="946.7526912691" calcext:value-type="float">
            <text:p>946.7526912691</text:p>
          </table:table-cell>
          <table:table-cell table:formula="of:=[.Q34]-[.V34]" office:value-type="float" office:value="58.2871146209001" calcext:value-type="float">
            <text:p>58.2871146209</text:p>
          </table:table-cell>
        </table:table-row>
        <table:table-row table:style-name="ro1">
          <table:table-cell/>
          <table:table-cell office:value-type="float" office:value="110.630130291" calcext:value-type="float">
            <text:p>110.630130291</text:p>
          </table:table-cell>
          <table:table-cell office:value-type="float" office:value="438.047911167" calcext:value-type="float">
            <text:p>438.047911167</text:p>
          </table:table-cell>
          <table:table-cell/>
          <table:table-cell office:value-type="float" office:value="30.0109050274" calcext:value-type="float">
            <text:p>30.0109050274</text:p>
          </table:table-cell>
          <table:table-cell office:value-type="float" office:value="392.603807926" calcext:value-type="float">
            <text:p>392.603807926</text:p>
          </table:table-cell>
          <table:table-cell/>
          <table:table-cell office:value-type="float" office:value="567.256679058" calcext:value-type="float">
            <text:p>567.256679058</text:p>
          </table:table-cell>
          <table:table-cell office:value-type="float" office:value="573.872366428" calcext:value-type="float">
            <text:p>573.872366428</text:p>
          </table:table-cell>
          <table:table-cell/>
          <table:table-cell office:value-type="float" office:value="466.901983023" calcext:value-type="float">
            <text:p>466.901983023</text:p>
          </table:table-cell>
          <table:table-cell office:value-type="float" office:value="360.959221125" calcext:value-type="float">
            <text:p>360.959221125</text:p>
          </table:table-cell>
          <table:table-cell table:number-columns-repeated="4"/>
          <table:table-cell office:value-type="float" office:value="797.52255702" calcext:value-type="float">
            <text:p>797.52255702</text:p>
          </table:table-cell>
          <table:table-cell office:value-type="float" office:value="66.2012155056" calcext:value-type="float">
            <text:p>66.2012155056</text:p>
          </table:table-cell>
          <table:table-cell office:value-type="float" office:value="104.647025108" calcext:value-type="float">
            <text:p>104.647025108</text:p>
          </table:table-cell>
          <table:table-cell office:value-type="float" office:value="537.716599226" calcext:value-type="float">
            <text:p>537.716599226</text:p>
          </table:table-cell>
          <table:table-cell office:value-type="float" office:value="50.0066876411" calcext:value-type="float">
            <text:p>50.0066876411</text:p>
          </table:table-cell>
          <table:table-cell table:formula="of:=SUM([.R35:.U35])" office:value-type="float" office:value="758.5715274807" calcext:value-type="float">
            <text:p>758.5715274807</text:p>
          </table:table-cell>
          <table:table-cell table:formula="of:=[.Q35]-[.V35]" office:value-type="float" office:value="38.9510295393001" calcext:value-type="float">
            <text:p>38.9510295393</text:p>
          </table:table-cell>
        </table:table-row>
        <table:table-row table:style-name="ro1">
          <table:table-cell/>
          <table:table-cell table:formula="of:=AVERAGE([.B33:.B35])" office:value-type="float" office:value="126.447072347" calcext:value-type="float">
            <text:p>126.447072347</text:p>
          </table:table-cell>
          <table:table-cell table:formula="of:=AVERAGE([.C33:.C35])" office:value-type="float" office:value="449.733880996667" calcext:value-type="float">
            <text:p>449.7338809967</text:p>
          </table:table-cell>
          <table:table-cell/>
          <table:table-cell table:formula="of:=AVERAGE([.E33:.E35])" office:value-type="float" office:value="48.9993498325333" calcext:value-type="float">
            <text:p>48.9993498325</text:p>
          </table:table-cell>
          <table:table-cell table:formula="of:=AVERAGE([.F33:.F35])" office:value-type="float" office:value="377.235616445333" calcext:value-type="float">
            <text:p>377.2356164453</text:p>
          </table:table-cell>
          <table:table-cell/>
          <table:table-cell table:formula="of:=AVERAGE([.H33:.H35])" office:value-type="float" office:value="234.245156129167" calcext:value-type="float">
            <text:p>234.2451561292</text:p>
          </table:table-cell>
          <table:table-cell table:formula="of:=AVERAGE([.I33:.I35])" office:value-type="float" office:value="303.970018148333" calcext:value-type="float">
            <text:p>303.9700181483</text:p>
          </table:table-cell>
          <table:table-cell/>
          <table:table-cell table:formula="of:=AVERAGE([.K33:.K35])" office:value-type="float" office:value="217.991104205633" calcext:value-type="float">
            <text:p>217.9911042056</text:p>
          </table:table-cell>
          <table:table-cell table:formula="of:=AVERAGE([.L33:.L35])" office:value-type="float" office:value="720.057016769" calcext:value-type="float">
            <text:p>720.057016769</text:p>
          </table:table-cell>
          <table:table-cell/>
          <table:table-cell table:formula="of:=[.B31]+[.E31]+[.H31]+[.K31]+[.B36]+[.E36]+[.H36]+[.K36]" office:value-type="float" office:value="1947.829924822" calcext:value-type="float">
            <text:p>1947.829924822</text:p>
          </table:table-cell>
          <table:table-cell table:formula="of:=[.C31]+[.F31]+[.I31]+[.L31]+[.C36]+[.F36]+[.I36]+[.L36]" office:value-type="float" office:value="3713.2763895973" calcext:value-type="float">
            <text:p>3713.2763895973</text:p>
          </table:table-cell>
          <table:table-cell table:number-columns-repeated="6"/>
          <table:table-cell table:formula="of:=SUM([.R36:.U36])" office:value-type="float" office:value="0" calcext:value-type="float">
            <text:p>0</text:p>
          </table:table-cell>
          <table:table-cell table:formula="of:=[.Q36]-[.V36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N36]/8" office:value-type="float" office:value="243.47874060275" calcext:value-type="float">
            <text:p>243.4787406028</text:p>
          </table:table-cell>
          <table:table-cell table:formula="of:=[.O36]/8" office:value-type="float" office:value="464.159548699663" calcext:value-type="float">
            <text:p>464.1595486997</text:p>
          </table:table-cell>
          <table:table-cell/>
          <table:table-cell office:value-type="float" office:value="377.531872988" calcext:value-type="float">
            <text:p>377.531872988</text:p>
          </table:table-cell>
          <table:table-cell office:value-type="float" office:value="0" calcext:value-type="float">
            <text:p>0</text:p>
          </table:table-cell>
          <table:table-cell office:value-type="float" office:value="160.41303587" calcext:value-type="float">
            <text:p>160.41303587</text:p>
          </table:table-cell>
          <table:table-cell office:value-type="float" office:value="193.642138004" calcext:value-type="float">
            <text:p>193.642138004</text:p>
          </table:table-cell>
          <table:table-cell office:value-type="float" office:value="13.5995893478" calcext:value-type="float">
            <text:p>13.5995893478</text:p>
          </table:table-cell>
          <table:table-cell table:formula="of:=SUM([.R37:.U37])" office:value-type="float" office:value="367.6547632218" calcext:value-type="float">
            <text:p>367.6547632218</text:p>
          </table:table-cell>
          <table:table-cell table:formula="of:=[.Q37]-[.V37]" office:value-type="float" office:value="9.87710976620002" calcext:value-type="float">
            <text:p>9.8771097662</text:p>
          </table:table-cell>
        </table:table-row>
        <table:table-row table:style-name="ro1">
          <table:table-cell table:number-columns-repeated="16"/>
          <table:table-cell office:value-type="float" office:value="401.248581171" calcext:value-type="float">
            <text:p>401.248581171</text:p>
          </table:table-cell>
          <table:table-cell office:value-type="float" office:value="0" calcext:value-type="float">
            <text:p>0</text:p>
          </table:table-cell>
          <table:table-cell office:value-type="float" office:value="176.604752302" calcext:value-type="float">
            <text:p>176.604752302</text:p>
          </table:table-cell>
          <table:table-cell office:value-type="float" office:value="201.974854231" calcext:value-type="float">
            <text:p>201.974854231</text:p>
          </table:table-cell>
          <table:table-cell office:value-type="float" office:value="13.5997438431" calcext:value-type="float">
            <text:p>13.5997438431</text:p>
          </table:table-cell>
          <table:table-cell table:formula="of:=SUM([.R38:.U38])" office:value-type="float" office:value="392.1793503761" calcext:value-type="float">
            <text:p>392.1793503761</text:p>
          </table:table-cell>
          <table:table-cell table:formula="of:=[.Q38]-[.V38]" office:value-type="float" office:value="9.06923079490002" calcext:value-type="float">
            <text:p>9.0692307949</text:p>
          </table:table-cell>
        </table:table-row>
        <table:table-row table:style-name="ro1">
          <table:table-cell office:value-type="string" calcext:value-type="string">
            <text:p>search path</text:p>
          </table:table-cell>
          <table:table-cell office:value-type="string" calcext:value-type="string">
            <text:p>knif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spoon</text:p>
          </table:table-cell>
          <table:table-cell table:number-columns-repeated="5"/>
          <table:table-cell office:value-type="float" office:value="407.269691706" calcext:value-type="float">
            <text:p>407.269691706</text:p>
          </table:table-cell>
          <table:table-cell office:value-type="float" office:value="0" calcext:value-type="float">
            <text:p>0</text:p>
          </table:table-cell>
          <table:table-cell office:value-type="float" office:value="61.2209117413" calcext:value-type="float">
            <text:p>61.2209117413</text:p>
          </table:table-cell>
          <table:table-cell office:value-type="float" office:value="322.570328474" calcext:value-type="float">
            <text:p>322.570328474</text:p>
          </table:table-cell>
          <table:table-cell office:value-type="float" office:value="13.799757719" calcext:value-type="float">
            <text:p>13.799757719</text:p>
          </table:table-cell>
          <table:table-cell table:formula="of:=SUM([.R39:.U39])" office:value-type="float" office:value="397.5909979343" calcext:value-type="float">
            <text:p>397.5909979343</text:p>
          </table:table-cell>
          <table:table-cell table:formula="of:=[.Q39]-[.V39]" office:value-type="float" office:value="9.67869377169995" calcext:value-type="float">
            <text:p>9.6786937717</text:p>
          </table:table-cell>
        </table:table-row>
        <table:table-row table:style-name="ro1">
          <table:table-cell/>
          <table:table-cell office:value-type="float" office:value="36.0462990646" calcext:value-type="float">
            <text:p>36.0462990646</text:p>
          </table:table-cell>
          <table:table-cell office:value-type="float" office:value="40.8781241112" calcext:value-type="float">
            <text:p>40.8781241112</text:p>
          </table:table-cell>
          <table:table-cell/>
          <table:table-cell office:value-type="float" office:value="41.4675332412" calcext:value-type="float">
            <text:p>41.4675332412</text:p>
          </table:table-cell>
          <table:table-cell office:value-type="float" office:value="26.701472545" calcext:value-type="float">
            <text:p>26.701472545</text:p>
          </table:table-cell>
          <table:table-cell/>
          <table:table-cell office:value-type="float" office:value="57.4493553078" calcext:value-type="float">
            <text:p>57.4493553078</text:p>
          </table:table-cell>
          <table:table-cell office:value-type="float" office:value="41.4574407677" calcext:value-type="float">
            <text:p>41.4574407677</text:p>
          </table:table-cell>
          <table:table-cell/>
          <table:table-cell office:value-type="float" office:value="26.9133916064" calcext:value-type="float">
            <text:p>26.9133916064</text:p>
          </table:table-cell>
          <table:table-cell office:value-type="float" office:value="72.6905881441" calcext:value-type="float">
            <text:p>72.6905881441</text:p>
          </table:table-cell>
          <table:table-cell table:number-columns-repeated="9"/>
          <table:table-cell table:formula="of:=SUM([.R40:.U40])" office:value-type="float" office:value="0" calcext:value-type="float">
            <text:p>0</text:p>
          </table:table-cell>
          <table:table-cell table:formula="of:=[.Q40]-[.V4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.8572677796" calcext:value-type="float">
            <text:p>25.8572677796</text:p>
          </table:table-cell>
          <table:table-cell office:value-type="float" office:value="80.5366968831" calcext:value-type="float">
            <text:p>80.5366968831</text:p>
          </table:table-cell>
          <table:table-cell/>
          <table:table-cell office:value-type="float" office:value="36.9404929352" calcext:value-type="float">
            <text:p>36.9404929352</text:p>
          </table:table-cell>
          <table:table-cell office:value-type="float" office:value="40.309551522" calcext:value-type="float">
            <text:p>40.309551522</text:p>
          </table:table-cell>
          <table:table-cell/>
          <table:table-cell office:value-type="float" office:value="57.3581313606" calcext:value-type="float">
            <text:p>57.3581313606</text:p>
          </table:table-cell>
          <table:table-cell office:value-type="float" office:value="37.6911393151" calcext:value-type="float">
            <text:p>37.6911393151</text:p>
          </table:table-cell>
          <table:table-cell/>
          <table:table-cell office:value-type="float" office:value="27.0155457101" calcext:value-type="float">
            <text:p>27.0155457101</text:p>
          </table:table-cell>
          <table:table-cell office:value-type="float" office:value="92.6424107254" calcext:value-type="float">
            <text:p>92.6424107254</text:p>
          </table:table-cell>
          <table:table-cell table:number-columns-repeated="4"/>
          <table:table-cell office:value-type="float" office:value="272.776754856" calcext:value-type="float">
            <text:p>272.776754856</text:p>
          </table:table-cell>
          <table:table-cell office:value-type="float" office:value="33.6071372032" calcext:value-type="float">
            <text:p>33.6071372032</text:p>
          </table:table-cell>
          <table:table-cell office:value-type="float" office:value="89.0436198711" calcext:value-type="float">
            <text:p>89.0436198711</text:p>
          </table:table-cell>
          <table:table-cell office:value-type="float" office:value="66.8608715534" calcext:value-type="float">
            <text:p>66.8608715534</text:p>
          </table:table-cell>
          <table:table-cell office:value-type="float" office:value="49.2032337189" calcext:value-type="float">
            <text:p>49.2032337189</text:p>
          </table:table-cell>
          <table:table-cell table:formula="of:=SUM([.R41:.U41])" office:value-type="float" office:value="238.7148623466" calcext:value-type="float">
            <text:p>238.7148623466</text:p>
          </table:table-cell>
          <table:table-cell table:formula="of:=[.Q41]-[.V41]" office:value-type="float" office:value="34.0618925094" calcext:value-type="float">
            <text:p>34.0618925094</text:p>
          </table:table-cell>
        </table:table-row>
        <table:table-row table:style-name="ro1">
          <table:table-cell/>
          <table:table-cell office:value-type="float" office:value="46.3369659858" calcext:value-type="float">
            <text:p>46.3369659858</text:p>
          </table:table-cell>
          <table:table-cell office:value-type="float" office:value="79.1306245474" calcext:value-type="float">
            <text:p>79.1306245474</text:p>
          </table:table-cell>
          <table:table-cell/>
          <table:table-cell office:value-type="float" office:value="14.2131096213" calcext:value-type="float">
            <text:p>14.2131096213</text:p>
          </table:table-cell>
          <table:table-cell office:value-type="float" office:value="73.0273204978" calcext:value-type="float">
            <text:p>73.0273204978</text:p>
          </table:table-cell>
          <table:table-cell/>
          <table:table-cell office:value-type="float" office:value="53.6199090129" calcext:value-type="float">
            <text:p>53.6199090129</text:p>
          </table:table-cell>
          <table:table-cell office:value-type="float" office:value="25.7423691633" calcext:value-type="float">
            <text:p>25.7423691633</text:p>
          </table:table-cell>
          <table:table-cell/>
          <table:table-cell office:value-type="float" office:value="28.4238806649" calcext:value-type="float">
            <text:p>28.4238806649</text:p>
          </table:table-cell>
          <table:table-cell office:value-type="float" office:value="77.7918243583" calcext:value-type="float">
            <text:p>77.7918243583</text:p>
          </table:table-cell>
          <table:table-cell table:number-columns-repeated="4"/>
          <table:table-cell office:value-type="float" office:value="318.844054461" calcext:value-type="float">
            <text:p>318.844054461</text:p>
          </table:table-cell>
          <table:table-cell office:value-type="float" office:value="54.0019845963" calcext:value-type="float">
            <text:p>54.0019845963</text:p>
          </table:table-cell>
          <table:table-cell office:value-type="float" office:value="111.626758337" calcext:value-type="float">
            <text:p>111.626758337</text:p>
          </table:table-cell>
          <table:table-cell office:value-type="float" office:value="68.6179177761" calcext:value-type="float">
            <text:p>68.6179177761</text:p>
          </table:table-cell>
          <table:table-cell office:value-type="float" office:value="49.8041586876" calcext:value-type="float">
            <text:p>49.8041586876</text:p>
          </table:table-cell>
          <table:table-cell table:formula="of:=SUM([.R42:.U42])" office:value-type="float" office:value="284.050819397" calcext:value-type="float">
            <text:p>284.050819397</text:p>
          </table:table-cell>
          <table:table-cell table:formula="of:=[.Q42]-[.V42]" office:value-type="float" office:value="34.793235064" calcext:value-type="float">
            <text:p>34.793235064</text:p>
          </table:table-cell>
        </table:table-row>
        <table:table-row table:style-name="ro1">
          <table:table-cell/>
          <table:table-cell table:formula="of:=AVERAGE([.B40:.B42])" office:value-type="float" office:value="36.08017761" calcext:value-type="float">
            <text:p>36.08017761</text:p>
          </table:table-cell>
          <table:table-cell table:formula="of:=AVERAGE([.C40:.C42])" office:value-type="float" office:value="66.8484818472333" calcext:value-type="float">
            <text:p>66.8484818472</text:p>
          </table:table-cell>
          <table:table-cell/>
          <table:table-cell table:formula="of:=AVERAGE([.E40:.E42])" office:value-type="float" office:value="30.8737119325667" calcext:value-type="float">
            <text:p>30.8737119326</text:p>
          </table:table-cell>
          <table:table-cell table:formula="of:=AVERAGE([.F40:.F42])" office:value-type="float" office:value="46.6794481882667" calcext:value-type="float">
            <text:p>46.6794481883</text:p>
          </table:table-cell>
          <table:table-cell/>
          <table:table-cell table:formula="of:=AVERAGE([.H40:.H42])" office:value-type="float" office:value="56.1424652271" calcext:value-type="float">
            <text:p>56.1424652271</text:p>
          </table:table-cell>
          <table:table-cell table:formula="of:=AVERAGE([.I40:.I42])" office:value-type="float" office:value="34.9636497487" calcext:value-type="float">
            <text:p>34.9636497487</text:p>
          </table:table-cell>
          <table:table-cell/>
          <table:table-cell table:formula="of:=AVERAGE([.K40:.K42])" office:value-type="float" office:value="27.4509393271333" calcext:value-type="float">
            <text:p>27.4509393271</text:p>
          </table:table-cell>
          <table:table-cell table:formula="of:=AVERAGE([.L40:.L42])" office:value-type="float" office:value="81.0416077426" calcext:value-type="float">
            <text:p>81.0416077426</text:p>
          </table:table-cell>
          <table:table-cell table:number-columns-repeated="4"/>
          <table:table-cell office:value-type="float" office:value="1044.20853162" calcext:value-type="float">
            <text:p>1044.20853162</text:p>
          </table:table-cell>
          <table:table-cell office:value-type="float" office:value="230.425854445" calcext:value-type="float">
            <text:p>230.425854445</text:p>
          </table:table-cell>
          <table:table-cell office:value-type="float" office:value="136.829070568" calcext:value-type="float">
            <text:p>136.829070568</text:p>
          </table:table-cell>
          <table:table-cell office:value-type="float" office:value="567.256679058" calcext:value-type="float">
            <text:p>567.256679058</text:p>
          </table:table-cell>
          <table:table-cell office:value-type="float" office:value="52.0072045326" calcext:value-type="float">
            <text:p>52.0072045326</text:p>
          </table:table-cell>
          <table:table-cell table:formula="of:=SUM([.R43:.U43])" office:value-type="float" office:value="986.5188086036" calcext:value-type="float">
            <text:p>986.5188086036</text:p>
          </table:table-cell>
          <table:table-cell table:formula="of:=[.Q43]-[.V43]" office:value-type="float" office:value="57.6897230164" calcext:value-type="float">
            <text:p>57.6897230164</text:p>
          </table:table-cell>
        </table:table-row>
        <table:table-row table:style-name="ro1">
          <table:table-cell table:number-columns-repeated="21"/>
          <table:table-cell table:formula="of:=SUM([.R44:.U44])" office:value-type="float" office:value="0" calcext:value-type="float">
            <text:p>0</text:p>
          </table:table-cell>
          <table:table-cell table:formula="of:=[.Q44]-[.V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.5183771793" calcext:value-type="float">
            <text:p>27.5183771793</text:p>
          </table:table-cell>
          <table:table-cell office:value-type="float" office:value="37.3345921959" calcext:value-type="float">
            <text:p>37.3345921959</text:p>
          </table:table-cell>
          <table:table-cell/>
          <table:table-cell office:value-type="float" office:value="13.040464752" calcext:value-type="float">
            <text:p>13.040464752</text:p>
          </table:table-cell>
          <table:table-cell office:value-type="float" office:value="41.5151499647" calcext:value-type="float">
            <text:p>41.5151499647</text:p>
          </table:table-cell>
          <table:table-cell/>
          <table:table-cell office:value-type="float" office:value="25.5068880058" calcext:value-type="float">
            <text:p>25.5068880058</text:p>
          </table:table-cell>
          <table:table-cell office:value-type="float" office:value="29.4670281238" calcext:value-type="float">
            <text:p>29.4670281238</text:p>
          </table:table-cell>
          <table:table-cell/>
          <table:table-cell office:value-type="float" office:value="21.0112640972" calcext:value-type="float">
            <text:p>21.0112640972</text:p>
          </table:table-cell>
          <table:table-cell office:value-type="float" office:value="38.0714534023" calcext:value-type="float">
            <text:p>38.0714534023</text:p>
          </table:table-cell>
          <table:table-cell table:number-columns-repeated="4"/>
          <table:table-cell office:value-type="float" office:value="375.380629778" calcext:value-type="float">
            <text:p>375.380629778</text:p>
          </table:table-cell>
          <table:table-cell office:value-type="float" office:value="0" calcext:value-type="float">
            <text:p>0</text:p>
          </table:table-cell>
          <table:table-cell office:value-type="float" office:value="143.803416491" calcext:value-type="float">
            <text:p>143.803416491</text:p>
          </table:table-cell>
          <table:table-cell office:value-type="float" office:value="207.968771935" calcext:value-type="float">
            <text:p>207.968771935</text:p>
          </table:table-cell>
          <table:table-cell office:value-type="float" office:value="13.6002204418" calcext:value-type="float">
            <text:p>13.6002204418</text:p>
          </table:table-cell>
          <table:table-cell table:formula="of:=SUM([.R45:.U45])" office:value-type="float" office:value="365.3724088678" calcext:value-type="float">
            <text:p>365.3724088678</text:p>
          </table:table-cell>
          <table:table-cell table:formula="of:=[.Q45]-[.V45]" office:value-type="float" office:value="10.0082209102" calcext:value-type="float">
            <text:p>10.0082209102</text:p>
          </table:table-cell>
        </table:table-row>
        <table:table-row table:style-name="ro1">
          <table:table-cell/>
          <table:table-cell office:value-type="float" office:value="24.5872973823" calcext:value-type="float">
            <text:p>24.5872973823</text:p>
          </table:table-cell>
          <table:table-cell office:value-type="float" office:value="39.2489845791" calcext:value-type="float">
            <text:p>39.2489845791</text:p>
          </table:table-cell>
          <table:table-cell/>
          <table:table-cell office:value-type="float" office:value="12.58182994" calcext:value-type="float">
            <text:p>12.58182994</text:p>
          </table:table-cell>
          <table:table-cell office:value-type="float" office:value="42.9570909759" calcext:value-type="float">
            <text:p>42.9570909759</text:p>
          </table:table-cell>
          <table:table-cell/>
          <table:table-cell office:value-type="float" office:value="30.6138860794" calcext:value-type="float">
            <text:p>30.6138860794</text:p>
          </table:table-cell>
          <table:table-cell office:value-type="float" office:value="32.0744035115" calcext:value-type="float">
            <text:p>32.0744035115</text:p>
          </table:table-cell>
          <table:table-cell/>
          <table:table-cell office:value-type="float" office:value="21.8385310971" calcext:value-type="float">
            <text:p>21.8385310971</text:p>
          </table:table-cell>
          <table:table-cell office:value-type="float" office:value="123.801759514" calcext:value-type="float">
            <text:p>123.801759514</text:p>
          </table:table-cell>
          <table:table-cell table:number-columns-repeated="4"/>
          <table:table-cell office:value-type="float" office:value="270.339924097" calcext:value-type="float">
            <text:p>270.339924097</text:p>
          </table:table-cell>
          <table:table-cell office:value-type="float" office:value="0" calcext:value-type="float">
            <text:p>0</text:p>
          </table:table-cell>
          <table:table-cell office:value-type="float" office:value="117.613512278" calcext:value-type="float">
            <text:p>117.613512278</text:p>
          </table:table-cell>
          <table:table-cell office:value-type="float" office:value="130.068916082" calcext:value-type="float">
            <text:p>130.068916082</text:p>
          </table:table-cell>
          <table:table-cell office:value-type="float" office:value="13.799905777" calcext:value-type="float">
            <text:p>13.799905777</text:p>
          </table:table-cell>
          <table:table-cell table:formula="of:=SUM([.R46:.U46])" office:value-type="float" office:value="261.482334137" calcext:value-type="float">
            <text:p>261.482334137</text:p>
          </table:table-cell>
          <table:table-cell table:formula="of:=[.Q46]-[.V46]" office:value-type="float" office:value="8.85758996000004" calcext:value-type="float">
            <text:p>8.85758996</text:p>
          </table:table-cell>
        </table:table-row>
        <table:table-row table:style-name="ro1">
          <table:table-cell/>
          <table:table-cell office:value-type="float" office:value="25.6953694644" calcext:value-type="float">
            <text:p>25.6953694644</text:p>
          </table:table-cell>
          <table:table-cell office:value-type="float" office:value="38.9003483464" calcext:value-type="float">
            <text:p>38.9003483464</text:p>
          </table:table-cell>
          <table:table-cell/>
          <table:table-cell office:value-type="float" office:value="12.0977915009" calcext:value-type="float">
            <text:p>12.0977915009</text:p>
          </table:table-cell>
          <table:table-cell office:value-type="float" office:value="48.9559413629" calcext:value-type="float">
            <text:p>48.9559413629</text:p>
          </table:table-cell>
          <table:table-cell/>
          <table:table-cell office:value-type="float" office:value="67.2832363072" calcext:value-type="float">
            <text:p>67.2832363072</text:p>
          </table:table-cell>
          <table:table-cell office:value-type="float" office:value="45.7013694978" calcext:value-type="float">
            <text:p>45.7013694978</text:p>
          </table:table-cell>
          <table:table-cell/>
          <table:table-cell office:value-type="float" office:value="54.6950444656" calcext:value-type="float">
            <text:p>54.6950444656</text:p>
          </table:table-cell>
          <table:table-cell office:value-type="float" office:value="36.1845726206" calcext:value-type="float">
            <text:p>36.1845726206</text:p>
          </table:table-cell>
          <table:table-cell table:number-columns-repeated="4"/>
          <table:table-cell office:value-type="float" office:value="852.066253185" calcext:value-type="float">
            <text:p>852.066253185</text:p>
          </table:table-cell>
          <table:table-cell office:value-type="float" office:value="0" calcext:value-type="float">
            <text:p>0</text:p>
          </table:table-cell>
          <table:table-cell office:value-type="float" office:value="254.824087381" calcext:value-type="float">
            <text:p>254.824087381</text:p>
          </table:table-cell>
          <table:table-cell office:value-type="float" office:value="573.872366428" calcext:value-type="float">
            <text:p>573.872366428</text:p>
          </table:table-cell>
          <table:table-cell office:value-type="float" office:value="13.7998006344" calcext:value-type="float">
            <text:p>13.7998006344</text:p>
          </table:table-cell>
          <table:table-cell table:formula="of:=SUM([.R47:.U47])" office:value-type="float" office:value="842.4962544434" calcext:value-type="float">
            <text:p>842.4962544434</text:p>
          </table:table-cell>
          <table:table-cell table:formula="of:=[.Q47]-[.V47]" office:value-type="float" office:value="9.5699987416001" calcext:value-type="float">
            <text:p>9.5699987416</text:p>
          </table:table-cell>
        </table:table-row>
        <table:table-row table:style-name="ro1">
          <table:table-cell/>
          <table:table-cell table:formula="of:=AVERAGE([.B45:.B47])" office:value-type="float" office:value="25.933681342" calcext:value-type="float">
            <text:p>25.933681342</text:p>
          </table:table-cell>
          <table:table-cell table:formula="of:=AVERAGE([.C45:.C47])" office:value-type="float" office:value="38.4946417071333" calcext:value-type="float">
            <text:p>38.4946417071</text:p>
          </table:table-cell>
          <table:table-cell/>
          <table:table-cell table:formula="of:=AVERAGE([.E45:.E47])" office:value-type="float" office:value="12.5733620643" calcext:value-type="float">
            <text:p>12.5733620643</text:p>
          </table:table-cell>
          <table:table-cell table:formula="of:=AVERAGE([.F45:.F47])" office:value-type="float" office:value="44.4760607678333" calcext:value-type="float">
            <text:p>44.4760607678</text:p>
          </table:table-cell>
          <table:table-cell/>
          <table:table-cell table:formula="of:=AVERAGE([.H45:.H47])" office:value-type="float" office:value="41.1346701308" calcext:value-type="float">
            <text:p>41.1346701308</text:p>
          </table:table-cell>
          <table:table-cell table:formula="of:=AVERAGE([.I45:.I47])" office:value-type="float" office:value="35.7476003777" calcext:value-type="float">
            <text:p>35.7476003777</text:p>
          </table:table-cell>
          <table:table-cell/>
          <table:table-cell table:formula="of:=AVERAGE([.K45:.K47])" office:value-type="float" office:value="32.5149465533" calcext:value-type="float">
            <text:p>32.5149465533</text:p>
          </table:table-cell>
          <table:table-cell table:formula="of:=AVERAGE([.L45:.L47])" office:value-type="float" office:value="66.0192618456333" calcext:value-type="float">
            <text:p>66.0192618456</text:p>
          </table:table-cell>
          <table:table-cell/>
          <table:table-cell table:formula="of:=[.B43]+[.E43]+[.H43]+[.K43]+[.B48]+[.E48]+[.H48]+[.K48]" office:value-type="float" office:value="262.7039541872" calcext:value-type="float">
            <text:p>262.7039541872</text:p>
          </table:table-cell>
          <table:table-cell table:formula="of:=[.C43]+[.F43]+[.I43]+[.L43]+[.C48]+[.F48]+[.I48]+[.L48]" office:value-type="float" office:value="414.2707522251" calcext:value-type="float">
            <text:p>414.2707522251</text:p>
          </table:table-cell>
          <table:table-cell table:number-columns-repeated="6"/>
          <table:table-cell table:formula="of:=SUM([.R48:.U48])" office:value-type="float" office:value="0" calcext:value-type="float">
            <text:p>0</text:p>
          </table:table-cell>
          <table:table-cell table:formula="of:=[.Q48]-[.V48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N48]/8" office:value-type="float" office:value="32.8379942734" calcext:value-type="float">
            <text:p>32.8379942734</text:p>
          </table:table-cell>
          <table:table-cell table:formula="of:=[.O48]/8" office:value-type="float" office:value="51.7838440281375" calcext:value-type="float">
            <text:p>51.7838440281</text:p>
          </table:table-cell>
          <table:table-cell/>
          <table:table-cell office:value-type="float" office:value="425.651885033" calcext:value-type="float">
            <text:p>425.651885033</text:p>
          </table:table-cell>
          <table:table-cell office:value-type="float" office:value="46.4040212631" calcext:value-type="float">
            <text:p>46.4040212631</text:p>
          </table:table-cell>
          <table:table-cell office:value-type="float" office:value="73.0255403519" calcext:value-type="float">
            <text:p>73.0255403519</text:p>
          </table:table-cell>
          <table:table-cell office:value-type="float" office:value="222.245054007" calcext:value-type="float">
            <text:p>222.245054007</text:p>
          </table:table-cell>
          <table:table-cell office:value-type="float" office:value="48.6107501984" calcext:value-type="float">
            <text:p>48.6107501984</text:p>
          </table:table-cell>
          <table:table-cell table:formula="of:=SUM([.R49:.U49])" office:value-type="float" office:value="390.2853658204" calcext:value-type="float">
            <text:p>390.2853658204</text:p>
          </table:table-cell>
          <table:table-cell table:formula="of:=[.Q49]-[.V49]" office:value-type="float" office:value="35.3665192126" calcext:value-type="float">
            <text:p>35.3665192126</text:p>
          </table:table-cell>
        </table:table-row>
        <table:table-row table:style-name="ro1">
          <table:table-cell table:number-columns-repeated="16"/>
          <table:table-cell office:value-type="float" office:value="375.731173277" calcext:value-type="float">
            <text:p>375.731173277</text:p>
          </table:table-cell>
          <table:table-cell office:value-type="float" office:value="45.0011100769" calcext:value-type="float">
            <text:p>45.0011100769</text:p>
          </table:table-cell>
          <table:table-cell office:value-type="float" office:value="74.8456962109" calcext:value-type="float">
            <text:p>74.8456962109</text:p>
          </table:table-cell>
          <table:table-cell office:value-type="float" office:value="171.200283289" calcext:value-type="float">
            <text:p>171.200283289</text:p>
          </table:table-cell>
          <table:table-cell office:value-type="float" office:value="48.8042685986" calcext:value-type="float">
            <text:p>48.8042685986</text:p>
          </table:table-cell>
          <table:table-cell table:formula="of:=SUM([.R50:.U50])" office:value-type="float" office:value="339.8513581754" calcext:value-type="float">
            <text:p>339.8513581754</text:p>
          </table:table-cell>
          <table:table-cell table:formula="of:=[.Q50]-[.V50]" office:value-type="float" office:value="35.8798151016" calcext:value-type="float">
            <text:p>35.8798151016</text:p>
          </table:table-cell>
        </table:table-row>
        <table:table-row table:style-name="ro1">
          <table:table-cell table:number-columns-repeated="16"/>
          <table:table-cell office:value-type="float" office:value="421.198181391" calcext:value-type="float">
            <text:p>421.198181391</text:p>
          </table:table-cell>
          <table:table-cell office:value-type="float" office:value="49.201457262" calcext:value-type="float">
            <text:p>49.201457262</text:p>
          </table:table-cell>
          <table:table-cell office:value-type="float" office:value="90.043186903" calcext:value-type="float">
            <text:p>90.043186903</text:p>
          </table:table-cell>
          <table:table-cell office:value-type="float" office:value="199.61406827" calcext:value-type="float">
            <text:p>199.61406827</text:p>
          </table:table-cell>
          <table:table-cell office:value-type="float" office:value="48.8047127724" calcext:value-type="float">
            <text:p>48.8047127724</text:p>
          </table:table-cell>
          <table:table-cell table:formula="of:=SUM([.R51:.U51])" office:value-type="float" office:value="387.6634252074" calcext:value-type="float">
            <text:p>387.6634252074</text:p>
          </table:table-cell>
          <table:table-cell table:formula="of:=[.Q51]-[.V51]" office:value-type="float" office:value="33.5347561835999" calcext:value-type="float">
            <text:p>33.5347561836</text:p>
          </table:table-cell>
        </table:table-row>
        <table:table-row table:style-name="ro1">
          <table:table-cell table:number-columns-repeated="21"/>
          <table:table-cell table:formula="of:=SUM([.R52:.U52])" office:value-type="float" office:value="0" calcext:value-type="float">
            <text:p>0</text:p>
          </table:table-cell>
          <table:table-cell table:formula="of:=[.Q52]-[.V52]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907.174832344" calcext:value-type="float">
            <text:p>907.174832344</text:p>
          </table:table-cell>
          <table:table-cell office:value-type="float" office:value="0" calcext:value-type="float">
            <text:p>0</text:p>
          </table:table-cell>
          <table:table-cell office:value-type="float" office:value="189.609980106" calcext:value-type="float">
            <text:p>189.609980106</text:p>
          </table:table-cell>
          <table:table-cell office:value-type="float" office:value="693.881315708" calcext:value-type="float">
            <text:p>693.881315708</text:p>
          </table:table-cell>
          <table:table-cell office:value-type="float" office:value="13.6003878117" calcext:value-type="float">
            <text:p>13.6003878117</text:p>
          </table:table-cell>
          <table:table-cell table:formula="of:=SUM([.R53:.U53])" office:value-type="float" office:value="897.0916836257" calcext:value-type="float">
            <text:p>897.0916836257</text:p>
          </table:table-cell>
          <table:table-cell table:formula="of:=[.Q53]-[.V53]" office:value-type="float" office:value="10.0831487183001" calcext:value-type="float">
            <text:p>10.0831487183</text:p>
          </table:table-cell>
        </table:table-row>
        <table:table-row table:style-name="ro1">
          <table:table-cell table:number-columns-repeated="16"/>
          <table:table-cell office:value-type="float" office:value="1195.6233592" calcext:value-type="float">
            <text:p>1195.6233592</text:p>
          </table:table-cell>
          <table:table-cell office:value-type="float" office:value="0" calcext:value-type="float">
            <text:p>0</text:p>
          </table:table-cell>
          <table:table-cell office:value-type="float" office:value="284.612323284" calcext:value-type="float">
            <text:p>284.612323284</text:p>
          </table:table-cell>
          <table:table-cell office:value-type="float" office:value="888.06388855" calcext:value-type="float">
            <text:p>888.06388855</text:p>
          </table:table-cell>
          <table:table-cell office:value-type="float" office:value="13.5996496677" calcext:value-type="float">
            <text:p>13.5996496677</text:p>
          </table:table-cell>
          <table:table-cell table:formula="of:=SUM([.R54:.U54])" office:value-type="float" office:value="1186.2758615017" calcext:value-type="float">
            <text:p>1186.2758615017</text:p>
          </table:table-cell>
          <table:table-cell table:formula="of:=[.Q54]-[.V54]" office:value-type="float" office:value="9.3474976983" calcext:value-type="float">
            <text:p>9.3474976983</text:p>
          </table:table-cell>
        </table:table-row>
        <table:table-row table:style-name="ro1">
          <table:table-cell table:number-columns-repeated="16"/>
          <table:table-cell office:value-type="float" office:value="1166.11824775" calcext:value-type="float">
            <text:p>1166.11824775</text:p>
          </table:table-cell>
          <table:table-cell office:value-type="float" office:value="0" calcext:value-type="float">
            <text:p>0</text:p>
          </table:table-cell>
          <table:table-cell office:value-type="float" office:value="491.243237972" calcext:value-type="float">
            <text:p>491.243237972</text:p>
          </table:table-cell>
          <table:table-cell office:value-type="float" office:value="651.763880968" calcext:value-type="float">
            <text:p>651.763880968</text:p>
          </table:table-cell>
          <table:table-cell office:value-type="float" office:value="13.599503994" calcext:value-type="float">
            <text:p>13.599503994</text:p>
          </table:table-cell>
          <table:table-cell table:formula="of:=SUM([.R55:.U55])" office:value-type="float" office:value="1156.606622934" calcext:value-type="float">
            <text:p>1156.606622934</text:p>
          </table:table-cell>
          <table:table-cell table:formula="of:=[.Q55]-[.V55]" office:value-type="float" office:value="9.51162481599999" calcext:value-type="float">
            <text:p>9.51162481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49.180204391" calcext:value-type="float">
            <text:p>249.180204391</text:p>
          </table:table-cell>
          <table:table-cell office:value-type="float" office:value="51.400796175" calcext:value-type="float">
            <text:p>51.400796175</text:p>
          </table:table-cell>
          <table:table-cell office:value-type="float" office:value="80.4560368061" calcext:value-type="float">
            <text:p>80.4560368061</text:p>
          </table:table-cell>
          <table:table-cell office:value-type="float" office:value="52.0609762669" calcext:value-type="float">
            <text:p>52.0609762669</text:p>
          </table:table-cell>
          <table:table-cell office:value-type="float" office:value="34.8050255775" calcext:value-type="float">
            <text:p>34.805025577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09.314040422" calcext:value-type="float">
            <text:p>309.314040422</text:p>
          </table:table-cell>
          <table:table-cell office:value-type="float" office:value="32.8065855503" calcext:value-type="float">
            <text:p>32.8065855503</text:p>
          </table:table-cell>
          <table:table-cell office:value-type="float" office:value="64.2340102196" calcext:value-type="float">
            <text:p>64.2340102196</text:p>
          </table:table-cell>
          <table:table-cell office:value-type="float" office:value="135.010353327" calcext:value-type="float">
            <text:p>135.010353327</text:p>
          </table:table-cell>
          <table:table-cell office:value-type="float" office:value="47.8014826775" calcext:value-type="float">
            <text:p>47.801482677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684.093839407" calcext:value-type="float">
            <text:p>684.093839407</text:p>
          </table:table-cell>
          <table:table-cell office:value-type="float" office:value="37.2013258934" calcext:value-type="float">
            <text:p>37.2013258934</text:p>
          </table:table-cell>
          <table:table-cell office:value-type="float" office:value="97.2207307816" calcext:value-type="float">
            <text:p>97.2207307816</text:p>
          </table:table-cell>
          <table:table-cell office:value-type="float" office:value="466.901983023" calcext:value-type="float">
            <text:p>466.901983023</text:p>
          </table:table-cell>
          <table:table-cell office:value-type="float" office:value="48.602802515" calcext:value-type="float">
            <text:p>48.602802515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507.140073061" calcext:value-type="float">
            <text:p>507.140073061</text:p>
          </table:table-cell>
          <table:table-cell office:value-type="float" office:value="0" calcext:value-type="float">
            <text:p>0</text:p>
          </table:table-cell>
          <table:table-cell office:value-type="float" office:value="149.407706976" calcext:value-type="float">
            <text:p>149.407706976</text:p>
          </table:table-cell>
          <table:table-cell office:value-type="float" office:value="334.093615532" calcext:value-type="float">
            <text:p>334.093615532</text:p>
          </table:table-cell>
          <table:table-cell office:value-type="float" office:value="13.999484539" calcext:value-type="float">
            <text:p>13.999484539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575.40179873" calcext:value-type="float">
            <text:p>1575.40179873</text:p>
          </table:table-cell>
          <table:table-cell office:value-type="float" office:value="0" calcext:value-type="float">
            <text:p>0</text:p>
          </table:table-cell>
          <table:table-cell office:value-type="float" office:value="85.8064739704" calcext:value-type="float">
            <text:p>85.8064739704</text:p>
          </table:table-cell>
          <table:table-cell office:value-type="float" office:value="1465.11821365" calcext:value-type="float">
            <text:p>1465.11821365</text:p>
          </table:table-cell>
          <table:table-cell office:value-type="float" office:value="13.7994096279" calcext:value-type="float">
            <text:p>13.7994096279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90.799696922" calcext:value-type="float">
            <text:p>490.799696922</text:p>
          </table:table-cell>
          <table:table-cell office:value-type="float" office:value="0" calcext:value-type="float">
            <text:p>0</text:p>
          </table:table-cell>
          <table:table-cell office:value-type="float" office:value="105.80334425" calcext:value-type="float">
            <text:p>105.80334425</text:p>
          </table:table-cell>
          <table:table-cell office:value-type="float" office:value="360.959221125" calcext:value-type="float">
            <text:p>360.959221125</text:p>
          </table:table-cell>
          <table:table-cell office:value-type="float" office:value="13.5993163586" calcext:value-type="float">
            <text:p>13.5993163586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36.0462990646" calcext:value-type="float">
            <text:p>36.0462990646</text:p>
          </table:table-cell>
          <table:table-cell office:value-type="float" office:value="4.72615178948" calcext:value-type="float">
            <text:p>4.7261517895</text:p>
          </table:table-cell>
          <table:table-cell office:value-type="float" office:value="13.4088424668" calcext:value-type="float">
            <text:p>13.4088424668</text:p>
          </table:table-cell>
          <table:table-cell office:value-type="float" office:value="17.0454191537" calcext:value-type="float">
            <text:p>17.0454191537</text:p>
          </table:table-cell>
          <table:table-cell office:value-type="float" office:value="0.716262551162" calcext:value-type="float">
            <text:p>0.716262551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5.8572677796" calcext:value-type="float">
            <text:p>25.8572677796</text:p>
          </table:table-cell>
          <table:table-cell office:value-type="float" office:value="4.31634659873" calcext:value-type="float">
            <text:p>4.3163465987</text:p>
          </table:table-cell>
          <table:table-cell office:value-type="float" office:value="10.907263354" calcext:value-type="float">
            <text:p>10.907263354</text:p>
          </table:table-cell>
          <table:table-cell office:value-type="float" office:value="9.89998474445" calcext:value-type="float">
            <text:p>9.8999847445</text:p>
          </table:table-cell>
          <table:table-cell office:value-type="float" office:value="0.610062662576" calcext:value-type="float">
            <text:p>0.610062662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6.3369659858" calcext:value-type="float">
            <text:p>46.3369659858</text:p>
          </table:table-cell>
          <table:table-cell office:value-type="float" office:value="4.35516577855" calcext:value-type="float">
            <text:p>4.3551657786</text:p>
          </table:table-cell>
          <table:table-cell office:value-type="float" office:value="13.5112945508" calcext:value-type="float">
            <text:p>13.5112945508</text:p>
          </table:table-cell>
          <table:table-cell office:value-type="float" office:value="27.7909612288" calcext:value-type="float">
            <text:p>27.7909612288</text:p>
          </table:table-cell>
          <table:table-cell office:value-type="float" office:value="0.543225855578" calcext:value-type="float">
            <text:p>0.5432258556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40.8781241112" calcext:value-type="float">
            <text:p>40.8781241112</text:p>
          </table:table-cell>
          <table:table-cell office:value-type="float" office:value="0" calcext:value-type="float">
            <text:p>0</text:p>
          </table:table-cell>
          <table:table-cell office:value-type="float" office:value="23.5320106485" calcext:value-type="float">
            <text:p>23.5320106485</text:p>
          </table:table-cell>
          <table:table-cell office:value-type="float" office:value="17.3158773339" calcext:value-type="float">
            <text:p>17.3158773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80.5366968831" calcext:value-type="float">
            <text:p>80.5366968831</text:p>
          </table:table-cell>
          <table:table-cell office:value-type="float" office:value="0" calcext:value-type="float">
            <text:p>0</text:p>
          </table:table-cell>
          <table:table-cell office:value-type="float" office:value="31.5634311027" calcext:value-type="float">
            <text:p>31.5634311027</text:p>
          </table:table-cell>
          <table:table-cell office:value-type="float" office:value="48.7244097382" calcext:value-type="float">
            <text:p>48.7244097382</text:p>
          </table:table-cell>
          <table:table-cell office:value-type="float" office:value="0.191892708878" calcext:value-type="float">
            <text:p>0.1918927089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79.1306245474" calcext:value-type="float">
            <text:p>79.1306245474</text:p>
          </table:table-cell>
          <table:table-cell office:value-type="float" office:value="0" calcext:value-type="float">
            <text:p>0</text:p>
          </table:table-cell>
          <table:table-cell office:value-type="float" office:value="26.136501491" calcext:value-type="float">
            <text:p>26.136501491</text:p>
          </table:table-cell>
          <table:table-cell office:value-type="float" office:value="52.742053876" calcext:value-type="float">
            <text:p>52.742053876</text:p>
          </table:table-cell>
          <table:table-cell office:value-type="float" office:value="0.212405996167" calcext:value-type="float">
            <text:p>0.2124059962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7.5183771793" calcext:value-type="float">
            <text:p>27.5183771793</text:p>
          </table:table-cell>
          <table:table-cell office:value-type="float" office:value="3.50112561662" calcext:value-type="float">
            <text:p>3.5011256166</text:p>
          </table:table-cell>
          <table:table-cell office:value-type="float" office:value="10.9145483573" calcext:value-type="float">
            <text:p>10.9145483573</text:p>
          </table:table-cell>
          <table:table-cell office:value-type="float" office:value="12.6037833724" calcext:value-type="float">
            <text:p>12.6037833724</text:p>
          </table:table-cell>
          <table:table-cell office:value-type="float" office:value="0.422004447315" calcext:value-type="float">
            <text:p>0.422004447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4.5872973823" calcext:value-type="float">
            <text:p>24.5872973823</text:p>
          </table:table-cell>
          <table:table-cell office:value-type="float" office:value="3.34203325586" calcext:value-type="float">
            <text:p>3.3420332559</text:p>
          </table:table-cell>
          <table:table-cell office:value-type="float" office:value="16.8019525052" calcext:value-type="float">
            <text:p>16.8019525052</text:p>
          </table:table-cell>
          <table:table-cell office:value-type="float" office:value="3.6884988143" calcext:value-type="float">
            <text:p>3.6884988143</text:p>
          </table:table-cell>
          <table:table-cell office:value-type="float" office:value="0.613401593253" calcext:value-type="float">
            <text:p>0.613401593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5.6953694644" calcext:value-type="float">
            <text:p>25.6953694644</text:p>
          </table:table-cell>
          <table:table-cell office:value-type="float" office:value="3.61546995236" calcext:value-type="float">
            <text:p>3.6154699524</text:p>
          </table:table-cell>
          <table:table-cell office:value-type="float" office:value="16.5054187693" calcext:value-type="float">
            <text:p>16.5054187693</text:p>
          </table:table-cell>
          <table:table-cell office:value-type="float" office:value="4.64849654836" calcext:value-type="float">
            <text:p>4.6484965484</text:p>
          </table:table-cell>
          <table:table-cell office:value-type="float" office:value="0.758352813763" calcext:value-type="float">
            <text:p>0.758352813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37.3345921959" calcext:value-type="float">
            <text:p>37.3345921959</text:p>
          </table:table-cell>
          <table:table-cell office:value-type="float" office:value="0" calcext:value-type="float">
            <text:p>0</text:p>
          </table:table-cell>
          <table:table-cell office:value-type="float" office:value="18.9254716287" calcext:value-type="float">
            <text:p>18.9254716287</text:p>
          </table:table-cell>
          <table:table-cell office:value-type="float" office:value="18.1867073585" calcext:value-type="float">
            <text:p>18.1867073585</text:p>
          </table:table-cell>
          <table:table-cell office:value-type="float" office:value="0.187744292629" calcext:value-type="float">
            <text:p>0.187744292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9.2489845791" calcext:value-type="float">
            <text:p>39.2489845791</text:p>
          </table:table-cell>
          <table:table-cell office:value-type="float" office:value="0" calcext:value-type="float">
            <text:p>0</text:p>
          </table:table-cell>
          <table:table-cell office:value-type="float" office:value="17.8285170513" calcext:value-type="float">
            <text:p>17.8285170513</text:p>
          </table:table-cell>
          <table:table-cell office:value-type="float" office:value="21.1347912396" calcext:value-type="float">
            <text:p>21.1347912396</text:p>
          </table:table-cell>
          <table:table-cell office:value-type="float" office:value="0.270403331389" calcext:value-type="float">
            <text:p>0.270403331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8.9003483464" calcext:value-type="float">
            <text:p>38.9003483464</text:p>
          </table:table-cell>
          <table:table-cell office:value-type="float" office:value="0" calcext:value-type="float">
            <text:p>0</text:p>
          </table:table-cell>
          <table:table-cell office:value-type="float" office:value="18.236775895" calcext:value-type="float">
            <text:p>18.236775895</text:p>
          </table:table-cell>
          <table:table-cell office:value-type="float" office:value="20.6536730168" calcext:value-type="float">
            <text:p>20.65367301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41.4675332412" calcext:value-type="float">
            <text:p>41.4675332412</text:p>
          </table:table-cell>
          <table:table-cell office:value-type="float" office:value="5.30116881161" calcext:value-type="float">
            <text:p>5.3011688116</text:p>
          </table:table-cell>
          <table:table-cell office:value-type="float" office:value="19.4463992303" calcext:value-type="float">
            <text:p>19.4463992303</text:p>
          </table:table-cell>
          <table:table-cell office:value-type="float" office:value="15.8906052116" calcext:value-type="float">
            <text:p>15.8906052116</text:p>
          </table:table-cell>
          <table:table-cell office:value-type="float" office:value="0.630716475005" calcext:value-type="float">
            <text:p>0.63071647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6.9404929352" calcext:value-type="float">
            <text:p>36.9404929352</text:p>
          </table:table-cell>
          <table:table-cell office:value-type="float" office:value="5.59178320855" calcext:value-type="float">
            <text:p>5.5917832086</text:p>
          </table:table-cell>
          <table:table-cell office:value-type="float" office:value="18.8771354676" calcext:value-type="float">
            <text:p>18.8771354676</text:p>
          </table:table-cell>
          <table:table-cell office:value-type="float" office:value="11.7975890158" calcext:value-type="float">
            <text:p>11.7975890158</text:p>
          </table:table-cell>
          <table:table-cell office:value-type="float" office:value="0.556007651697" calcext:value-type="float">
            <text:p>0.556007651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4.2131096213" calcext:value-type="float">
            <text:p>14.2131096213</text:p>
          </table:table-cell>
          <table:table-cell office:value-type="float" office:value="1.30931273442" calcext:value-type="float">
            <text:p>1.3093127344</text:p>
          </table:table-cell>
          <table:table-cell office:value-type="float" office:value="11.1427356264" calcext:value-type="float">
            <text:p>11.1427356264</text:p>
          </table:table-cell>
          <table:table-cell office:value-type="float" office:value="1.24670925268" calcext:value-type="float">
            <text:p>1.2467092527</text:p>
          </table:table-cell>
          <table:table-cell office:value-type="float" office:value="0.43230563275" calcext:value-type="float">
            <text:p>0.432305632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6.701472545" calcext:value-type="float">
            <text:p>26.701472545</text:p>
          </table:table-cell>
          <table:table-cell office:value-type="float" office:value="0" calcext:value-type="float">
            <text:p>0</text:p>
          </table:table-cell>
          <table:table-cell office:value-type="float" office:value="26.0065731693" calcext:value-type="float">
            <text:p>26.0065731693</text:p>
          </table:table-cell>
          <table:table-cell office:value-type="float" office:value="0.477644072106" calcext:value-type="float">
            <text:p>0.4776440721</text:p>
          </table:table-cell>
          <table:table-cell office:value-type="float" office:value="0.175249049222" calcext:value-type="float">
            <text:p>0.175249049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0.309551522" calcext:value-type="float">
            <text:p>40.309551522</text:p>
          </table:table-cell>
          <table:table-cell office:value-type="float" office:value="0" calcext:value-type="float">
            <text:p>0</text:p>
          </table:table-cell>
          <table:table-cell office:value-type="float" office:value="38.5229110853" calcext:value-type="float">
            <text:p>38.5229110853</text:p>
          </table:table-cell>
          <table:table-cell office:value-type="float" office:value="1.56140389836" calcext:value-type="float">
            <text:p>1.5614038984</text:p>
          </table:table-cell>
          <table:table-cell office:value-type="float" office:value="0.158896962143" calcext:value-type="float">
            <text:p>0.158896962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73.0273204978" calcext:value-type="float">
            <text:p>73.0273204978</text:p>
          </table:table-cell>
          <table:table-cell office:value-type="float" office:value="0" calcext:value-type="float">
            <text:p>0</text:p>
          </table:table-cell>
          <table:table-cell office:value-type="float" office:value="24.8078840018" calcext:value-type="float">
            <text:p>24.8078840018</text:p>
          </table:table-cell>
          <table:table-cell office:value-type="float" office:value="47.9721769254" calcext:value-type="float">
            <text:p>47.9721769254</text:p>
          </table:table-cell>
          <table:table-cell office:value-type="float" office:value="0.186114438767" calcext:value-type="float">
            <text:p>0.186114438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3.040464752" calcext:value-type="float">
            <text:p>13.040464752</text:p>
          </table:table-cell>
          <table:table-cell office:value-type="float" office:value="2.10001923208" calcext:value-type="float">
            <text:p>2.1000192321</text:p>
          </table:table-cell>
          <table:table-cell office:value-type="float" office:value="4.64828908889" calcext:value-type="float">
            <text:p>4.6482890889</text:p>
          </table:table-cell>
          <table:table-cell office:value-type="float" office:value="5.83876957588" calcext:value-type="float">
            <text:p>5.8387695759</text:p>
          </table:table-cell>
          <table:table-cell office:value-type="float" office:value="0.398989453862" calcext:value-type="float">
            <text:p>0.3989894539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2.58182994" calcext:value-type="float">
            <text:p>12.58182994</text:p>
          </table:table-cell>
          <table:table-cell office:value-type="float" office:value="1.93315410184" calcext:value-type="float">
            <text:p>1.9331541018</text:p>
          </table:table-cell>
          <table:table-cell office:value-type="float" office:value="4.51060506571" calcext:value-type="float">
            <text:p>4.5106050657</text:p>
          </table:table-cell>
          <table:table-cell office:value-type="float" office:value="5.63888001055" calcext:value-type="float">
            <text:p>5.6388800106</text:p>
          </table:table-cell>
          <table:table-cell office:value-type="float" office:value="0.43296230778" calcext:value-type="float">
            <text:p>0.432962307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2.0977915009" calcext:value-type="float">
            <text:p>12.0977915009</text:p>
          </table:table-cell>
          <table:table-cell office:value-type="float" office:value="2.10389776806" calcext:value-type="float">
            <text:p>2.1038977681</text:p>
          </table:table-cell>
          <table:table-cell office:value-type="float" office:value="4.27880808124" calcext:value-type="float">
            <text:p>4.2788080812</text:p>
          </table:table-cell>
          <table:table-cell office:value-type="float" office:value="5.33498114232" calcext:value-type="float">
            <text:p>5.3349811423</text:p>
          </table:table-cell>
          <table:table-cell office:value-type="float" office:value="0.340970121381" calcext:value-type="float">
            <text:p>0.3409701214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41.5151499647" calcext:value-type="float">
            <text:p>41.5151499647</text:p>
          </table:table-cell>
          <table:table-cell office:value-type="float" office:value="0" calcext:value-type="float">
            <text:p>0</text:p>
          </table:table-cell>
          <table:table-cell office:value-type="float" office:value="15.9615393218" calcext:value-type="float">
            <text:p>15.9615393218</text:p>
          </table:table-cell>
          <table:table-cell office:value-type="float" office:value="25.3295769383" calcext:value-type="float">
            <text:p>25.3295769383</text:p>
          </table:table-cell>
          <table:table-cell office:value-type="float" office:value="0.134763457109" calcext:value-type="float">
            <text:p>0.134763457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2.9570909759" calcext:value-type="float">
            <text:p>42.9570909759</text:p>
          </table:table-cell>
          <table:table-cell office:value-type="float" office:value="0" calcext:value-type="float">
            <text:p>0</text:p>
          </table:table-cell>
          <table:table-cell office:value-type="float" office:value="16.5236240951" calcext:value-type="float">
            <text:p>16.5236240951</text:p>
          </table:table-cell>
          <table:table-cell office:value-type="float" office:value="26.1502401165" calcext:value-type="float">
            <text:p>26.1502401165</text:p>
          </table:table-cell>
          <table:table-cell office:value-type="float" office:value="0.139911757965" calcext:value-type="float">
            <text:p>0.13991175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8.9559413629" calcext:value-type="float">
            <text:p>48.9559413629</text:p>
          </table:table-cell>
          <table:table-cell office:value-type="float" office:value="0" calcext:value-type="float">
            <text:p>0</text:p>
          </table:table-cell>
          <table:table-cell office:value-type="float" office:value="18.1171983379" calcext:value-type="float">
            <text:p>18.1171983379</text:p>
          </table:table-cell>
          <table:table-cell office:value-type="float" office:value="30.6069554337" calcext:value-type="float">
            <text:p>30.6069554337</text:p>
          </table:table-cell>
          <table:table-cell office:value-type="float" office:value="0.145777987762" calcext:value-type="float">
            <text:p>0.145777987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57.4493553078" calcext:value-type="float">
            <text:p>57.4493553078</text:p>
          </table:table-cell>
          <table:table-cell office:value-type="float" office:value="5.58789593995" calcext:value-type="float">
            <text:p>5.58789594</text:p>
          </table:table-cell>
          <table:table-cell office:value-type="float" office:value="14.973617124" calcext:value-type="float">
            <text:p>14.973617124</text:p>
          </table:table-cell>
          <table:table-cell office:value-type="float" office:value="36.2075203672" calcext:value-type="float">
            <text:p>36.2075203672</text:p>
          </table:table-cell>
          <table:table-cell office:value-type="float" office:value="0.550461298361" calcext:value-type="float">
            <text:p>0.550461298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57.3581313606" calcext:value-type="float">
            <text:p>57.3581313606</text:p>
          </table:table-cell>
          <table:table-cell office:value-type="float" office:value="10.8359847404" calcext:value-type="float">
            <text:p>10.8359847404</text:p>
          </table:table-cell>
          <table:table-cell office:value-type="float" office:value="20.6994467184" calcext:value-type="float">
            <text:p>20.6994467184</text:p>
          </table:table-cell>
          <table:table-cell office:value-type="float" office:value="24.8426513713" calcext:value-type="float">
            <text:p>24.8426513713</text:p>
          </table:table-cell>
          <table:table-cell office:value-type="float" office:value="0.777859891704" calcext:value-type="float">
            <text:p>0.777859891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53.6199090129" calcext:value-type="float">
            <text:p>53.6199090129</text:p>
          </table:table-cell>
          <table:table-cell office:value-type="float" office:value="7.38223866977" calcext:value-type="float">
            <text:p>7.3822386698</text:p>
          </table:table-cell>
          <table:table-cell office:value-type="float" office:value="18.6273658884" calcext:value-type="float">
            <text:p>18.6273658884</text:p>
          </table:table-cell>
          <table:table-cell office:value-type="float" office:value="26.7513540536" calcext:value-type="float">
            <text:p>26.7513540536</text:p>
          </table:table-cell>
          <table:table-cell office:value-type="float" office:value="0.739370211378" calcext:value-type="float">
            <text:p>0.7393702114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41.4574407677" calcext:value-type="float">
            <text:p>41.4574407677</text:p>
          </table:table-cell>
          <table:table-cell office:value-type="float" office:value="0" calcext:value-type="float">
            <text:p>0</text:p>
          </table:table-cell>
          <table:table-cell office:value-type="float" office:value="24.9905746963" calcext:value-type="float">
            <text:p>24.9905746963</text:p>
          </table:table-cell>
          <table:table-cell office:value-type="float" office:value="16.2270157209" calcext:value-type="float">
            <text:p>16.2270157209</text:p>
          </table:table-cell>
          <table:table-cell office:value-type="float" office:value="0.201507235531" calcext:value-type="float">
            <text:p>0.201507235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7.6911393151" calcext:value-type="float">
            <text:p>37.6911393151</text:p>
          </table:table-cell>
          <table:table-cell office:value-type="float" office:value="0" calcext:value-type="float">
            <text:p>0</text:p>
          </table:table-cell>
          <table:table-cell office:value-type="float" office:value="25.0963125858" calcext:value-type="float">
            <text:p>25.0963125858</text:p>
          </table:table-cell>
          <table:table-cell office:value-type="float" office:value="12.3930767263" calcext:value-type="float">
            <text:p>12.3930767263</text:p>
          </table:table-cell>
          <table:table-cell office:value-type="float" office:value="0.187175567366" calcext:value-type="float">
            <text:p>0.187175567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5.7423691633" calcext:value-type="float">
            <text:p>25.7423691633</text:p>
          </table:table-cell>
          <table:table-cell office:value-type="float" office:value="0" calcext:value-type="float">
            <text:p>0</text:p>
          </table:table-cell>
          <table:table-cell office:value-type="float" office:value="8.76135229396" calcext:value-type="float">
            <text:p>8.761352294</text:p>
          </table:table-cell>
          <table:table-cell office:value-type="float" office:value="16.776497019" calcext:value-type="float">
            <text:p>16.776497019</text:p>
          </table:table-cell>
          <table:table-cell office:value-type="float" office:value="0.187200037741" calcext:value-type="float">
            <text:p>0.1872000377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5.5068880058" calcext:value-type="float">
            <text:p>25.5068880058</text:p>
          </table:table-cell>
          <table:table-cell office:value-type="float" office:value="3.46763477571" calcext:value-type="float">
            <text:p>3.4676347757</text:p>
          </table:table-cell>
          <table:table-cell office:value-type="float" office:value="13.4395670958" calcext:value-type="float">
            <text:p>13.4395670958</text:p>
          </table:table-cell>
          <table:table-cell office:value-type="float" office:value="7.89994860081" calcext:value-type="float">
            <text:p>7.8999486008</text:p>
          </table:table-cell>
          <table:table-cell office:value-type="float" office:value="0.613784301216" calcext:value-type="float">
            <text:p>0.613784301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0.6138860794" calcext:value-type="float">
            <text:p>30.6138860794</text:p>
          </table:table-cell>
          <table:table-cell office:value-type="float" office:value="6.01702056914" calcext:value-type="float">
            <text:p>6.0170205691</text:p>
          </table:table-cell>
          <table:table-cell office:value-type="float" office:value="14.9164024829" calcext:value-type="float">
            <text:p>14.9164024829</text:p>
          </table:table-cell>
          <table:table-cell office:value-type="float" office:value="8.87480998384" calcext:value-type="float">
            <text:p>8.8748099838</text:p>
          </table:table-cell>
          <table:table-cell office:value-type="float" office:value="0.73570760924" calcext:value-type="float">
            <text:p>0.735707609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67.2832363072" calcext:value-type="float">
            <text:p>67.2832363072</text:p>
          </table:table-cell>
          <table:table-cell office:value-type="float" office:value="20.4112531794" calcext:value-type="float">
            <text:p>20.4112531794</text:p>
          </table:table-cell>
          <table:table-cell office:value-type="float" office:value="14.2442258004" calcext:value-type="float">
            <text:p>14.2442258004</text:p>
          </table:table-cell>
          <table:table-cell office:value-type="float" office:value="31.86262726" calcext:value-type="float">
            <text:p>31.86262726</text:p>
          </table:table-cell>
          <table:table-cell office:value-type="float" office:value="0.58681564805" calcext:value-type="float">
            <text:p>0.5868156481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9.4670281238" calcext:value-type="float">
            <text:p>29.4670281238</text:p>
          </table:table-cell>
          <table:table-cell office:value-type="float" office:value="0" calcext:value-type="float">
            <text:p>0</text:p>
          </table:table-cell>
          <table:table-cell office:value-type="float" office:value="16.9334144388" calcext:value-type="float">
            <text:p>16.9334144388</text:p>
          </table:table-cell>
          <table:table-cell office:value-type="float" office:value="12.2496932003" calcext:value-type="float">
            <text:p>12.2496932003</text:p>
          </table:table-cell>
          <table:table-cell office:value-type="float" office:value="0.246945843651" calcext:value-type="float">
            <text:p>0.246945843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2.0744035115" calcext:value-type="float">
            <text:p>32.0744035115</text:p>
          </table:table-cell>
          <table:table-cell office:value-type="float" office:value="0" calcext:value-type="float">
            <text:p>0</text:p>
          </table:table-cell>
          <table:table-cell office:value-type="float" office:value="18.135005887" calcext:value-type="float">
            <text:p>18.135005887</text:p>
          </table:table-cell>
          <table:table-cell office:value-type="float" office:value="13.6964593804" calcext:value-type="float">
            <text:p>13.6964593804</text:p>
          </table:table-cell>
          <table:table-cell office:value-type="float" office:value="0.195272598787" calcext:value-type="float">
            <text:p>0.195272598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5.7013694978" calcext:value-type="float">
            <text:p>45.7013694978</text:p>
          </table:table-cell>
          <table:table-cell office:value-type="float" office:value="0" calcext:value-type="float">
            <text:p>0</text:p>
          </table:table-cell>
          <table:table-cell office:value-type="float" office:value="22.2348869605" calcext:value-type="float">
            <text:p>22.2348869605</text:p>
          </table:table-cell>
          <table:table-cell office:value-type="float" office:value="23.1858652501" calcext:value-type="float">
            <text:p>23.1858652501</text:p>
          </table:table-cell>
          <table:table-cell office:value-type="float" office:value="0.246280700047" calcext:value-type="float">
            <text:p>0.2462807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6.9133916064" calcext:value-type="float">
            <text:p>26.9133916064</text:p>
          </table:table-cell>
          <table:table-cell office:value-type="float" office:value="4.45254233741" calcext:value-type="float">
            <text:p>4.4525423374</text:p>
          </table:table-cell>
          <table:table-cell office:value-type="float" office:value="10.2521928178" calcext:value-type="float">
            <text:p>10.2521928178</text:p>
          </table:table-cell>
          <table:table-cell office:value-type="float" office:value="11.5475246802" calcext:value-type="float">
            <text:p>11.5475246802</text:p>
          </table:table-cell>
          <table:table-cell office:value-type="float" office:value="0.500477960165" calcext:value-type="float">
            <text:p>0.500477960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7.0155457101" calcext:value-type="float">
            <text:p>27.0155457101</text:p>
          </table:table-cell>
          <table:table-cell office:value-type="float" office:value="4.49761737517" calcext:value-type="float">
            <text:p>4.4976173752</text:p>
          </table:table-cell>
          <table:table-cell office:value-type="float" office:value="10.5961416969" calcext:value-type="float">
            <text:p>10.5961416969</text:p>
          </table:table-cell>
          <table:table-cell office:value-type="float" office:value="11.1735089608" calcext:value-type="float">
            <text:p>11.1735089608</text:p>
          </table:table-cell>
          <table:table-cell office:value-type="float" office:value="0.579930466424" calcext:value-type="float">
            <text:p>0.579930466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8.4238806649" calcext:value-type="float">
            <text:p>28.4238806649</text:p>
          </table:table-cell>
          <table:table-cell office:value-type="float" office:value="4.7613666206" calcext:value-type="float">
            <text:p>4.7613666206</text:p>
          </table:table-cell>
          <table:table-cell office:value-type="float" office:value="12.8302769417" calcext:value-type="float">
            <text:p>12.8302769417</text:p>
          </table:table-cell>
          <table:table-cell office:value-type="float" office:value="10.0970128856" calcext:value-type="float">
            <text:p>10.0970128856</text:p>
          </table:table-cell>
          <table:table-cell office:value-type="float" office:value="0.587336729113" calcext:value-type="float">
            <text:p>0.5873367291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72.6905881441" calcext:value-type="float">
            <text:p>72.6905881441</text:p>
          </table:table-cell>
          <table:table-cell office:value-type="float" office:value="0" calcext:value-type="float">
            <text:p>0</text:p>
          </table:table-cell>
          <table:table-cell office:value-type="float" office:value="24.9393155873" calcext:value-type="float">
            <text:p>24.9393155873</text:p>
          </table:table-cell>
          <table:table-cell office:value-type="float" office:value="47.5273362067" calcext:value-type="float">
            <text:p>47.5273362067</text:p>
          </table:table-cell>
          <table:table-cell office:value-type="float" office:value="0.205148446727" calcext:value-type="float">
            <text:p>0.205148446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92.6424107254" calcext:value-type="float">
            <text:p>92.6424107254</text:p>
          </table:table-cell>
          <table:table-cell office:value-type="float" office:value="0" calcext:value-type="float">
            <text:p>0</text:p>
          </table:table-cell>
          <table:table-cell office:value-type="float" office:value="41.8482632235" calcext:value-type="float">
            <text:p>41.8482632235</text:p>
          </table:table-cell>
          <table:table-cell office:value-type="float" office:value="50.6451619359" calcext:value-type="float">
            <text:p>50.6451619359</text:p>
          </table:table-cell>
          <table:table-cell office:value-type="float" office:value="0.143482000769" calcext:value-type="float">
            <text:p>0.143482000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77.7918243583" calcext:value-type="float">
            <text:p>77.7918243583</text:p>
          </table:table-cell>
          <table:table-cell office:value-type="float" office:value="0" calcext:value-type="float">
            <text:p>0</text:p>
          </table:table-cell>
          <table:table-cell office:value-type="float" office:value="38.1652575778" calcext:value-type="float">
            <text:p>38.1652575778</text:p>
          </table:table-cell>
          <table:table-cell office:value-type="float" office:value="39.4637497042" calcext:value-type="float">
            <text:p>39.4637497042</text:p>
          </table:table-cell>
          <table:table-cell office:value-type="float" office:value="0.126774231724" calcext:value-type="float">
            <text:p>0.1267742317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1.0112640972" calcext:value-type="float">
            <text:p>21.0112640972</text:p>
          </table:table-cell>
          <table:table-cell office:value-type="float" office:value="3.57471941515" calcext:value-type="float">
            <text:p>3.5747194152</text:p>
          </table:table-cell>
          <table:table-cell office:value-type="float" office:value="13.6764751186" calcext:value-type="float">
            <text:p>13.6764751186</text:p>
          </table:table-cell>
          <table:table-cell office:value-type="float" office:value="3.25800679367" calcext:value-type="float">
            <text:p>3.2580067937</text:p>
          </table:table-cell>
          <table:table-cell office:value-type="float" office:value="0.422621295107" calcext:value-type="float">
            <text:p>0.422621295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1.8385310971" calcext:value-type="float">
            <text:p>21.8385310971</text:p>
          </table:table-cell>
          <table:table-cell office:value-type="float" office:value="3.27708566888" calcext:value-type="float">
            <text:p>3.2770856689</text:p>
          </table:table-cell>
          <table:table-cell office:value-type="float" office:value="10.529402682" calcext:value-type="float">
            <text:p>10.529402682</text:p>
          </table:table-cell>
          <table:table-cell office:value-type="float" office:value="7.40541104003" calcext:value-type="float">
            <text:p>7.40541104</text:p>
          </table:table-cell>
          <table:table-cell office:value-type="float" office:value="0.510507615876" calcext:value-type="float">
            <text:p>0.5105076159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54.6950444656" calcext:value-type="float">
            <text:p>54.6950444656</text:p>
          </table:table-cell>
          <table:table-cell office:value-type="float" office:value="3.31106096131" calcext:value-type="float">
            <text:p>3.3110609613</text:p>
          </table:table-cell>
          <table:table-cell office:value-type="float" office:value="17.3383043084" calcext:value-type="float">
            <text:p>17.3383043084</text:p>
          </table:table-cell>
          <table:table-cell office:value-type="float" office:value="33.2285016979" calcext:value-type="float">
            <text:p>33.2285016979</text:p>
          </table:table-cell>
          <table:table-cell office:value-type="float" office:value="0.715612004076" calcext:value-type="float">
            <text:p>0.7156120041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38.0714534023" calcext:value-type="float">
            <text:p>38.0714534023</text:p>
          </table:table-cell>
          <table:table-cell office:value-type="float" office:value="0" calcext:value-type="float">
            <text:p>0</text:p>
          </table:table-cell>
          <table:table-cell office:value-type="float" office:value="19.0957689933" calcext:value-type="float">
            <text:p>19.0957689933</text:p>
          </table:table-cell>
          <table:table-cell office:value-type="float" office:value="18.7049016855" calcext:value-type="float">
            <text:p>18.7049016855</text:p>
          </table:table-cell>
          <table:table-cell office:value-type="float" office:value="0.265288692266" calcext:value-type="float">
            <text:p>0.265288692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23.801759514" calcext:value-type="float">
            <text:p>123.801759514</text:p>
          </table:table-cell>
          <table:table-cell office:value-type="float" office:value="0" calcext:value-type="float">
            <text:p>0</text:p>
          </table:table-cell>
          <table:table-cell office:value-type="float" office:value="14.7023357199" calcext:value-type="float">
            <text:p>14.7023357199</text:p>
          </table:table-cell>
          <table:table-cell office:value-type="float" office:value="108.754534106" calcext:value-type="float">
            <text:p>108.754534106</text:p>
          </table:table-cell>
          <table:table-cell office:value-type="float" office:value="0.227879231605" calcext:value-type="float">
            <text:p>0.227879231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6.1845726206" calcext:value-type="float">
            <text:p>36.1845726206</text:p>
          </table:table-cell>
          <table:table-cell office:value-type="float" office:value="0" calcext:value-type="float">
            <text:p>0</text:p>
          </table:table-cell>
          <table:table-cell office:value-type="float" office:value="17.7559665536" calcext:value-type="float">
            <text:p>17.7559665536</text:p>
          </table:table-cell>
          <table:table-cell office:value-type="float" office:value="18.2015792534" calcext:value-type="float">
            <text:p>18.2015792534</text:p>
          </table:table-cell>
          <table:table-cell office:value-type="float" office:value="0.185580727854" calcext:value-type="float">
            <text:p>0.1855807279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6"/>
          <table:table-cell office:value-type="float" office:value="1527.72352005" calcext:value-type="float">
            <text:p>1527.72352005</text:p>
          </table:table-cell>
          <table:table-cell office:value-type="float" office:value="207.13909545" calcext:value-type="float">
            <text:p>207.13909545</text:p>
          </table:table-cell>
          <table:table-cell office:value-type="float" office:value="284.019880377" calcext:value-type="float">
            <text:p>284.019880377</text:p>
          </table:table-cell>
          <table:table-cell office:value-type="float" office:value="875.916850289" calcext:value-type="float">
            <text:p>875.916850289</text:p>
          </table:table-cell>
          <table:table-cell office:value-type="float" office:value="93.211209802" calcext:value-type="float">
            <text:p>93.21120980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957.398297195" calcext:value-type="float">
            <text:p>957.398297195</text:p>
          </table:table-cell>
          <table:table-cell office:value-type="float" office:value="122.219812609" calcext:value-type="float">
            <text:p>122.219812609</text:p>
          </table:table-cell>
          <table:table-cell office:value-type="float" office:value="204.186584582" calcext:value-type="float">
            <text:p>204.186584582</text:p>
          </table:table-cell>
          <table:table-cell office:value-type="float" office:value="476.87466516" calcext:value-type="float">
            <text:p>476.87466516</text:p>
          </table:table-cell>
          <table:table-cell office:value-type="float" office:value="90.8210723529" calcext:value-type="float">
            <text:p>90.8210723529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718.97327515" calcext:value-type="float">
            <text:p>1718.97327515</text:p>
          </table:table-cell>
          <table:table-cell office:value-type="float" office:value="110.478904519" calcext:value-type="float">
            <text:p>110.478904519</text:p>
          </table:table-cell>
          <table:table-cell office:value-type="float" office:value="285.989530761" calcext:value-type="float">
            <text:p>285.989530761</text:p>
          </table:table-cell>
          <table:table-cell office:value-type="float" office:value="1156.26569016" calcext:value-type="float">
            <text:p>1156.26569016</text:p>
          </table:table-cell>
          <table:table-cell office:value-type="float" office:value="94.3711996851" calcext:value-type="float">
            <text:p>94.3711996851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978.91507542" calcext:value-type="float">
            <text:p>1978.91507542</text:p>
          </table:table-cell>
          <table:table-cell office:value-type="float" office:value="0" calcext:value-type="float">
            <text:p>0</text:p>
          </table:table-cell>
          <table:table-cell office:value-type="float" office:value="829.957993192" calcext:value-type="float">
            <text:p>829.957993192</text:p>
          </table:table-cell>
          <table:table-cell office:value-type="float" office:value="1148.27821292" calcext:value-type="float">
            <text:p>1148.278212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329.66176449" calcext:value-type="float">
            <text:p>3329.66176449</text:p>
          </table:table-cell>
          <table:table-cell office:value-type="float" office:value="0" calcext:value-type="float">
            <text:p>0</text:p>
          </table:table-cell>
          <table:table-cell office:value-type="float" office:value="719.021325726" calcext:value-type="float">
            <text:p>719.021325726</text:p>
          </table:table-cell>
          <table:table-cell office:value-type="float" office:value="2546.69158954" calcext:value-type="float">
            <text:p>2546.69158954</text:p>
          </table:table-cell>
          <table:table-cell office:value-type="float" office:value="36.9928939567" calcext:value-type="float">
            <text:p>36.992893956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981.00709584" calcext:value-type="float">
            <text:p>2981.00709584</text:p>
          </table:table-cell>
          <table:table-cell office:value-type="float" office:value="0" calcext:value-type="float">
            <text:p>0</text:p>
          </table:table-cell>
          <table:table-cell office:value-type="float" office:value="600.428199832" calcext:value-type="float">
            <text:p>600.428199832</text:p>
          </table:table-cell>
          <table:table-cell office:value-type="float" office:value="2319.47098498" calcext:value-type="float">
            <text:p>2319.47098498</text:p>
          </table:table-cell>
          <table:table-cell office:value-type="float" office:value="36.8544420948" calcext:value-type="float">
            <text:p>36.854442094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023.1819203" calcext:value-type="float">
            <text:p>1023.1819203</text:p>
          </table:table-cell>
          <table:table-cell office:value-type="float" office:value="171.689071788" calcext:value-type="float">
            <text:p>171.689071788</text:p>
          </table:table-cell>
          <table:table-cell office:value-type="float" office:value="297.670324533" calcext:value-type="float">
            <text:p>297.670324533</text:p>
          </table:table-cell>
          <table:table-cell office:value-type="float" office:value="382.389279499" calcext:value-type="float">
            <text:p>382.389279499</text:p>
          </table:table-cell>
          <table:table-cell office:value-type="float" office:value="95.597291745" calcext:value-type="float">
            <text:p>95.59729174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892.720428221" calcext:value-type="float">
            <text:p>892.720428221</text:p>
          </table:table-cell>
          <table:table-cell office:value-type="float" office:value="134.740304421" calcext:value-type="float">
            <text:p>134.740304421</text:p>
          </table:table-cell>
          <table:table-cell office:value-type="float" office:value="364.74540106" calcext:value-type="float">
            <text:p>364.74540106</text:p>
          </table:table-cell>
          <table:table-cell office:value-type="float" office:value="158.319394843" calcext:value-type="float">
            <text:p>158.319394843</text:p>
          </table:table-cell>
          <table:table-cell office:value-type="float" office:value="131.741495151" calcext:value-type="float">
            <text:p>131.74149515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863.453440741" calcext:value-type="float">
            <text:p>863.453440741</text:p>
          </table:table-cell>
          <table:table-cell office:value-type="float" office:value="122.226730205" calcext:value-type="float">
            <text:p>122.226730205</text:p>
          </table:table-cell>
          <table:table-cell office:value-type="float" office:value="268.346884458" calcext:value-type="float">
            <text:p>268.346884458</text:p>
          </table:table-cell>
          <table:table-cell office:value-type="float" office:value="224.410956866" calcext:value-type="float">
            <text:p>224.410956866</text:p>
          </table:table-cell>
          <table:table-cell office:value-type="float" office:value="134.11105672" calcext:value-type="float">
            <text:p>134.11105672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582.9018243" calcext:value-type="float">
            <text:p>1582.9018243</text:p>
          </table:table-cell>
          <table:table-cell office:value-type="float" office:value="0" calcext:value-type="float">
            <text:p>0</text:p>
          </table:table-cell>
          <table:table-cell office:value-type="float" office:value="549.83528749" calcext:value-type="float">
            <text:p>549.83528749</text:p>
          </table:table-cell>
          <table:table-cell office:value-type="float" office:value="966.04131571" calcext:value-type="float">
            <text:p>966.04131571</text:p>
          </table:table-cell>
          <table:table-cell office:value-type="float" office:value="35.3198351006" calcext:value-type="float">
            <text:p>35.319835100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048.37626807" calcext:value-type="float">
            <text:p>2048.37626807</text:p>
          </table:table-cell>
          <table:table-cell office:value-type="float" office:value="0" calcext:value-type="float">
            <text:p>0</text:p>
          </table:table-cell>
          <table:table-cell office:value-type="float" office:value="514.175080004" calcext:value-type="float">
            <text:p>514.175080004</text:p>
          </table:table-cell>
          <table:table-cell office:value-type="float" office:value="1464.84718048" calcext:value-type="float">
            <text:p>1464.84718048</text:p>
          </table:table-cell>
          <table:table-cell office:value-type="float" office:value="36.2174984783" calcext:value-type="float">
            <text:p>36.217498478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546.09263815" calcext:value-type="float">
            <text:p>1546.09263815</text:p>
          </table:table-cell>
          <table:table-cell office:value-type="float" office:value="0" calcext:value-type="float">
            <text:p>0</text:p>
          </table:table-cell>
          <table:table-cell office:value-type="float" office:value="360.428905269" calcext:value-type="float">
            <text:p>360.428905269</text:p>
          </table:table-cell>
          <table:table-cell office:value-type="float" office:value="1158.3075843" calcext:value-type="float">
            <text:p>1158.30758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552.63177995" calcext:value-type="float">
            <text:p>1552.63177995</text:p>
          </table:table-cell>
          <table:table-cell office:value-type="float" office:value="82.4146258371" calcext:value-type="float">
            <text:p>82.4146258371</text:p>
          </table:table-cell>
          <table:table-cell office:value-type="float" office:value="320.271688417" calcext:value-type="float">
            <text:p>320.271688417</text:p>
          </table:table-cell>
          <table:table-cell office:value-type="float" office:value="975.043786596" calcext:value-type="float">
            <text:p>975.043786596</text:p>
          </table:table-cell>
          <table:table-cell office:value-type="float" office:value="100.130684017" calcext:value-type="float">
            <text:p>100.13068401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389.83613228" calcext:value-type="float">
            <text:p>1389.83613228</text:p>
          </table:table-cell>
          <table:table-cell office:value-type="float" office:value="89.2630757795" calcext:value-type="float">
            <text:p>89.2630757795</text:p>
          </table:table-cell>
          <table:table-cell office:value-type="float" office:value="323.252515677" calcext:value-type="float">
            <text:p>323.252515677</text:p>
          </table:table-cell>
          <table:table-cell office:value-type="float" office:value="822.364142232" calcext:value-type="float">
            <text:p>822.364142232</text:p>
          </table:table-cell>
          <table:table-cell office:value-type="float" office:value="95.4172276852" calcext:value-type="float">
            <text:p>95.417227685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00.303338874" calcext:value-type="float">
            <text:p>400.303338874</text:p>
          </table:table-cell>
          <table:table-cell office:value-type="float" office:value="1.3287151487" calcext:value-type="float">
            <text:p>1.3287151487</text:p>
          </table:table-cell>
          <table:table-cell office:value-type="float" office:value="192.357367436" calcext:value-type="float">
            <text:p>192.357367436</text:p>
          </table:table-cell>
          <table:table-cell office:value-type="float" office:value="116.179843422" calcext:value-type="float">
            <text:p>116.179843422</text:p>
          </table:table-cell>
          <table:table-cell office:value-type="float" office:value="63.3325467217" calcext:value-type="float">
            <text:p>63.3325467217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544.897261171" calcext:value-type="float">
            <text:p>544.897261171</text:p>
          </table:table-cell>
          <table:table-cell office:value-type="float" office:value="0" calcext:value-type="float">
            <text:p>0</text:p>
          </table:table-cell>
          <table:table-cell office:value-type="float" office:value="376.619332266" calcext:value-type="float">
            <text:p>376.619332266</text:p>
          </table:table-cell>
          <table:table-cell office:value-type="float" office:value="109.090538382" calcext:value-type="float">
            <text:p>109.090538382</text:p>
          </table:table-cell>
          <table:table-cell office:value-type="float" office:value="36.6745848364" calcext:value-type="float">
            <text:p>36.674584836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878.569119432" calcext:value-type="float">
            <text:p>878.569119432</text:p>
          </table:table-cell>
          <table:table-cell office:value-type="float" office:value="0" calcext:value-type="float">
            <text:p>0</text:p>
          </table:table-cell>
          <table:table-cell office:value-type="float" office:value="686.429320471" calcext:value-type="float">
            <text:p>686.429320471</text:p>
          </table:table-cell>
          <table:table-cell office:value-type="float" office:value="150.197066672" calcext:value-type="float">
            <text:p>150.197066672</text:p>
          </table:table-cell>
          <table:table-cell office:value-type="float" office:value="34.7873777952" calcext:value-type="float">
            <text:p>34.787377795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420.44598083" calcext:value-type="float">
            <text:p>2420.44598083</text:p>
          </table:table-cell>
          <table:table-cell office:value-type="float" office:value="0" calcext:value-type="float">
            <text:p>0</text:p>
          </table:table-cell>
          <table:table-cell office:value-type="float" office:value="503.74615396" calcext:value-type="float">
            <text:p>503.74615396</text:p>
          </table:table-cell>
          <table:table-cell office:value-type="float" office:value="1858.60145086" calcext:value-type="float">
            <text:p>1858.60145086</text:p>
          </table:table-cell>
          <table:table-cell office:value-type="float" office:value="37.2341112017" calcext:value-type="float">
            <text:p>37.2341112017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460.476929918" calcext:value-type="float">
            <text:p>460.476929918</text:p>
          </table:table-cell>
          <table:table-cell office:value-type="float" office:value="47.8248308966" calcext:value-type="float">
            <text:p>47.8248308966</text:p>
          </table:table-cell>
          <table:table-cell office:value-type="float" office:value="61.1089916101" calcext:value-type="float">
            <text:p>61.1089916101</text:p>
          </table:table-cell>
          <table:table-cell office:value-type="float" office:value="248.262479958" calcext:value-type="float">
            <text:p>248.262479958</text:p>
          </table:table-cell>
          <table:table-cell office:value-type="float" office:value="67.1334336471" calcext:value-type="float">
            <text:p>67.133433647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525.442972129" calcext:value-type="float">
            <text:p>525.442972129</text:p>
          </table:table-cell>
          <table:table-cell office:value-type="float" office:value="54.2141659203" calcext:value-type="float">
            <text:p>54.2141659203</text:p>
          </table:table-cell>
          <table:table-cell office:value-type="float" office:value="103.069485831" calcext:value-type="float">
            <text:p>103.069485831</text:p>
          </table:table-cell>
          <table:table-cell office:value-type="float" office:value="266.903146686" calcext:value-type="float">
            <text:p>266.903146686</text:p>
          </table:table-cell>
          <table:table-cell office:value-type="float" office:value="65.7290740937" calcext:value-type="float">
            <text:p>65.729074093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91.684218692" calcext:value-type="float">
            <text:p>391.684218692</text:p>
          </table:table-cell>
          <table:table-cell office:value-type="float" office:value="70.2625431703" calcext:value-type="float">
            <text:p>70.2625431703</text:p>
          </table:table-cell>
          <table:table-cell office:value-type="float" office:value="86.7610724801" calcext:value-type="float">
            <text:p>86.7610724801</text:p>
          </table:table-cell>
          <table:table-cell office:value-type="float" office:value="137.551673374" calcext:value-type="float">
            <text:p>137.551673374</text:p>
          </table:table-cell>
          <table:table-cell office:value-type="float" office:value="65.7699223845" calcext:value-type="float">
            <text:p>65.7699223845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329.16626995" calcext:value-type="float">
            <text:p>1329.16626995</text:p>
          </table:table-cell>
          <table:table-cell office:value-type="float" office:value="0" calcext:value-type="float">
            <text:p>0</text:p>
          </table:table-cell>
          <table:table-cell office:value-type="float" office:value="246.106391415" calcext:value-type="float">
            <text:p>246.106391415</text:p>
          </table:table-cell>
          <table:table-cell office:value-type="float" office:value="1023.26420065" calcext:value-type="float">
            <text:p>1023.26420065</text:p>
          </table:table-cell>
          <table:table-cell office:value-type="float" office:value="35.8848506629" calcext:value-type="float">
            <text:p>35.8848506629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432.80315799" calcext:value-type="float">
            <text:p>1432.80315799</text:p>
          </table:table-cell>
          <table:table-cell office:value-type="float" office:value="0" calcext:value-type="float">
            <text:p>0</text:p>
          </table:table-cell>
          <table:table-cell office:value-type="float" office:value="288.576121485" calcext:value-type="float">
            <text:p>288.576121485</text:p>
          </table:table-cell>
          <table:table-cell office:value-type="float" office:value="1083.95945689" calcext:value-type="float">
            <text:p>1083.95945689</text:p>
          </table:table-cell>
          <table:table-cell office:value-type="float" office:value="36.3715444774" calcext:value-type="float">
            <text:p>36.371544477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617.58404459" calcext:value-type="float">
            <text:p>1617.58404459</text:p>
          </table:table-cell>
          <table:table-cell office:value-type="float" office:value="0" calcext:value-type="float">
            <text:p>0</text:p>
          </table:table-cell>
          <table:table-cell office:value-type="float" office:value="445.655684747" calcext:value-type="float">
            <text:p>445.655684747</text:p>
          </table:table-cell>
          <table:table-cell office:value-type="float" office:value="1115.86753393" calcext:value-type="float">
            <text:p>1115.86753393</text:p>
          </table:table-cell>
          <table:table-cell office:value-type="float" office:value="35.3342132733" calcext:value-type="float">
            <text:p>35.3342132733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740.81865527" calcext:value-type="float">
            <text:p>2740.81865527</text:p>
          </table:table-cell>
          <table:table-cell office:value-type="float" office:value="123.264448493" calcext:value-type="float">
            <text:p>123.264448493</text:p>
          </table:table-cell>
          <table:table-cell office:value-type="float" office:value="211.691444412" calcext:value-type="float">
            <text:p>211.691444412</text:p>
          </table:table-cell>
          <table:table-cell office:value-type="float" office:value="2237.07333613" calcext:value-type="float">
            <text:p>2237.07333613</text:p>
          </table:table-cell>
          <table:table-cell office:value-type="float" office:value="96.9072879466" calcext:value-type="float">
            <text:p>96.907287946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001.937952" calcext:value-type="float">
            <text:p>3001.937952</text:p>
          </table:table-cell>
          <table:table-cell office:value-type="float" office:value="594.4623038" calcext:value-type="float">
            <text:p>594.4623038</text:p>
          </table:table-cell>
          <table:table-cell office:value-type="float" office:value="381.26802517" calcext:value-type="float">
            <text:p>381.26802517</text:p>
          </table:table-cell>
          <table:table-cell office:value-type="float" office:value="1766.64322494" calcext:value-type="float">
            <text:p>1766.64322494</text:p>
          </table:table-cell>
          <table:table-cell office:value-type="float" office:value="95.6803597668" calcext:value-type="float">
            <text:p>95.680359766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143.70154854" calcext:value-type="float">
            <text:p>2143.70154854</text:p>
          </table:table-cell>
          <table:table-cell office:value-type="float" office:value="185.230560891" calcext:value-type="float">
            <text:p>185.230560891</text:p>
          </table:table-cell>
          <table:table-cell office:value-type="float" office:value="254.992323802" calcext:value-type="float">
            <text:p>254.992323802</text:p>
          </table:table-cell>
          <table:table-cell office:value-type="float" office:value="1512.25270818" calcext:value-type="float">
            <text:p>1512.25270818</text:p>
          </table:table-cell>
          <table:table-cell office:value-type="float" office:value="97.1452953948" calcext:value-type="float">
            <text:p>97.145295394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320.25799346" calcext:value-type="float">
            <text:p>1320.25799346</text:p>
          </table:table-cell>
          <table:table-cell office:value-type="float" office:value="0" calcext:value-type="float">
            <text:p>0</text:p>
          </table:table-cell>
          <table:table-cell office:value-type="float" office:value="464.089037327" calcext:value-type="float">
            <text:p>464.089037327</text:p>
          </table:table-cell>
          <table:table-cell office:value-type="float" office:value="797.218292609" calcext:value-type="float">
            <text:p>797.218292609</text:p>
          </table:table-cell>
          <table:table-cell office:value-type="float" office:value="37.2223948492" calcext:value-type="float">
            <text:p>37.222394849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336.24682383" calcext:value-type="float">
            <text:p>1336.24682383</text:p>
          </table:table-cell>
          <table:table-cell office:value-type="float" office:value="0" calcext:value-type="float">
            <text:p>0</text:p>
          </table:table-cell>
          <table:table-cell office:value-type="float" office:value="478.14995482" calcext:value-type="float">
            <text:p>478.14995482</text:p>
          </table:table-cell>
          <table:table-cell office:value-type="float" office:value="801.836546067" calcext:value-type="float">
            <text:p>801.836546067</text:p>
          </table:table-cell>
          <table:table-cell office:value-type="float" office:value="36.6881031816" calcext:value-type="float">
            <text:p>36.688103181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190.57863335" calcext:value-type="float">
            <text:p>1190.57863335</text:p>
          </table:table-cell>
          <table:table-cell office:value-type="float" office:value="0" calcext:value-type="float">
            <text:p>0</text:p>
          </table:table-cell>
          <table:table-cell office:value-type="float" office:value="99.6812763269" calcext:value-type="float">
            <text:p>99.6812763269</text:p>
          </table:table-cell>
          <table:table-cell office:value-type="float" office:value="1041.06767219" calcext:value-type="float">
            <text:p>1041.06767219</text:p>
          </table:table-cell>
          <table:table-cell office:value-type="float" office:value="36.7912223995" calcext:value-type="float">
            <text:p>36.7912223995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908.113658155" calcext:value-type="float">
            <text:p>908.113658155</text:p>
          </table:table-cell>
          <table:table-cell office:value-type="float" office:value="116.602209381" calcext:value-type="float">
            <text:p>116.602209381</text:p>
          </table:table-cell>
          <table:table-cell office:value-type="float" office:value="307.591581091" calcext:value-type="float">
            <text:p>307.591581091</text:p>
          </table:table-cell>
          <table:table-cell office:value-type="float" office:value="251.993743928" calcext:value-type="float">
            <text:p>251.993743928</text:p>
          </table:table-cell>
          <table:table-cell office:value-type="float" office:value="132.744342981" calcext:value-type="float">
            <text:p>132.74434298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085.86529896" calcext:value-type="float">
            <text:p>1085.86529896</text:p>
          </table:table-cell>
          <table:table-cell office:value-type="float" office:value="198.427026206" calcext:value-type="float">
            <text:p>198.427026206</text:p>
          </table:table-cell>
          <table:table-cell office:value-type="float" office:value="354.037778656" calcext:value-type="float">
            <text:p>354.037778656</text:p>
          </table:table-cell>
          <table:table-cell office:value-type="float" office:value="281.158223216" calcext:value-type="float">
            <text:p>281.158223216</text:p>
          </table:table-cell>
          <table:table-cell office:value-type="float" office:value="142.27920445" calcext:value-type="float">
            <text:p>142.2792044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414.7225027" calcext:value-type="float">
            <text:p>3414.7225027</text:p>
          </table:table-cell>
          <table:table-cell office:value-type="float" office:value="889.017461893" calcext:value-type="float">
            <text:p>889.017461893</text:p>
          </table:table-cell>
          <table:table-cell office:value-type="float" office:value="494.167072104" calcext:value-type="float">
            <text:p>494.167072104</text:p>
          </table:table-cell>
          <table:table-cell office:value-type="float" office:value="1679.85173301" calcext:value-type="float">
            <text:p>1679.85173301</text:p>
          </table:table-cell>
          <table:table-cell office:value-type="float" office:value="144.605043018" calcext:value-type="float">
            <text:p>144.60504301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310.55918593" calcext:value-type="float">
            <text:p>1310.55918593</text:p>
          </table:table-cell>
          <table:table-cell office:value-type="float" office:value="0" calcext:value-type="float">
            <text:p>0</text:p>
          </table:table-cell>
          <table:table-cell office:value-type="float" office:value="561.209155216" calcext:value-type="float">
            <text:p>561.209155216</text:p>
          </table:table-cell>
          <table:table-cell office:value-type="float" office:value="690.511541171" calcext:value-type="float">
            <text:p>690.511541171</text:p>
          </table:table-cell>
          <table:table-cell office:value-type="float" office:value="36.9839680113" calcext:value-type="float">
            <text:p>36.983968011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899.138885674" calcext:value-type="float">
            <text:p>899.138885674</text:p>
          </table:table-cell>
          <table:table-cell office:value-type="float" office:value="0" calcext:value-type="float">
            <text:p>0</text:p>
          </table:table-cell>
          <table:table-cell office:value-type="float" office:value="355.68341406" calcext:value-type="float">
            <text:p>355.68341406</text:p>
          </table:table-cell>
          <table:table-cell office:value-type="float" office:value="489.4484512" calcext:value-type="float">
            <text:p>489.4484512</text:p>
          </table:table-cell>
          <table:table-cell office:value-type="float" office:value="37.5135292297" calcext:value-type="float">
            <text:p>37.513529229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399.37608426" calcext:value-type="float">
            <text:p>2399.37608426</text:p>
          </table:table-cell>
          <table:table-cell office:value-type="float" office:value="0" calcext:value-type="float">
            <text:p>0</text:p>
          </table:table-cell>
          <table:table-cell office:value-type="float" office:value="876.407882667" calcext:value-type="float">
            <text:p>876.407882667</text:p>
          </table:table-cell>
          <table:table-cell office:value-type="float" office:value="1459.73921927" calcext:value-type="float">
            <text:p>1459.73921927</text:p>
          </table:table-cell>
          <table:table-cell office:value-type="float" office:value="36.6485093393" calcext:value-type="float">
            <text:p>36.6485093393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290.32094812" calcext:value-type="float">
            <text:p>1290.32094812</text:p>
          </table:table-cell>
          <table:table-cell office:value-type="float" office:value="110.592784117" calcext:value-type="float">
            <text:p>110.592784117</text:p>
          </table:table-cell>
          <table:table-cell office:value-type="float" office:value="183.502964258" calcext:value-type="float">
            <text:p>183.502964258</text:p>
          </table:table-cell>
          <table:table-cell office:value-type="float" office:value="837.830730879" calcext:value-type="float">
            <text:p>837.830730879</text:p>
          </table:table-cell>
          <table:table-cell office:value-type="float" office:value="95.7710408774" calcext:value-type="float">
            <text:p>95.771040877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101.20652641" calcext:value-type="float">
            <text:p>1101.20652641</text:p>
          </table:table-cell>
          <table:table-cell office:value-type="float" office:value="106.898353401" calcext:value-type="float">
            <text:p>106.898353401</text:p>
          </table:table-cell>
          <table:table-cell office:value-type="float" office:value="188.46791796" calcext:value-type="float">
            <text:p>188.46791796</text:p>
          </table:table-cell>
          <table:table-cell office:value-type="float" office:value="640.770609857" calcext:value-type="float">
            <text:p>640.770609857</text:p>
          </table:table-cell>
          <table:table-cell office:value-type="float" office:value="93.814892855" calcext:value-type="float">
            <text:p>93.81489285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233.21259667" calcext:value-type="float">
            <text:p>1233.21259667</text:p>
          </table:table-cell>
          <table:table-cell office:value-type="float" office:value="116.620078652" calcext:value-type="float">
            <text:p>116.620078652</text:p>
          </table:table-cell>
          <table:table-cell office:value-type="float" office:value="228.964108142" calcext:value-type="float">
            <text:p>228.964108142</text:p>
          </table:table-cell>
          <table:table-cell office:value-type="float" office:value="732.643332321" calcext:value-type="float">
            <text:p>732.643332321</text:p>
          </table:table-cell>
          <table:table-cell office:value-type="float" office:value="93.4154637822" calcext:value-type="float">
            <text:p>93.4154637822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2562.66638361" calcext:value-type="float">
            <text:p>2562.66638361</text:p>
          </table:table-cell>
          <table:table-cell office:value-type="float" office:value="0" calcext:value-type="float">
            <text:p>0</text:p>
          </table:table-cell>
          <table:table-cell office:value-type="float" office:value="453.508379489" calcext:value-type="float">
            <text:p>453.508379489</text:p>
          </table:table-cell>
          <table:table-cell office:value-type="float" office:value="2065.63571051" calcext:value-type="float">
            <text:p>2065.63571051</text:p>
          </table:table-cell>
          <table:table-cell office:value-type="float" office:value="36.5026633228" calcext:value-type="float">
            <text:p>36.502663322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577.04616303" calcext:value-type="float">
            <text:p>3577.04616303</text:p>
          </table:table-cell>
          <table:table-cell office:value-type="float" office:value="0" calcext:value-type="float">
            <text:p>0</text:p>
          </table:table-cell>
          <table:table-cell office:value-type="float" office:value="795.590182532" calcext:value-type="float">
            <text:p>795.590182532</text:p>
          </table:table-cell>
          <table:table-cell office:value-type="float" office:value="2726.57883052" calcext:value-type="float">
            <text:p>2726.57883052</text:p>
          </table:table-cell>
          <table:table-cell office:value-type="float" office:value="36.6987270516" calcext:value-type="float">
            <text:p>36.698727051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093.89258865" calcext:value-type="float">
            <text:p>4093.89258865</text:p>
          </table:table-cell>
          <table:table-cell office:value-type="float" office:value="0" calcext:value-type="float">
            <text:p>0</text:p>
          </table:table-cell>
          <table:table-cell office:value-type="float" office:value="1837.85354571" calcext:value-type="float">
            <text:p>1837.85354571</text:p>
          </table:table-cell>
          <table:table-cell office:value-type="float" office:value="2199.69001777" calcext:value-type="float">
            <text:p>2199.69001777</text:p>
          </table:table-cell>
          <table:table-cell office:value-type="float" office:value="36.0542716445" calcext:value-type="float">
            <text:p>36.0542716445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729.5877437" calcext:value-type="float">
            <text:p>729.5877437</text:p>
          </table:table-cell>
          <table:table-cell office:value-type="float" office:value="166.139073057" calcext:value-type="float">
            <text:p>166.139073057</text:p>
          </table:table-cell>
          <table:table-cell office:value-type="float" office:value="276.280011387" calcext:value-type="float">
            <text:p>276.280011387</text:p>
          </table:table-cell>
          <table:table-cell office:value-type="float" office:value="86.5466397684" calcext:value-type="float">
            <text:p>86.5466397684</text:p>
          </table:table-cell>
          <table:table-cell office:value-type="float" office:value="102.993702037" calcext:value-type="float">
            <text:p>102.99370203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773.254391299" calcext:value-type="float">
            <text:p>773.254391299</text:p>
          </table:table-cell>
          <table:table-cell office:value-type="float" office:value="103.701793123" calcext:value-type="float">
            <text:p>103.701793123</text:p>
          </table:table-cell>
          <table:table-cell office:value-type="float" office:value="244.547152335" calcext:value-type="float">
            <text:p>244.547152335</text:p>
          </table:table-cell>
          <table:table-cell office:value-type="float" office:value="201.876156796" calcext:value-type="float">
            <text:p>201.876156796</text:p>
          </table:table-cell>
          <table:table-cell office:value-type="float" office:value="137.43264406" calcext:value-type="float">
            <text:p>137.4326440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869.09787871" calcext:value-type="float">
            <text:p>1869.09787871</text:p>
          </table:table-cell>
          <table:table-cell office:value-type="float" office:value="121.652335818" calcext:value-type="float">
            <text:p>121.652335818</text:p>
          </table:table-cell>
          <table:table-cell office:value-type="float" office:value="309.009277689" calcext:value-type="float">
            <text:p>309.009277689</text:p>
          </table:table-cell>
          <table:table-cell office:value-type="float" office:value="1203.11695928" calcext:value-type="float">
            <text:p>1203.11695928</text:p>
          </table:table-cell>
          <table:table-cell office:value-type="float" office:value="135.012820943" calcext:value-type="float">
            <text:p>135.012820943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float" office:value="1552.713397" calcext:value-type="float">
            <text:p>1552.713397</text:p>
          </table:table-cell>
          <table:table-cell office:value-type="float" office:value="0" calcext:value-type="float">
            <text:p>0</text:p>
          </table:table-cell>
          <table:table-cell office:value-type="float" office:value="539.366029816" calcext:value-type="float">
            <text:p>539.366029816</text:p>
          </table:table-cell>
          <table:table-cell office:value-type="float" office:value="949.129463631" calcext:value-type="float">
            <text:p>949.129463631</text:p>
          </table:table-cell>
          <table:table-cell office:value-type="float" office:value="37.643237123" calcext:value-type="float">
            <text:p>37.64323712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292.78367648" calcext:value-type="float">
            <text:p>4292.78367648</text:p>
          </table:table-cell>
          <table:table-cell office:value-type="float" office:value="0" calcext:value-type="float">
            <text:p>0</text:p>
          </table:table-cell>
          <table:table-cell office:value-type="float" office:value="288.285710726" calcext:value-type="float">
            <text:p>288.285710726</text:p>
          </table:table-cell>
          <table:table-cell office:value-type="float" office:value="3946.52083872" calcext:value-type="float">
            <text:p>3946.52083872</text:p>
          </table:table-cell>
          <table:table-cell office:value-type="float" office:value="37.5155312724" calcext:value-type="float">
            <text:p>37.515531272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565.1821204" calcext:value-type="float">
            <text:p>1565.1821204</text:p>
          </table:table-cell>
          <table:table-cell office:value-type="float" office:value="0" calcext:value-type="float">
            <text:p>0</text:p>
          </table:table-cell>
          <table:table-cell office:value-type="float" office:value="367.87898811" calcext:value-type="float">
            <text:p>367.87898811</text:p>
          </table:table-cell>
          <table:table-cell office:value-type="float" office:value="1124.55696339" calcext:value-type="float">
            <text:p>1124.55696339</text:p>
          </table:table-cell>
          <table:table-cell office:value-type="float" office:value="37.6306040122" calcext:value-type="float">
            <text:p>37.63060401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 style:data-style-name="N2" text:time-value="20:20:48.833488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5-05T23:32:35.803720332</dc:date>
    <meta:editing-duration>PT9H31M4S</meta:editing-duration>
    <meta:editing-cycles>17</meta:editing-cycles>
    <meta:generator>LibreOffice/5.1.6.2$Linux_X86_64 LibreOffice_project/10m0$Build-2</meta:generator>
    <meta:document-statistic meta:table-count="3" meta:cell-count="2344" meta:object-count="0"/>
  </office:meta>
</office:document-meta>
</file>